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33cm"/>
    </style:style>
    <style:style style:name="co3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odb_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gov_code</text:p>
          </table:table-cell>
          <table:table-cell office:value-type="string" calcext:value-type="string">
            <text:p>school_code</text:p>
          </table:table-cell>
          <table:table-cell office:value-type="string" calcext:value-type="string">
            <text:p>password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il.yarullin@odkzn.ru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y1KDTqG4Itk3GmOXXvFAeu0G2FOqw9cXILBV4e3JzwOi1mZEFLVU.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ROCRT</text:p>
          </table:table-cell>
          <table:table-cell office:value-type="string" calcext:value-type="string">
            <text:p>rocrt@mail.ru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.hnF7kqEtWEEAeqngGgzou8fUuQJdI16AU7OdRrbnW7PPN11AZWRW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Мирсаяпова Лилия Талгатовна</text:p>
          </table:table-cell>
          <table:table-cell office:value-type="string" calcext:value-type="string">
            <text:p>0001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Муфтахутдинова Наталья Анатольевна</text:p>
          </table:table-cell>
          <table:table-cell office:value-type="string" calcext:value-type="string">
            <text:p>0002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002" calcext:value-type="float">
            <text:p>10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Урюпина Елена Александровна</text:p>
          </table:table-cell>
          <table:table-cell office:value-type="string" calcext:value-type="string">
            <text:p>0003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003" calcext:value-type="float">
            <text:p>10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Кондрашина Елена Валентиновна</text:p>
          </table:table-cell>
          <table:table-cell office:value-type="string" calcext:value-type="string">
            <text:p>0004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004" calcext:value-type="float">
            <text:p>10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Ишманова Лидия Геннадьевна</text:p>
          </table:table-cell>
          <table:table-cell office:value-type="string" calcext:value-type="string">
            <text:p>0006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006" calcext:value-type="float">
            <text:p>10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Коробейникова Юлия Васильевна</text:p>
          </table:table-cell>
          <table:table-cell office:value-type="string" calcext:value-type="string">
            <text:p>0007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013" calcext:value-type="float">
            <text:p>10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Михайлова Виктория Витальевна</text:p>
          </table:table-cell>
          <table:table-cell office:value-type="string" calcext:value-type="string">
            <text:p>0008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015" calcext:value-type="float">
            <text:p>10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Бедертдинова Инесса Ивановна</text:p>
          </table:table-cell>
          <table:table-cell office:value-type="string" calcext:value-type="string">
            <text:p>0009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017" calcext:value-type="float">
            <text:p>10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Даутова Альфинур Файзулловна</text:p>
          </table:table-cell>
          <table:table-cell office:value-type="string" calcext:value-type="string">
            <text:p>0107000084@edu.tatar.r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07" calcext:value-type="float">
            <text:p>104007</text:p>
          </table:table-cell>
          <table:table-cell office:value-type="string" calcext:value-type="string">
            <text:p>$2y$10$Kwo0CXYTiIqKpScHI.q6BOZyZ1expjDcfSAanyTKUGWTKOJgswhDa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Салимуллина Ленара Раилевна</text:p>
          </table:table-cell>
          <table:table-cell office:value-type="string" calcext:value-type="string">
            <text:p>0011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08" calcext:value-type="float">
            <text:p>10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Симакова Гульнур Илдусовна</text:p>
          </table:table-cell>
          <table:table-cell office:value-type="string" calcext:value-type="string">
            <text:p>011976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09" calcext:value-type="float">
            <text:p>104009</text:p>
          </table:table-cell>
          <table:table-cell office:value-type="string" calcext:value-type="string">
            <text:p>$2y$10$sKbGhnwJhfrkwdNgA07N0On8WUWCRx43tjVmCe5mfw8FvVSaHX0ou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Расулева Эльмира Раисовна</text:p>
          </table:table-cell>
          <table:table-cell office:value-type="string" calcext:value-type="string">
            <text:p>0013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11" calcext:value-type="float">
            <text:p>10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Нуретдинова Алсу Мансуровна</text:p>
          </table:table-cell>
          <table:table-cell office:value-type="string" calcext:value-type="string">
            <text:p>0014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12" calcext:value-type="float">
            <text:p>10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Михайлова Елена Дмитриевна</text:p>
          </table:table-cell>
          <table:table-cell office:value-type="string" calcext:value-type="string">
            <text:p>0015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16" calcext:value-type="float">
            <text:p>10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Фархушина Люзия Гаязовна</text:p>
          </table:table-cell>
          <table:table-cell office:value-type="string" calcext:value-type="string">
            <text:p>0016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18" calcext:value-type="float">
            <text:p>10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Гинатуллина Гульназ Ульфатовна</text:p>
          </table:table-cell>
          <table:table-cell office:value-type="string" calcext:value-type="string">
            <text:p>0017@mail.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20" calcext:value-type="float">
            <text:p>10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Бородина Юлия Алексеевна</text:p>
          </table:table-cell>
          <table:table-cell office:value-type="string" calcext:value-type="string">
            <text:p>Krotova_1997@mail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2" calcext:value-type="float">
            <text:p>111002</text:p>
          </table:table-cell>
          <table:table-cell office:value-type="string" calcext:value-type="string">
            <text:p>$2y$10$hMHammfAQgdZCJDNl5mglOj2HPUtWCibVJ5Jgu6WW2hzryjAgqFNK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Музафарова Алсу Фандасовна</text:p>
          </table:table-cell>
          <table:table-cell office:value-type="string" calcext:value-type="string">
            <text:p>0019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3" calcext:value-type="float">
            <text:p>111003</text:p>
          </table:table-cell>
          <table:table-cell office:value-type="string" calcext:value-type="string">
            <text:p>$2y$10$.fR/qN4377vO4Ig6e0yFnOQylsn5TmvziNRq/R9F.BOLJ1uPRLb.C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Ширеева Алсу Сагитовна</text:p>
          </table:table-cell>
          <table:table-cell office:value-type="string" calcext:value-type="string">
            <text:p>0020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4" calcext:value-type="float">
            <text:p>11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Кариева Розалия Индусовна</text:p>
          </table:table-cell>
          <table:table-cell office:value-type="string" calcext:value-type="string">
            <text:p>0021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5" calcext:value-type="float">
            <text:p>11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Ахунова Ляйсан Марсовна</text:p>
          </table:table-cell>
          <table:table-cell office:value-type="string" calcext:value-type="string">
            <text:p>S6.Azn@yandex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6" calcext:value-type="float">
            <text:p>111006</text:p>
          </table:table-cell>
          <table:table-cell office:value-type="string" calcext:value-type="string">
            <text:p>$2y$10$EyLjp0bfwnwIs/XD8puAxO7F8/2QNCIavn2lCfvmyC4j1s4PYqpz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Манян Марине Биниаминовна</text:p>
          </table:table-cell>
          <table:table-cell office:value-type="string" calcext:value-type="string">
            <text:p>0023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7" calcext:value-type="float">
            <text:p>111007</text:p>
          </table:table-cell>
          <table:table-cell office:value-type="string" calcext:value-type="string">
            <text:p>$2y$10$feviFOAMCRFaigeO6//2HuMnm6M2IWpwNoxqqimGBiW.TNiRiOU1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Гайсина Регина Раисовна</text:p>
          </table:table-cell>
          <table:table-cell office:value-type="string" calcext:value-type="string">
            <text:p>0024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8" calcext:value-type="float">
            <text:p>11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Шайхутдинова Миляуша Миргаязовна</text:p>
          </table:table-cell>
          <table:table-cell office:value-type="string" calcext:value-type="string">
            <text:p>Milka4051992@mail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09" calcext:value-type="float">
            <text:p>111009</text:p>
          </table:table-cell>
          <table:table-cell office:value-type="string" calcext:value-type="string">
            <text:p>$2y$10$1AOQeZxlN5CurUVZPEeqOeTg2xSSk53E18j6o.5BlMffKejR7rOma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Кузеванова Лилия Раушановна </text:p>
          </table:table-cell>
          <table:table-cell office:value-type="string" calcext:value-type="string">
            <text:p>0026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Муртазина Лилия Ильмировна</text:p>
          </table:table-cell>
          <table:table-cell office:value-type="string" calcext:value-type="string">
            <text:p>lilechka75@inbox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1012" calcext:value-type="float">
            <text:p>111012</text:p>
          </table:table-cell>
          <table:table-cell office:value-type="string" calcext:value-type="string">
            <text:p>$2y$10$ADnRAMx/p32VK9PfhvEsKubBRpziMFWvVVxKIJokYU2JR2ioNV7Ky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Сабурова Гузель Ленаровна</text:p>
          </table:table-cell>
          <table:table-cell office:value-type="string" calcext:value-type="string">
            <text:p>0028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3001" calcext:value-type="float">
            <text:p>113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Ибрагимова Чулпан Рафатовна</text:p>
          </table:table-cell>
          <table:table-cell office:value-type="string" calcext:value-type="string">
            <text:p>0029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3010" calcext:value-type="float">
            <text:p>113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Набиуллина Лилия Ядитовна</text:p>
          </table:table-cell>
          <table:table-cell office:value-type="string" calcext:value-type="string">
            <text:p>0030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3013" calcext:value-type="float">
            <text:p>113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Мухаметянова Гульчехра Давроновна </text:p>
          </table:table-cell>
          <table:table-cell office:value-type="string" calcext:value-type="string">
            <text:p>0031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18" calcext:value-type="float">
            <text:p>11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Хайруллин Айдар Хабибуллович</text:p>
          </table:table-cell>
          <table:table-cell office:value-type="string" calcext:value-type="string">
            <text:p>0032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20" calcext:value-type="float">
            <text:p>11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Хасанова Разиля Айратовна</text:p>
          </table:table-cell>
          <table:table-cell office:value-type="string" calcext:value-type="string">
            <text:p>wasilisa-74@mail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23" calcext:value-type="float">
            <text:p>114023</text:p>
          </table:table-cell>
          <table:table-cell office:value-type="string" calcext:value-type="string">
            <text:p>$2y$10$koY6ClsF1Yen/NdS5sl0t.GGynEMBw5Yw6OUJ3Q4Wt.lv8yVOD20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Тухбатуллина Гульнур Рашитовна</text:p>
          </table:table-cell>
          <table:table-cell office:value-type="string" calcext:value-type="string">
            <text:p>0034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25" calcext:value-type="float">
            <text:p>114025</text:p>
          </table:table-cell>
          <table:table-cell office:value-type="string" calcext:value-type="string">
            <text:p>$2y$10$vGiwJbCb8oFvIwE01y9TXuTzLYBQzerYc5LVBfzmlZxG2B7CtdnJG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Сабирова Лилия Камиловна</text:p>
          </table:table-cell>
          <table:table-cell office:value-type="string" calcext:value-type="string">
            <text:p>0035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26" calcext:value-type="float">
            <text:p>114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Кашапова Ильзира Фаритовна</text:p>
          </table:table-cell>
          <table:table-cell office:value-type="string" calcext:value-type="string">
            <text:p>Stum.azn@yandex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28" calcext:value-type="float">
            <text:p>114028</text:p>
          </table:table-cell>
          <table:table-cell office:value-type="string" calcext:value-type="string">
            <text:p>$2y$10$Ep6M6OYp7oxestxlYeyGne2L5l6BORRCw.EUixozfDWeMjouc3TOC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Латыпова Айгуль Алмасовна</text:p>
          </table:table-cell>
          <table:table-cell office:value-type="string" calcext:value-type="string">
            <text:p>0037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30" calcext:value-type="float">
            <text:p>114030</text:p>
          </table:table-cell>
          <table:table-cell office:value-type="string" calcext:value-type="string">
            <text:p>$2y$10$HfS1LpS/czN/XaP0.C4LB.l1I5X1gzlMbaByqHuDdQ4UI62sXQstW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Зиганшина Миляуша Рафиковна</text:p>
          </table:table-cell>
          <table:table-cell office:value-type="string" calcext:value-type="string">
            <text:p>0038@mail.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32" calcext:value-type="float">
            <text:p>114032</text:p>
          </table:table-cell>
          <table:table-cell office:value-type="string" calcext:value-type="string">
            <text:p>$2y$10$jCRztx69T2JYlhJZgS8CyuhE.Mw9XbIZ3TGUkchpCdZkqMxg2MWA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Регина Нафисовна Давлетшина</text:p>
          </table:table-cell>
          <table:table-cell office:value-type="string" calcext:value-type="string">
            <text:p>Scab.Azn@yandex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34" calcext:value-type="float">
            <text:p>114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Гимаева Разиля Хамитовна</text:p>
          </table:table-cell>
          <table:table-cell office:value-type="string" calcext:value-type="string">
            <text:p>Sclp.Azn@yandex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35" calcext:value-type="float">
            <text:p>114035</text:p>
          </table:table-cell>
          <table:table-cell office:value-type="string" calcext:value-type="string">
            <text:p>$2y$10$GSbXQsi6Ti91zHA8H1iXJuIshFXNBh2n4VmuN2IVmU2kz1FXfmo5S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Маклакова Юлия Викторовна</text:p>
          </table:table-cell>
          <table:table-cell office:value-type="string" calcext:value-type="string">
            <text:p>0041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1001" calcext:value-type="float">
            <text:p>12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Шакирова Марьям Ваккасовна</text:p>
          </table:table-cell>
          <table:table-cell office:value-type="string" calcext:value-type="string">
            <text:p>0042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1002" calcext:value-type="float">
            <text:p>121002</text:p>
          </table:table-cell>
          <table:table-cell office:value-type="string" calcext:value-type="string">
            <text:p>$2y$10$jCvJka.DgPnKSJJGJkDpLuz5P9O3x6BvvEhjOY9Hgbl.xItukFZo.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Давлетшина Лейсан Амирзяновна</text:p>
          </table:table-cell>
          <table:table-cell office:value-type="string" calcext:value-type="string">
            <text:p>0043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1003" calcext:value-type="float">
            <text:p>12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Ефимова Вера Константиновна</text:p>
          </table:table-cell>
          <table:table-cell office:value-type="string" calcext:value-type="string">
            <text:p>0044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04" calcext:value-type="float">
            <text:p>12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Козлова Наталия Викторовна</text:p>
          </table:table-cell>
          <table:table-cell office:value-type="string" calcext:value-type="string">
            <text:p>0045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05" calcext:value-type="float">
            <text:p>12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Моисеева Наталия Петровна</text:p>
          </table:table-cell>
          <table:table-cell office:value-type="string" calcext:value-type="string">
            <text:p>0046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06" calcext:value-type="float">
            <text:p>12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Михайлова Надежда Петровна</text:p>
          </table:table-cell>
          <table:table-cell office:value-type="string" calcext:value-type="string">
            <text:p>0047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07" calcext:value-type="float">
            <text:p>12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Мелентьева Светлана Сергеевна</text:p>
          </table:table-cell>
          <table:table-cell office:value-type="string" calcext:value-type="string">
            <text:p>0048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08" calcext:value-type="float">
            <text:p>12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Гиматдинова Гульназ Салихзяновна</text:p>
          </table:table-cell>
          <table:table-cell office:value-type="string" calcext:value-type="string">
            <text:p>0049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09" calcext:value-type="float">
            <text:p>12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Афанасьева Марина Николаевна</text:p>
          </table:table-cell>
          <table:table-cell office:value-type="string" calcext:value-type="string">
            <text:p>0050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10" calcext:value-type="float">
            <text:p>122010</text:p>
          </table:table-cell>
          <table:table-cell office:value-type="string" calcext:value-type="string">
            <text:p>$2y$10$DnrDQ1W1LNwoqbaP77CGWusIGijgtVDw5J7Z7wIzTO8LmNmPOrQq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Еремеева Светлана Николаевна</text:p>
          </table:table-cell>
          <table:table-cell office:value-type="string" calcext:value-type="string">
            <text:p>0051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11" calcext:value-type="float">
            <text:p>122011</text:p>
          </table:table-cell>
          <table:table-cell office:value-type="string" calcext:value-type="string">
            <text:p>$2y$10$MJQr4fWokF2zUQM79jhUxOEj736az3y2YLigfHeXdlTIISTYhrrfS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Мартьянова Лариса Александровна</text:p>
          </table:table-cell>
          <table:table-cell office:value-type="string" calcext:value-type="string">
            <text:p>sch1207.69@mail.ru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12" calcext:value-type="float">
            <text:p>12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Павлова Алина Ивановна</text:p>
          </table:table-cell>
          <table:table-cell office:value-type="string" calcext:value-type="string">
            <text:p>0053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13" calcext:value-type="float">
            <text:p>12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Казакова Ирина Леонтьевна</text:p>
          </table:table-cell>
          <table:table-cell office:value-type="string" calcext:value-type="string">
            <text:p>nadezhda.artamonova.1967@mail.ru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14" calcext:value-type="float">
            <text:p>122014</text:p>
          </table:table-cell>
          <table:table-cell office:value-type="string" calcext:value-type="string">
            <text:p>$2y$10$LPatezEMaADk5nyZqFV2dOF2uWPxzSCda58L2WllOAh1Hztohoeku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Макарова Валентина Николаевна</text:p>
          </table:table-cell>
          <table:table-cell office:value-type="string" calcext:value-type="string">
            <text:p>0055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25" calcext:value-type="float">
            <text:p>122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Еграшкина Надежда Васильевна</text:p>
          </table:table-cell>
          <table:table-cell office:value-type="string" calcext:value-type="string">
            <text:p>0056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29" calcext:value-type="float">
            <text:p>122029</text:p>
          </table:table-cell>
          <table:table-cell office:value-type="string" calcext:value-type="string">
            <text:p>$2y$10$yx/mkLUFTlFHG/ZouXz9jeaDIWvX9llfn28Um4kAPt10L9fuFbC4O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Копонева Ольга Николаевна</text:p>
          </table:table-cell>
          <table:table-cell office:value-type="string" calcext:value-type="string">
            <text:p>0057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30" calcext:value-type="float">
            <text:p>1220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Алексеева Светлана Геннадьевна</text:p>
          </table:table-cell>
          <table:table-cell office:value-type="string" calcext:value-type="string">
            <text:p>0058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2031" calcext:value-type="float">
            <text:p>1220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Хузин Айдар Тагирзянович</text:p>
          </table:table-cell>
          <table:table-cell office:value-type="string" calcext:value-type="string">
            <text:p>0059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15" calcext:value-type="float">
            <text:p>124015</text:p>
          </table:table-cell>
          <table:table-cell office:value-type="string" calcext:value-type="string">
            <text:p>$2y$10$3SUauhK41l8pwaVQIwVxTe9lxD/eXGOlCnRNPYbl6NZ7CvDnO13e6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Ярмухаметова Руфия Вазыховна</text:p>
          </table:table-cell>
          <table:table-cell office:value-type="string" calcext:value-type="string">
            <text:p>0060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16" calcext:value-type="float">
            <text:p>12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Абрарова <text:s text:c="2"/>Илюза <text:s/>Ринатовна</text:p>
          </table:table-cell>
          <table:table-cell office:value-type="string" calcext:value-type="string">
            <text:p>0061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17" calcext:value-type="float">
            <text:p>124017</text:p>
          </table:table-cell>
          <table:table-cell office:value-type="string" calcext:value-type="string">
            <text:p>$2y$10$zQJUGIuXxSeqt7tMSpdSa.hKCn/odiy62VPzhQSybtNvO6DO3GA2G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Вафина Лейсан Максумовна</text:p>
          </table:table-cell>
          <table:table-cell office:value-type="string" calcext:value-type="string">
            <text:p>0062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18" calcext:value-type="float">
            <text:p>124018</text:p>
          </table:table-cell>
          <table:table-cell office:value-type="string" calcext:value-type="string">
            <text:p>$2y$10$nMptOvt9LHngQ/oThTYX.O90sjwu0Kwh4b6B5BbyjtDDmCX/70Gnm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Хуснулгатина Миляуша Амирулловна</text:p>
          </table:table-cell>
          <table:table-cell office:value-type="string" calcext:value-type="string">
            <text:p>0063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19" calcext:value-type="float">
            <text:p>124019</text:p>
          </table:table-cell>
          <table:table-cell office:value-type="string" calcext:value-type="string">
            <text:p>$2y$10$RBw/qLrhbHxa67.Z/TNiQuRVeL4i5FkU5wMmhoSCRYN0ZIpWHF3Tq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Ахметвалиев Тахир Зинятович</text:p>
          </table:table-cell>
          <table:table-cell office:value-type="string" calcext:value-type="string">
            <text:p>0064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20" calcext:value-type="float">
            <text:p>12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Шакирова Васима Мансуровна</text:p>
          </table:table-cell>
          <table:table-cell office:value-type="string" calcext:value-type="string">
            <text:p>0065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21" calcext:value-type="float">
            <text:p>12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Сафиуллин Ильдар Хабибуллович</text:p>
          </table:table-cell>
          <table:table-cell office:value-type="string" calcext:value-type="string">
            <text:p>0066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22" calcext:value-type="float">
            <text:p>124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Ахметзянова Гульфия Рафиковна</text:p>
          </table:table-cell>
          <table:table-cell office:value-type="string" calcext:value-type="string">
            <text:p>0067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26" calcext:value-type="float">
            <text:p>124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Багаутдинова Халиса Минфазыловна</text:p>
          </table:table-cell>
          <table:table-cell office:value-type="string" calcext:value-type="string">
            <text:p>0068@mail.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027" calcext:value-type="float">
            <text:p>124027</text:p>
          </table:table-cell>
          <table:table-cell office:value-type="string" calcext:value-type="string">
            <text:p>$2y$10$gitHEcFRDPYrX.mKWVAAEOYAHcU2VwR/iwq70XNAEwNXPw0hvyNSu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Галиева Ирина Александровна</text:p>
          </table:table-cell>
          <table:table-cell office:value-type="string" calcext:value-type="string">
            <text:p>0069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2007" calcext:value-type="float">
            <text:p>13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Нуруллин Рамис Зинарисович</text:p>
          </table:table-cell>
          <table:table-cell office:value-type="string" calcext:value-type="string">
            <text:p>kadetkazkei@mail.r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2013" calcext:value-type="float">
            <text:p>132013</text:p>
          </table:table-cell>
          <table:table-cell office:value-type="string" calcext:value-type="string">
            <text:p>$2y$10$lx9jUTtuHQHyaxUPgwxI3erdTMGLyL1hVAYu43HeWhXmjQwSlaFem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Багаутдинова Римма Гранитовна</text:p>
          </table:table-cell>
          <table:table-cell office:value-type="string" calcext:value-type="string">
            <text:p>0071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1" calcext:value-type="float">
            <text:p>134001</text:p>
          </table:table-cell>
          <table:table-cell office:value-type="string" calcext:value-type="string">
            <text:p>$2y$10$e8.//FV9GMz6yRtX.HKtkulRUgXyc.AUfL8cmuOfKfYuf38576NCK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Фаррахова Ландыш Салисовна</text:p>
          </table:table-cell>
          <table:table-cell office:value-type="string" calcext:value-type="string">
            <text:p>0072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2" calcext:value-type="float">
            <text:p>134002</text:p>
          </table:table-cell>
          <table:table-cell office:value-type="string" calcext:value-type="string">
            <text:p>$2y$10$ngKjyYulR.krZ3UfUyhSW.LTg7dSvybU3ye0.sPCefT7spwpSqk9G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Амерзьянова Юлия Валентиновна</text:p>
          </table:table-cell>
          <table:table-cell office:value-type="string" calcext:value-type="string">
            <text:p>0073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3" calcext:value-type="float">
            <text:p>134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Муфтиева Гульнара Абулгасовна</text:p>
          </table:table-cell>
          <table:table-cell office:value-type="string" calcext:value-type="string">
            <text:p>0074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4" calcext:value-type="float">
            <text:p>134004</text:p>
          </table:table-cell>
          <table:table-cell office:value-type="string" calcext:value-type="string">
            <text:p>$2y$10$Ic5Rdm88MuFVyQgB/g5P/e2ccusSxNubh45D1kYnZuW6kvMybNMW6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Вазетдинова Танзила Мирфайдовна</text:p>
          </table:table-cell>
          <table:table-cell office:value-type="string" calcext:value-type="string">
            <text:p>0075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5" calcext:value-type="float">
            <text:p>13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Хабирова Лейля Фарисовна</text:p>
          </table:table-cell>
          <table:table-cell office:value-type="string" calcext:value-type="string">
            <text:p>0076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6" calcext:value-type="float">
            <text:p>13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Исламова Алия Фаритовна</text:p>
          </table:table-cell>
          <table:table-cell office:value-type="string" calcext:value-type="string">
            <text:p>0077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8" calcext:value-type="float">
            <text:p>134008</text:p>
          </table:table-cell>
          <table:table-cell office:value-type="string" calcext:value-type="string">
            <text:p>$2y$10$BCeiEchiKDuvkgQh4uUFqe7gomUnXA9rtOwxNCb0cRIUstdZJTYtq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Фазлыева Лейсан Мирфаязовна</text:p>
          </table:table-cell>
          <table:table-cell office:value-type="string" calcext:value-type="string">
            <text:p>0078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09" calcext:value-type="float">
            <text:p>13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Нуртдинова Резеда Загировна</text:p>
          </table:table-cell>
          <table:table-cell office:value-type="string" calcext:value-type="string">
            <text:p>0079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10" calcext:value-type="float">
            <text:p>13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Мулланурова Кулюмсар Фирдависовна</text:p>
          </table:table-cell>
          <table:table-cell office:value-type="string" calcext:value-type="string">
            <text:p>0080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11" calcext:value-type="float">
            <text:p>13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Гайсина Лилия Фанилевна</text:p>
          </table:table-cell>
          <table:table-cell office:value-type="string" calcext:value-type="string">
            <text:p>0081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12" calcext:value-type="float">
            <text:p>13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Гиздатуллина Айсылу Ильгизовна</text:p>
          </table:table-cell>
          <table:table-cell office:value-type="string" calcext:value-type="string">
            <text:p>0082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17" calcext:value-type="float">
            <text:p>13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Саетгараева Альфира Фоатовна</text:p>
          </table:table-cell>
          <table:table-cell office:value-type="string" calcext:value-type="string">
            <text:p>0083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18" calcext:value-type="float">
            <text:p>13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Кадыйрова Залифа Ильнуровна</text:p>
          </table:table-cell>
          <table:table-cell office:value-type="string" calcext:value-type="string">
            <text:p>0084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20" calcext:value-type="float">
            <text:p>134020</text:p>
          </table:table-cell>
          <table:table-cell office:value-type="string" calcext:value-type="string">
            <text:p>$2y$10$uYS4c2ZleioI.qlSKOlfz.1pLzobBoHGa.m9XaE9GMX0uGM13.x7a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Шайхетдинова Лилия Ханифовна</text:p>
          </table:table-cell>
          <table:table-cell office:value-type="string" calcext:value-type="string">
            <text:p>0085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23" calcext:value-type="float">
            <text:p>13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Маликова Алия Хамитовна</text:p>
          </table:table-cell>
          <table:table-cell office:value-type="string" calcext:value-type="string">
            <text:p>0086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24" calcext:value-type="float">
            <text:p>134024</text:p>
          </table:table-cell>
          <table:table-cell office:value-type="string" calcext:value-type="string">
            <text:p>$2y$10$4e3V6LHV1bjsaLz44m.KDOVCPwPDVX15zWkTEcnEnWu9OQiMRU8ru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Ахмадгалиева Зульфия Виловна</text:p>
          </table:table-cell>
          <table:table-cell office:value-type="string" calcext:value-type="string">
            <text:p>0087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25" calcext:value-type="float">
            <text:p>13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Шаймухаметова Рушания Рифкатовна</text:p>
          </table:table-cell>
          <table:table-cell office:value-type="string" calcext:value-type="string">
            <text:p>0088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28" calcext:value-type="float">
            <text:p>134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Хабирова Майсара Фаисовна</text:p>
          </table:table-cell>
          <table:table-cell office:value-type="string" calcext:value-type="string">
            <text:p>0089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29" calcext:value-type="float">
            <text:p>134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Саетова Гульсина Мударисовна</text:p>
          </table:table-cell>
          <table:table-cell office:value-type="string" calcext:value-type="string">
            <text:p>0091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32" calcext:value-type="float">
            <text:p>134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Миназова Равия Замигнуровна</text:p>
          </table:table-cell>
          <table:table-cell office:value-type="string" calcext:value-type="string">
            <text:p>0092@mail.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4033" calcext:value-type="float">
            <text:p>134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Фаттахова Ольга Александровна</text:p>
          </table:table-cell>
          <table:table-cell office:value-type="string" calcext:value-type="string">
            <text:p>0093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1001" calcext:value-type="float">
            <text:p>14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Банницина Светлана Леонидовна</text:p>
          </table:table-cell>
          <table:table-cell office:value-type="string" calcext:value-type="string">
            <text:p>0094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1002" calcext:value-type="float">
            <text:p>14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Фомина Анастасия Артёмовна</text:p>
          </table:table-cell>
          <table:table-cell office:value-type="string" calcext:value-type="string">
            <text:p>0095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1003" calcext:value-type="float">
            <text:p>14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Гусева Елена Александровна</text:p>
          </table:table-cell>
          <table:table-cell office:value-type="string" calcext:value-type="string">
            <text:p>0096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1027" calcext:value-type="float">
            <text:p>141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Денежкина Ольга Владимировна</text:p>
          </table:table-cell>
          <table:table-cell office:value-type="string" calcext:value-type="string">
            <text:p>0097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05" calcext:value-type="float">
            <text:p>14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Федорова Светлана Николаевна</text:p>
          </table:table-cell>
          <table:table-cell office:value-type="string" calcext:value-type="string">
            <text:p>0098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06" calcext:value-type="float">
            <text:p>14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Абдуллина Виктория Андреевна</text:p>
          </table:table-cell>
          <table:table-cell office:value-type="string" calcext:value-type="string">
            <text:p>0099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07" calcext:value-type="float">
            <text:p>14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Кондратьева Мария Владимировна</text:p>
          </table:table-cell>
          <table:table-cell office:value-type="string" calcext:value-type="string">
            <text:p>0100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0" calcext:value-type="float">
            <text:p>14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Горланова Светлана Вячеславовна</text:p>
          </table:table-cell>
          <table:table-cell office:value-type="string" calcext:value-type="string">
            <text:p>0101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1" calcext:value-type="float">
            <text:p>14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Фатхутдинова Гульнара Ирековна</text:p>
          </table:table-cell>
          <table:table-cell office:value-type="string" calcext:value-type="string">
            <text:p>0102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2" calcext:value-type="float">
            <text:p>14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Валиуллина Адиля Хамидовна</text:p>
          </table:table-cell>
          <table:table-cell office:value-type="string" calcext:value-type="string">
            <text:p>0103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4" calcext:value-type="float">
            <text:p>14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Пашагина Ольга Алексеевна</text:p>
          </table:table-cell>
          <table:table-cell office:value-type="string" calcext:value-type="string">
            <text:p>0104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5" calcext:value-type="float">
            <text:p>14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Рузанова Марина Дмитриевна</text:p>
          </table:table-cell>
          <table:table-cell office:value-type="string" calcext:value-type="string">
            <text:p>0105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6" calcext:value-type="float">
            <text:p>14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Косова Любовь Анатольевна</text:p>
          </table:table-cell>
          <table:table-cell office:value-type="string" calcext:value-type="string">
            <text:p>0106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8" calcext:value-type="float">
            <text:p>142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Епифанова Виктория Ивановна</text:p>
          </table:table-cell>
          <table:table-cell office:value-type="string" calcext:value-type="string">
            <text:p>0107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19" calcext:value-type="float">
            <text:p>142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Сергеева Мария Семеновна</text:p>
          </table:table-cell>
          <table:table-cell office:value-type="string" calcext:value-type="string">
            <text:p>0108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22" calcext:value-type="float">
            <text:p>142022</text:p>
          </table:table-cell>
          <table:table-cell office:value-type="string" calcext:value-type="string">
            <text:p>$2y$10$0vjn61XS13/16tntrU7UC.ZCPHgKayzmWyWF0h8KAVtARYTtsxBzW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Галимова Рима Фоатовна</text:p>
          </table:table-cell>
          <table:table-cell office:value-type="string" calcext:value-type="string">
            <text:p>0109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23" calcext:value-type="float">
            <text:p>14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Галявеева Гульчечек Сагитовна</text:p>
          </table:table-cell>
          <table:table-cell office:value-type="string" calcext:value-type="string">
            <text:p>0110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2024" calcext:value-type="float">
            <text:p>142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Баязитова Эльмира Асгатовна</text:p>
          </table:table-cell>
          <table:table-cell office:value-type="string" calcext:value-type="string">
            <text:p>0111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008" calcext:value-type="float">
            <text:p>14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Нуретдинова Гульсиня Наиловна</text:p>
          </table:table-cell>
          <table:table-cell office:value-type="string" calcext:value-type="string">
            <text:p>0112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009" calcext:value-type="float">
            <text:p>14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Валеева Илькай Салимовна</text:p>
          </table:table-cell>
          <table:table-cell office:value-type="string" calcext:value-type="string">
            <text:p>0113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013" calcext:value-type="float">
            <text:p>14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Баранова Ирина Анатольевна</text:p>
          </table:table-cell>
          <table:table-cell office:value-type="string" calcext:value-type="string">
            <text:p>0114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017" calcext:value-type="float">
            <text:p>14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Сунаева Ляйсан Ханифовна</text:p>
          </table:table-cell>
          <table:table-cell office:value-type="string" calcext:value-type="string">
            <text:p>0115@mail.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021" calcext:value-type="float">
            <text:p>14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Искандарова Альфинур Дамировна</text:p>
          </table:table-cell>
          <table:table-cell office:value-type="string" calcext:value-type="string">
            <text:p>0116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0201" calcext:value-type="float">
            <text:p>1502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Калмыкова Людмила Александровна</text:p>
          </table:table-cell>
          <table:table-cell office:value-type="string" calcext:value-type="string">
            <text:p>tahtala.sch@mail.ru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03" calcext:value-type="float">
            <text:p>152003</text:p>
          </table:table-cell>
          <table:table-cell office:value-type="string" calcext:value-type="string">
            <text:p>$2y$10$UEZ3QEDHGFAbZooaJ5FV3O2o75fdbQqH656LY6GM3pujdplUFGwku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Зиганшина Рамиля Габбасовна</text:p>
          </table:table-cell>
          <table:table-cell office:value-type="string" calcext:value-type="string">
            <text:p>0118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06" calcext:value-type="float">
            <text:p>152006</text:p>
          </table:table-cell>
          <table:table-cell office:value-type="string" calcext:value-type="string">
            <text:p>$2y$10$NdpaZPTQtdd13xMmgfZ/d.1XFTuC4QrrkdgoQd/5qlZjc05mGmln.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Букарцева Светлана Алексеевна</text:p>
          </table:table-cell>
          <table:table-cell office:value-type="string" calcext:value-type="string">
            <text:p>0119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13" calcext:value-type="float">
            <text:p>15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Закирова Руфия Миннефасыховна</text:p>
          </table:table-cell>
          <table:table-cell office:value-type="string" calcext:value-type="string">
            <text:p>0120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14" calcext:value-type="float">
            <text:p>15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Ерусланова Наталья Георгиевна</text:p>
          </table:table-cell>
          <table:table-cell office:value-type="string" calcext:value-type="string">
            <text:p>0121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15" calcext:value-type="float">
            <text:p>15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Шафигуллина Рузиля Мустакимовна</text:p>
          </table:table-cell>
          <table:table-cell office:value-type="string" calcext:value-type="string">
            <text:p>0122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16" calcext:value-type="float">
            <text:p>15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Севрикеева Любовь Анатольевна</text:p>
          </table:table-cell>
          <table:table-cell office:value-type="string" calcext:value-type="string">
            <text:p>0123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18" calcext:value-type="float">
            <text:p>152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Рахматуллина Гюзелия Исламовна</text:p>
          </table:table-cell>
          <table:table-cell office:value-type="string" calcext:value-type="string">
            <text:p>0124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19" calcext:value-type="float">
            <text:p>152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Якимова Людмила Федоровна</text:p>
          </table:table-cell>
          <table:table-cell office:value-type="string" calcext:value-type="string">
            <text:p>0125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2022" calcext:value-type="float">
            <text:p>15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Идиятуллина Гузелия Миншакировна</text:p>
          </table:table-cell>
          <table:table-cell office:value-type="string" calcext:value-type="string">
            <text:p>0127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02" calcext:value-type="float">
            <text:p>154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Сагирова Зямиля Зямильевна</text:p>
          </table:table-cell>
          <table:table-cell office:value-type="string" calcext:value-type="string">
            <text:p>0128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05" calcext:value-type="float">
            <text:p>154005</text:p>
          </table:table-cell>
          <table:table-cell office:value-type="string" calcext:value-type="string">
            <text:p>$2y$10$hlxKMINUQwgGwyBBOIH/QuqUE8L8BwWYwrs4HwnycPlgVRb3ukQjW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Закирова Галина Алексеевна</text:p>
          </table:table-cell>
          <table:table-cell office:value-type="string" calcext:value-type="string">
            <text:p>0129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09" calcext:value-type="float">
            <text:p>15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Галлямова Гульуся Надировна</text:p>
          </table:table-cell>
          <table:table-cell office:value-type="string" calcext:value-type="string">
            <text:p>0130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10" calcext:value-type="float">
            <text:p>15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Гизатуллина Лейля Асхатовна</text:p>
          </table:table-cell>
          <table:table-cell office:value-type="string" calcext:value-type="string">
            <text:p>0619000094@edu.tatar.ru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17" calcext:value-type="float">
            <text:p>154017</text:p>
          </table:table-cell>
          <table:table-cell office:value-type="string" calcext:value-type="string">
            <text:p>$2y$10$MHfUM1gA8WDB8Hi.sH6QkeVg//rYgXBbdO.HK9nY3MRPDZK24V8oS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Губайдуллина Гузелия Рифхатовна</text:p>
          </table:table-cell>
          <table:table-cell office:value-type="string" calcext:value-type="string">
            <text:p>0132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20" calcext:value-type="float">
            <text:p>15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Давлетшина Гульназ Нургалеевна</text:p>
          </table:table-cell>
          <table:table-cell office:value-type="string" calcext:value-type="string">
            <text:p>0133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23" calcext:value-type="float">
            <text:p>15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Зиннатуллина Чечкя Саетовна</text:p>
          </table:table-cell>
          <table:table-cell office:value-type="string" calcext:value-type="string">
            <text:p>0134@mail.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4024" calcext:value-type="float">
            <text:p>15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Марданшина Лейсан Тагирзяновна</text:p>
          </table:table-cell>
          <table:table-cell office:value-type="string" calcext:value-type="string">
            <text:p>sweetdreams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1" calcext:value-type="float">
            <text:p>161001</text:p>
          </table:table-cell>
          <table:table-cell office:value-type="string" calcext:value-type="string">
            <text:p>$2y$10$JxlaXzBLglOayns1flZiTu8y4C7nPhLjhUyXC4mzVTNAlQDUGBhOy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Гамирова Гульнур Салимзяновна</text:p>
          </table:table-cell>
          <table:table-cell office:value-type="string" calcext:value-type="string">
            <text:p>gulnur.gamirova.94@bk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2" calcext:value-type="float">
            <text:p>161002</text:p>
          </table:table-cell>
          <table:table-cell office:value-type="string" calcext:value-type="string">
            <text:p>$2y$10$1g06cYoZGmQxmO64SfmvFu0SJIiXFCmszuCnAzmPH6blxP0.2LMSO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Мануйлов Максим Александрович</text:p>
          </table:table-cell>
          <table:table-cell office:value-type="string" calcext:value-type="string">
            <text:p>manujlow.m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3" calcext:value-type="float">
            <text:p>161003</text:p>
          </table:table-cell>
          <table:table-cell office:value-type="string" calcext:value-type="string">
            <text:p>$2y$10$mERQQpV0ScEf3q.JNg5.qebEZKRspn3YEUK5FLttNfwRCgw0piA6u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Вавилова Динара Вальмировна</text:p>
          </table:table-cell>
          <table:table-cell office:value-type="string" calcext:value-type="string">
            <text:p>0138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4" calcext:value-type="float">
            <text:p>161004</text:p>
          </table:table-cell>
          <table:table-cell office:value-type="string" calcext:value-type="string">
            <text:p>$2y$10$xuKSjo1UmUQGYhJ7GWR2Z.oSvgAATCiRRucmGqwBRiqMZGoDfDB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Надина Екатерина Николаевна</text:p>
          </table:table-cell>
          <table:table-cell office:value-type="string" calcext:value-type="string">
            <text:p>0139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5" calcext:value-type="float">
            <text:p>161005</text:p>
          </table:table-cell>
          <table:table-cell office:value-type="string" calcext:value-type="string">
            <text:p>$2y$10$CtSC003v6HzUuSRaseZUyun5eZJlVpiFQx2pXgCAY876/9KPW3AXC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Хасаншина Лилия Раисовна</text:p>
          </table:table-cell>
          <table:table-cell office:value-type="string" calcext:value-type="string">
            <text:p>0706001844@edu.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6" calcext:value-type="float">
            <text:p>161006</text:p>
          </table:table-cell>
          <table:table-cell office:value-type="string" calcext:value-type="string">
            <text:p>$2y$10$iU6h4Q6/KM5UOjOzHGVcpO.RVubXkzMc4V1jjMl3swbOTGXta2qEi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Грибашкина Светлана Николаевна</text:p>
          </table:table-cell>
          <table:table-cell office:value-type="string" calcext:value-type="string">
            <text:p>grib8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7" calcext:value-type="float">
            <text:p>161007</text:p>
          </table:table-cell>
          <table:table-cell office:value-type="string" calcext:value-type="string">
            <text:p>$2y$10$2TSkcel3VFB8vI0EBqMDVOLBbUXy96KIvJCRST4BzUT/niCr1HUm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Александрова Наталья Владимировна</text:p>
          </table:table-cell>
          <table:table-cell office:value-type="string" calcext:value-type="string">
            <text:p>Ursala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08" calcext:value-type="float">
            <text:p>161008</text:p>
          </table:table-cell>
          <table:table-cell office:value-type="string" calcext:value-type="string">
            <text:p>$2y$10$.9ViacLBSYX6raAEBqNUfOjWGf/2VxXd/U7FCB4gUu7NCw.OabuOO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Матмурадова Эльвира Ильясовна</text:p>
          </table:table-cell>
          <table:table-cell office:value-type="string" calcext:value-type="string">
            <text:p><text:a xlink:href="mailto:161010@mail.m" xlink:type="simple">161010@mail.m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0" calcext:value-type="float">
            <text:p>161010</text:p>
          </table:table-cell>
          <table:table-cell office:value-type="string" calcext:value-type="string">
            <text:p>$2y$10$PQDtDf8UJ6ZNR4Fsd74jLOpFW0sWQ0cSPXAdsoA5lEchQsr9Pk0vm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Канифова Анна Николаевна</text:p>
          </table:table-cell>
          <table:table-cell office:value-type="string" calcext:value-type="string">
            <text:p>kanifova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1" calcext:value-type="float">
            <text:p>161011</text:p>
          </table:table-cell>
          <table:table-cell office:value-type="string" calcext:value-type="string">
            <text:p>$2y$10$Xr/pjaRI6WuI8swlDNSrverwjfjZFVDEHlDbIF3jTKhui7OXeeHh6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Шакирзянова Рамзия Минвалиевна</text:p>
          </table:table-cell>
          <table:table-cell office:value-type="string" calcext:value-type="string">
            <text:p>mila83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2" calcext:value-type="float">
            <text:p>161012</text:p>
          </table:table-cell>
          <table:table-cell office:value-type="string" calcext:value-type="string">
            <text:p>$2y$10$nKXy35b4cL2Klk2OC4tHvO1xHRSBKx9IKxCG89KDEg/PnNadRw2jW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Мухаметзянова Гузель Дамировна</text:p>
          </table:table-cell>
          <table:table-cell office:value-type="string" calcext:value-type="string">
            <text:p>Shkola-13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3" calcext:value-type="float">
            <text:p>161013</text:p>
          </table:table-cell>
          <table:table-cell office:value-type="string" calcext:value-type="string">
            <text:p>$2y$10$YI8ufjH.UqXp0zr9b11MMOHD5e9gsbLXCd624Y4COY55Jod/tMjZS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Антонова Дарина Сергеевна</text:p>
          </table:table-cell>
          <table:table-cell office:value-type="string" calcext:value-type="string">
            <text:p>0147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5" calcext:value-type="float">
            <text:p>161015</text:p>
          </table:table-cell>
          <table:table-cell office:value-type="string" calcext:value-type="string">
            <text:p>$2y$10$e616egvfaKKtz8gHCwFGoOFxIBtPNcQaIj/bRjqSvWLG3B75LAJaO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Азангулова Майя Пулатовна</text:p>
          </table:table-cell>
          <table:table-cell office:value-type="string" calcext:value-type="string">
            <text:p>0148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6" calcext:value-type="float">
            <text:p>161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Ахметзянова Альбина Ильдусовна</text:p>
          </table:table-cell>
          <table:table-cell office:value-type="string" calcext:value-type="string">
            <text:p>0149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17" calcext:value-type="float">
            <text:p>161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Митянина Елена Владимировна МБОУ "СОШ №20"</text:p>
          </table:table-cell>
          <table:table-cell office:value-type="string" calcext:value-type="string">
            <text:p>mityanina.el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0" calcext:value-type="float">
            <text:p>161020</text:p>
          </table:table-cell>
          <table:table-cell office:value-type="string" calcext:value-type="string">
            <text:p>$2y$10$NWMcs4JbPp0KkR4p03lnUO0hNYZlOIHDB9MIS4iaYkmBrxVpBbNEG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Валеев Тимур Викторович</text:p>
          </table:table-cell>
          <table:table-cell office:value-type="string" calcext:value-type="string">
            <text:p>timurv89@gmail.co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1" calcext:value-type="float">
            <text:p>161021</text:p>
          </table:table-cell>
          <table:table-cell office:value-type="string" calcext:value-type="string">
            <text:p>$2y$10$qca47yELJ78YQVp1iK051.876Acxyz.49Ye7e5yHAzK/mss/JnJ3O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Исмагилова Ильгиза Вагизовна</text:p>
          </table:table-cell>
          <table:table-cell office:value-type="string" calcext:value-type="string">
            <text:p>0152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2" calcext:value-type="float">
            <text:p>161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Михайлова Ирина Николаевна</text:p>
          </table:table-cell>
          <table:table-cell office:value-type="string" calcext:value-type="string">
            <text:p>meneger_23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3" calcext:value-type="float">
            <text:p>161023</text:p>
          </table:table-cell>
          <table:table-cell office:value-type="string" calcext:value-type="string">
            <text:p>$2y$10$WWaocHbChf9p17ETB6ZSH.oHvMc8mACCbPyueLi8klCzJ6XpuMUwK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Богданова Виктория Валерьевна</text:p>
          </table:table-cell>
          <table:table-cell office:value-type="string" calcext:value-type="string">
            <text:p>vvbogdanova.teacher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4" calcext:value-type="float">
            <text:p>161024</text:p>
          </table:table-cell>
          <table:table-cell office:value-type="string" calcext:value-type="string">
            <text:p>$2y$10$PRP60IEe.ZRYECIxbcSl5uWhoEA/MUArSDFKX9WgHhTCZLqOIMdEW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Галеев Фанис Альбертович</text:p>
          </table:table-cell>
          <table:table-cell office:value-type="string" calcext:value-type="string">
            <text:p>0155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5" calcext:value-type="float">
            <text:p>161025</text:p>
          </table:table-cell>
          <table:table-cell office:value-type="string" calcext:value-type="string">
            <text:p>$2y$10$0hxvbwPZudxI8/eh0ThSg.16RqbcvhAJVWKqa1w88U1MYpojMfjn.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Солдатова Светлана Егоровна</text:p>
          </table:table-cell>
          <table:table-cell office:value-type="string" calcext:value-type="string">
            <text:p>soldatova_s_e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6" calcext:value-type="float">
            <text:p>161026</text:p>
          </table:table-cell>
          <table:table-cell office:value-type="string" calcext:value-type="string">
            <text:p>$2y$10$mMEce9Dy5ngu5kS0eIXhR.mkK6oaUPqmGzVPqPLK6ORvBPXOeJVfe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Мустафина Алия Нурисламовна</text:p>
          </table:table-cell>
          <table:table-cell office:value-type="string" calcext:value-type="string">
            <text:p>0157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7" calcext:value-type="float">
            <text:p>161027</text:p>
          </table:table-cell>
          <table:table-cell office:value-type="string" calcext:value-type="string">
            <text:p>$2y$10$fCjChc8jktI.iSit95SgZOhczzC5dwmSf1meFQ1hHBBMJoabOYGXS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Потемкина Яна Сергеевна</text:p>
          </table:table-cell>
          <table:table-cell office:value-type="string" calcext:value-type="string">
            <text:p>0158@mail.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29" calcext:value-type="float">
            <text:p>161029</text:p>
          </table:table-cell>
          <table:table-cell office:value-type="string" calcext:value-type="string">
            <text:p>$2y$10$yFtpNhx.xxJH.xU6InHRSuSF9./5HfDi9LH4GiWRPuDq//uIpaEEK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Зарипова Гулия Маратовна</text:p>
          </table:table-cell>
          <table:table-cell office:value-type="string" calcext:value-type="string">
            <text:p>gul1azaripova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30" calcext:value-type="float">
            <text:p>161030</text:p>
          </table:table-cell>
          <table:table-cell office:value-type="string" calcext:value-type="string">
            <text:p>$2y$10$pc9smuGIjXh9znUi/JvTDOO20bha5hi2S7pZgyuOKNNxjXCD3pt8K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Набиуллина Зимфира Равиловна</text:p>
          </table:table-cell>
          <table:table-cell office:value-type="string" calcext:value-type="string">
            <text:p>cool.zimfiranabiullina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31" calcext:value-type="float">
            <text:p>161031</text:p>
          </table:table-cell>
          <table:table-cell office:value-type="string" calcext:value-type="string">
            <text:p>$2y$10$Zui6kltnqxdN81aLhiadAutaZ.eGgA2zKX3S0PhkbtHAcmuqFZyre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Вильданова Лейсан Марсовна</text:p>
          </table:table-cell>
          <table:table-cell office:value-type="string" calcext:value-type="string">
            <text:p>0161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1032" calcext:value-type="float">
            <text:p>161032</text:p>
          </table:table-cell>
          <table:table-cell office:value-type="string" calcext:value-type="string">
            <text:p>$2y$10$3bCVpsPg4.nEUoljH4aj0.QP9UaubznhHPw3e8qrl5ZRqbfK5.QSm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Гильмутдинова Зульфия Мусаяфовна </text:p>
          </table:table-cell>
          <table:table-cell office:value-type="string" calcext:value-type="string">
            <text:p>0162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40" calcext:value-type="float">
            <text:p>16204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Захарова Светлана Александровна</text:p>
          </table:table-cell>
          <table:table-cell office:value-type="string" calcext:value-type="string">
            <text:p>Adelja-85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43" calcext:value-type="float">
            <text:p>162043</text:p>
          </table:table-cell>
          <table:table-cell office:value-type="string" calcext:value-type="string">
            <text:p>$2y$10$xW7XYiOO7558fWEN7H9YD.9BRIbZ9Mu5iaIietm2cmIEKr7dNPFvy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Смирнова Лилия Ильясовна</text:p>
          </table:table-cell>
          <table:table-cell office:value-type="string" calcext:value-type="string">
            <text:p>N.nikolsk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49" calcext:value-type="float">
            <text:p>162049</text:p>
          </table:table-cell>
          <table:table-cell office:value-type="string" calcext:value-type="string">
            <text:p>$2y$10$Ly4DVtNHDcBOmjOBeNN.T.hiQugi79AG.8EohbseSdeWuqntFbFzm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Быстренина Ильмира Сулеймановна</text:p>
          </table:table-cell>
          <table:table-cell office:value-type="string" calcext:value-type="string">
            <text:p>ilmira.bistrenina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0" calcext:value-type="float">
            <text:p>162050</text:p>
          </table:table-cell>
          <table:table-cell office:value-type="string" calcext:value-type="string">
            <text:p>$2y$10$5/vwfaPjzvGAfR5a4Ey74uCh6xXr5InNjTemRtbvHqt5gt5OuijoW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Фролова Екатерина Ивановна</text:p>
          </table:table-cell>
          <table:table-cell office:value-type="string" calcext:value-type="string">
            <text:p>0166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1" calcext:value-type="float">
            <text:p>162051</text:p>
          </table:table-cell>
          <table:table-cell office:value-type="string" calcext:value-type="string">
            <text:p>$2y$10$gWfdKFBunvtME2Jlu1Iw6eukMWkw3KacPdWe1HGrWPIR9T6KGkvXC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Лепилова Галия Галиевна</text:p>
          </table:table-cell>
          <table:table-cell office:value-type="string" calcext:value-type="string">
            <text:p>garlepgala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2" calcext:value-type="float">
            <text:p>162052</text:p>
          </table:table-cell>
          <table:table-cell office:value-type="string" calcext:value-type="string">
            <text:p>$2y$10$y0GH3KsNeCwDc6S3gxkuRuGbmh28kMPg4bjrTXMP41myvG1cDC4J.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Галиаскарова Гульназ Асгатовна</text:p>
          </table:table-cell>
          <table:table-cell office:value-type="string" calcext:value-type="string">
            <text:p>Sirenkino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3" calcext:value-type="float">
            <text:p>162053</text:p>
          </table:table-cell>
          <table:table-cell office:value-type="string" calcext:value-type="string">
            <text:p>$2y$10$yvYplCkbuZg9mAmzD2Ff4OTpak/V6ujVNP/TVQTBNziPLtSiUoO8.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Шарипова Эльза Сабаховна</text:p>
          </table:table-cell>
          <table:table-cell office:value-type="string" calcext:value-type="string">
            <text:p>St.minnibaevo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4" calcext:value-type="float">
            <text:p>162054</text:p>
          </table:table-cell>
          <table:table-cell office:value-type="string" calcext:value-type="string">
            <text:p>$2y$10$gKOpu4VrCMxBFmVzKQWztOr3QVLsYxJ6R.KaC46W6Kf9pdv2ipNXG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Смирнова Светлана Владимировна</text:p>
          </table:table-cell>
          <table:table-cell office:value-type="string" calcext:value-type="string">
            <text:p>0170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5" calcext:value-type="float">
            <text:p>162055</text:p>
          </table:table-cell>
          <table:table-cell office:value-type="string" calcext:value-type="string">
            <text:p>$2y$10$I84Brd5Rld999hGidXp9tuM9W5P9SntyjvqVtuAk92m.nSc5oRqaC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Ильдукова Василина Владимировна</text:p>
          </table:table-cell>
          <table:table-cell office:value-type="string" calcext:value-type="string">
            <text:p>st.surkino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56" calcext:value-type="float">
            <text:p>162056</text:p>
          </table:table-cell>
          <table:table-cell office:value-type="string" calcext:value-type="string">
            <text:p>$2y$10$MyYIomUn0WhWWvVDaWRqnun2GLG5n03qMGKheHUtXjTtqYCI5wb6a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Гришина Любовь Павловна</text:p>
          </table:table-cell>
          <table:table-cell office:value-type="string" calcext:value-type="string">
            <text:p>Yamashinskaya.Alm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60" calcext:value-type="float">
            <text:p>162060</text:p>
          </table:table-cell>
          <table:table-cell office:value-type="string" calcext:value-type="string">
            <text:p>$2y$10$/IZEKpT9mcP9HZuJfigVxejkl66Br/t5WSDB29DcAQRc6kAkUQosK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Осипова Людмила Анатольевна</text:p>
          </table:table-cell>
          <table:table-cell office:value-type="string" calcext:value-type="string">
            <text:p>mila_osipova_87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61" calcext:value-type="float">
            <text:p>162061</text:p>
          </table:table-cell>
          <table:table-cell office:value-type="string" calcext:value-type="string">
            <text:p>$2y$10$NykshfhMFkTB464wsw6tmOZJVI.vvMzTtEk.SJ9byTOPqggydekpy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Кожукова Любовь Алексеевна</text:p>
          </table:table-cell>
          <table:table-cell office:value-type="string" calcext:value-type="string">
            <text:p>Kozhukova2015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73" calcext:value-type="float">
            <text:p>162073</text:p>
          </table:table-cell>
          <table:table-cell office:value-type="string" calcext:value-type="string">
            <text:p>$2y$10$oGjBCV2UCY02uBJ9dwdO1.2fKKQRKdRWBbnDVGGdGf/oHDJv2Rwtm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Айкина Елена Владимировна</text:p>
          </table:table-cell>
          <table:table-cell office:value-type="string" calcext:value-type="string">
            <text:p>0769000025@edu.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2078" calcext:value-type="float">
            <text:p>162078</text:p>
          </table:table-cell>
          <table:table-cell office:value-type="string" calcext:value-type="string">
            <text:p>$2y$10$GF.uvNetDDlkYeG3vm8muegmtay8X.cHsxW/x3JTG90L6LNrPu9oW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Хафизова Алия Котдусовна</text:p>
          </table:table-cell>
          <table:table-cell office:value-type="string" calcext:value-type="string">
            <text:p>Aliaxaf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3028" calcext:value-type="float">
            <text:p>163028</text:p>
          </table:table-cell>
          <table:table-cell office:value-type="string" calcext:value-type="string">
            <text:p>$2y$10$jLsqktAMNzFMc08A9g4iJeTJhIDR7f7fK3MpFSZLGzUmMjIBYSAFy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Нургалиева Лилия Рамилевна</text:p>
          </table:table-cell>
          <table:table-cell office:value-type="string" calcext:value-type="string">
            <text:p>abdulova.gulnara.92@gmail.co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05" calcext:value-type="float">
            <text:p>164005</text:p>
          </table:table-cell>
          <table:table-cell office:value-type="string" calcext:value-type="string">
            <text:p>$2y$10$/s.yS3H/MGWqfAQQ5Yyw0O4JFGc0mHgYRjiP7.UFIhfp1yaCjixoS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Архиреева Айгуль Маратовна</text:p>
          </table:table-cell>
          <table:table-cell office:value-type="string" calcext:value-type="string">
            <text:p>arhireeva2014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33" calcext:value-type="float">
            <text:p>164033</text:p>
          </table:table-cell>
          <table:table-cell office:value-type="string" calcext:value-type="string">
            <text:p>$2y$10$xfYsp0g3hfrwflPVSOQNAeE2BDEw1sqyTi0ZrBecQeIcELr8sFpJu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Сафина Лейсан Нуримановна</text:p>
          </table:table-cell>
          <table:table-cell office:value-type="string" calcext:value-type="string">
            <text:p>0179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38" calcext:value-type="float">
            <text:p>16403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Ахметшина Светлана</text:p>
          </table:table-cell>
          <table:table-cell office:value-type="string" calcext:value-type="string">
            <text:p>Ilhat.Fattahov@tatar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39" calcext:value-type="float">
            <text:p>164039</text:p>
          </table:table-cell>
          <table:table-cell office:value-type="string" calcext:value-type="string">
            <text:p>$2y$10$7Re43tWUeSfnFwi3gauQ9uSSkQBt.77TWTwE0Dv9ZQSlJDKfgs8kS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Султанова Айгуль Замиловна</text:p>
          </table:table-cell>
          <table:table-cell office:value-type="string" calcext:value-type="string">
            <text:p>Sultanova.aigul2014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41" calcext:value-type="float">
            <text:p>164041</text:p>
          </table:table-cell>
          <table:table-cell office:value-type="string" calcext:value-type="string">
            <text:p>$2y$10$zr.24nL0RI3nbbjr73dgG./XzGsaCdiOjuMwBAxVkP4Q8Y4Aud2Ua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Исмагилова Наиля Гамировна</text:p>
          </table:table-cell>
          <table:table-cell office:value-type="string" calcext:value-type="string">
            <text:p>inailya@bk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44" calcext:value-type="float">
            <text:p>164044</text:p>
          </table:table-cell>
          <table:table-cell office:value-type="string" calcext:value-type="string">
            <text:p>$2y$10$lQo2SXHauuhOLxUpFt0ycuhgAldPrVmzL0Yx3vuoSrMOujERmHAuC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Ахметзянова Галия Антоновна</text:p>
          </table:table-cell>
          <table:table-cell office:value-type="string" calcext:value-type="string">
            <text:p>0183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45" calcext:value-type="float">
            <text:p>16404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Галимова Рушания Ильясовна</text:p>
          </table:table-cell>
          <table:table-cell office:value-type="string" calcext:value-type="string">
            <text:p>0184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46" calcext:value-type="float">
            <text:p>164046</text:p>
          </table:table-cell>
          <table:table-cell office:value-type="string" calcext:value-type="string">
            <text:p>$2y$10$uvuDXW/Itv/0rlzTLmRvneS0mk57rYoxjskRin0.I7zAlCFVaqJxi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Каримова Рамиля Рамилевна</text:p>
          </table:table-cell>
          <table:table-cell office:value-type="string" calcext:value-type="string">
            <text:p>ramka91@yandex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47" calcext:value-type="float">
            <text:p>164047</text:p>
          </table:table-cell>
          <table:table-cell office:value-type="string" calcext:value-type="string">
            <text:p>$2y$10$QvFN2U9DsBWmR6xN4e1lKOsvzpS/ORrsZ2W8Ynukg0n5lSxZCFy3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Султанова Гузель Фаизовна</text:p>
          </table:table-cell>
          <table:table-cell office:value-type="string" calcext:value-type="string">
            <text:p>guzel.sagdatova@bk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48" calcext:value-type="float">
            <text:p>164048</text:p>
          </table:table-cell>
          <table:table-cell office:value-type="string" calcext:value-type="string">
            <text:p>$2y$10$Qga4JIbqsTOvkafhpMNHEOQnvjTDMvNDC9Q9c3vwz6I/lySros1tC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Гатауллина Гульнара Анваровна</text:p>
          </table:table-cell>
          <table:table-cell office:value-type="string" calcext:value-type="string">
            <text:p>anvarovna15091970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57" calcext:value-type="float">
            <text:p>164057</text:p>
          </table:table-cell>
          <table:table-cell office:value-type="string" calcext:value-type="string">
            <text:p>$2y$10$5jb4dusZYEola5g4AUtMyua6tDLYytkoMSHwTbJT5FqVlt7tdTjKW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Минегалиева Алсу Минехамитовна</text:p>
          </table:table-cell>
          <table:table-cell office:value-type="string" calcext:value-type="string">
            <text:p>alsu150484@gmail.co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4072" calcext:value-type="float">
            <text:p>164072</text:p>
          </table:table-cell>
          <table:table-cell office:value-type="string" calcext:value-type="string">
            <text:p>$2y$10$ZYl36DUo7mhK6fpbyK/Iu.BZGug3a1xDb5BoW/3WSl7UlTcR.2scK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Парфирьева Регина Радиковна</text:p>
          </table:table-cell>
          <table:table-cell office:value-type="string" calcext:value-type="string">
            <text:p>sai.ra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5001" calcext:value-type="float">
            <text:p>165001</text:p>
          </table:table-cell>
          <table:table-cell office:value-type="string" calcext:value-type="string">
            <text:p>$2y$10$mxs4AFIXOgj4yl0tOEveaO150vqDrNXTzAr/OSfZKoaNDM9YL8npu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Мубаракшина Валентина Ивановна</text:p>
          </table:table-cell>
          <table:table-cell office:value-type="string" calcext:value-type="string">
            <text:p>mubarakshina.v@bk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5002" calcext:value-type="float">
            <text:p>165002</text:p>
          </table:table-cell>
          <table:table-cell office:value-type="string" calcext:value-type="string">
            <text:p>$2y$10$hOxwD8KWHdzWxya7I3YRtOtrkAbcskhPLHIFmCqh4bz/RGHaL3.Wq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Дударева Татьяна Викторовна</text:p>
          </table:table-cell>
          <table:table-cell office:value-type="string" calcext:value-type="string">
            <text:p>0191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5003" calcext:value-type="float">
            <text:p>165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Мукимова Фарида Фаридовна</text:p>
          </table:table-cell>
          <table:table-cell office:value-type="string" calcext:value-type="string">
            <text:p>0192@mail.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5004" calcext:value-type="float">
            <text:p>165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Шарафуллина Гузель Фаритовна</text:p>
          </table:table-cell>
          <table:table-cell office:value-type="string" calcext:value-type="string">
            <text:p>0193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1002" calcext:value-type="float">
            <text:p>17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Валиуллина Надежда Николаевна</text:p>
          </table:table-cell>
          <table:table-cell office:value-type="string" calcext:value-type="string">
            <text:p>0194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001" calcext:value-type="float">
            <text:p>17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Прокофьева Алена Дмитриевна</text:p>
          </table:table-cell>
          <table:table-cell office:value-type="string" calcext:value-type="string">
            <text:p>0195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004" calcext:value-type="float">
            <text:p>17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Сабирзанова Динара Ильсуровна</text:p>
          </table:table-cell>
          <table:table-cell office:value-type="string" calcext:value-type="string">
            <text:p>0196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008" calcext:value-type="float">
            <text:p>172008</text:p>
          </table:table-cell>
          <table:table-cell office:value-type="string" calcext:value-type="string">
            <text:p>$2y$10$DF47Vv5fDRaFqUoD8RLngOla2Uf.m.bbCg5z9yWOXrmqHHDw3ivrW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Сиразова Альфия Вагизовна</text:p>
          </table:table-cell>
          <table:table-cell office:value-type="string" calcext:value-type="string">
            <text:p>0197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011" calcext:value-type="float">
            <text:p>17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Хураськина Ирина Борисовна</text:p>
          </table:table-cell>
          <table:table-cell office:value-type="string" calcext:value-type="string">
            <text:p>0198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014" calcext:value-type="float">
            <text:p>17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Галаутдинова <text:s/>Лейсан Раифовна</text:p>
          </table:table-cell>
          <table:table-cell office:value-type="string" calcext:value-type="string">
            <text:p>0199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022" calcext:value-type="float">
            <text:p>172022</text:p>
          </table:table-cell>
          <table:table-cell office:value-type="string" calcext:value-type="string">
            <text:p>$2y$10$fa.Jwu6vEqRS1ieAWahpN.U1aPbcolNekHFWu6hAiLXmemTxbmP8C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Мухаметзянова Алия Масгутовна</text:p>
          </table:table-cell>
          <table:table-cell office:value-type="string" calcext:value-type="string">
            <text:p>myhalmas@mail.ru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03" calcext:value-type="float">
            <text:p>174003</text:p>
          </table:table-cell>
          <table:table-cell office:value-type="string" calcext:value-type="string">
            <text:p>$2y$10$Y0G/3FNDz3ku6SH0ycxUX.HgugFEg4jla4Fvm3RRdkQjDPanwYRi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Хабибуллина Лилия Фаритовна</text:p>
          </table:table-cell>
          <table:table-cell office:value-type="string" calcext:value-type="string">
            <text:p>0201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05" calcext:value-type="float">
            <text:p>17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Хуснуллина Алсу Рашитовна</text:p>
          </table:table-cell>
          <table:table-cell office:value-type="string" calcext:value-type="string">
            <text:p>0202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06" calcext:value-type="float">
            <text:p>17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Вагапова Гулина Мунировна</text:p>
          </table:table-cell>
          <table:table-cell office:value-type="string" calcext:value-type="string">
            <text:p>0203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09" calcext:value-type="float">
            <text:p>17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Салахова Гулина Фаритовна</text:p>
          </table:table-cell>
          <table:table-cell office:value-type="string" calcext:value-type="string">
            <text:p>0204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12" calcext:value-type="float">
            <text:p>174012</text:p>
          </table:table-cell>
          <table:table-cell office:value-type="string" calcext:value-type="string">
            <text:p>$2y$10$XyMpjcNhID3zpyi818mKteTiFfPvsWlsmPtPryXOm.37LUUozAm5C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Мингазова Рамиля Рашитовна</text:p>
          </table:table-cell>
          <table:table-cell office:value-type="string" calcext:value-type="string">
            <text:p>0205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13" calcext:value-type="float">
            <text:p>17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Ибрагимова Сирина Салимулловна</text:p>
          </table:table-cell>
          <table:table-cell office:value-type="string" calcext:value-type="string">
            <text:p>0206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15" calcext:value-type="float">
            <text:p>17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Мухаметгалиева Алсу Рифатовна</text:p>
          </table:table-cell>
          <table:table-cell office:value-type="string" calcext:value-type="string">
            <text:p>0207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19" calcext:value-type="float">
            <text:p>17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Залялиева Лилия Ришатовна</text:p>
          </table:table-cell>
          <table:table-cell office:value-type="string" calcext:value-type="string">
            <text:p>0208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20" calcext:value-type="float">
            <text:p>17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Гайнутдинова Алсу Фагимовна</text:p>
          </table:table-cell>
          <table:table-cell office:value-type="string" calcext:value-type="string">
            <text:p>0209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23" calcext:value-type="float">
            <text:p>17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Хайруллина Лейсан Назимовна</text:p>
          </table:table-cell>
          <table:table-cell office:value-type="string" calcext:value-type="string">
            <text:p>0210@mail.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24" calcext:value-type="float">
            <text:p>17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Хоженцева Светлана Фидаилевна</text:p>
          </table:table-cell>
          <table:table-cell office:value-type="string" calcext:value-type="string">
            <text:p>0211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1" calcext:value-type="float">
            <text:p>18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Саляхова Альбина Абдуловна</text:p>
          </table:table-cell>
          <table:table-cell office:value-type="string" calcext:value-type="string">
            <text:p>s2.ars@tatar.ru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2" calcext:value-type="float">
            <text:p>181002</text:p>
          </table:table-cell>
          <table:table-cell office:value-type="string" calcext:value-type="string">
            <text:p>$2y$10$SODaRrJJcfvTQvzbJPGNEORFSZERpUxo/FzuppKRtrubPVcp5Vlre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Гарапшина Ляйсан Илгизовна</text:p>
          </table:table-cell>
          <table:table-cell office:value-type="string" calcext:value-type="string">
            <text:p>garapshina79@mail.ru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3" calcext:value-type="float">
            <text:p>181003</text:p>
          </table:table-cell>
          <table:table-cell office:value-type="string" calcext:value-type="string">
            <text:p>$2y$10$p/ZEpHkWa4cRwAkKNsL4AOBwy3jHpsepSYr5cnWyedDx.ejzShWi.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Гилязова Алия Фанавилевна</text:p>
          </table:table-cell>
          <table:table-cell office:value-type="string" calcext:value-type="string">
            <text:p>0214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4" calcext:value-type="float">
            <text:p>18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Исмагилов Ирек Радилович</text:p>
          </table:table-cell>
          <table:table-cell office:value-type="string" calcext:value-type="string">
            <text:p>0215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5" calcext:value-type="float">
            <text:p>18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Гарифзянова Римма Наилевна</text:p>
          </table:table-cell>
          <table:table-cell office:value-type="string" calcext:value-type="string">
            <text:p>0216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6" calcext:value-type="float">
            <text:p>18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Давлетшина Гульгена Рамилевна</text:p>
          </table:table-cell>
          <table:table-cell office:value-type="string" calcext:value-type="string">
            <text:p>0217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08" calcext:value-type="float">
            <text:p>18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Галимова Рамзия Галиевна</text:p>
          </table:table-cell>
          <table:table-cell office:value-type="string" calcext:value-type="string">
            <text:p>0218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1023" calcext:value-type="float">
            <text:p>181023</text:p>
          </table:table-cell>
          <table:table-cell office:value-type="string" calcext:value-type="string">
            <text:p>$2y$10$/FeRuobXTRAz2svO4Vx.QON5l3CANfALqw9RfGImwOLGx0exY115W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Хасанова Анна Владимировна</text:p>
          </table:table-cell>
          <table:table-cell office:value-type="string" calcext:value-type="string">
            <text:p>0219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2010" calcext:value-type="float">
            <text:p>182010</text:p>
          </table:table-cell>
          <table:table-cell office:value-type="string" calcext:value-type="string">
            <text:p>$2y$10$GdyVF0CR9gZZDsL7nTwJ0ukyEPJy6vDYHZnF63wVuPuREQsXSBlPe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Валиева Лейсан Фоатовна</text:p>
          </table:table-cell>
          <table:table-cell office:value-type="string" calcext:value-type="string">
            <text:p>Leysan78@inbox.ru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2021" calcext:value-type="float">
            <text:p>182021</text:p>
          </table:table-cell>
          <table:table-cell office:value-type="string" calcext:value-type="string">
            <text:p>$2y$10$Ti9C.8SgNjgmIDaz1yDieukfEgqrJcMtqgsQm2f5lPWfbiv0x2DQi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Тимергалиева Алсу Василовна</text:p>
          </table:table-cell>
          <table:table-cell office:value-type="string" calcext:value-type="string">
            <text:p>0221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2034" calcext:value-type="float">
            <text:p>182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Гайнутдинова Зиля Камиловна</text:p>
          </table:table-cell>
          <table:table-cell office:value-type="string" calcext:value-type="string">
            <text:p>0222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06" calcext:value-type="float">
            <text:p>18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Фахрутдинова Зульфия Сунгатовна</text:p>
          </table:table-cell>
          <table:table-cell office:value-type="string" calcext:value-type="string">
            <text:p>0223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07" calcext:value-type="float">
            <text:p>18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Загриева Гульназ Мансуровна</text:p>
          </table:table-cell>
          <table:table-cell office:value-type="string" calcext:value-type="string">
            <text:p>0224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08" calcext:value-type="float">
            <text:p>18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Магсумова Гульнара Фирдинатовна</text:p>
          </table:table-cell>
          <table:table-cell office:value-type="string" calcext:value-type="string">
            <text:p>0225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09" calcext:value-type="float">
            <text:p>18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Шагисламова Гульназ Рашитовна</text:p>
          </table:table-cell>
          <table:table-cell office:value-type="string" calcext:value-type="string">
            <text:p>0226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1" calcext:value-type="float">
            <text:p>18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Давлиева Алсу Расимовна</text:p>
          </table:table-cell>
          <table:table-cell office:value-type="string" calcext:value-type="string">
            <text:p>0227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2" calcext:value-type="float">
            <text:p>18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Гибадуллина Зиля Шайхлисламовна</text:p>
          </table:table-cell>
          <table:table-cell office:value-type="string" calcext:value-type="string">
            <text:p>0228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3" calcext:value-type="float">
            <text:p>18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Гарипова Раиля Камилевна</text:p>
          </table:table-cell>
          <table:table-cell office:value-type="string" calcext:value-type="string">
            <text:p>0229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4" calcext:value-type="float">
            <text:p>18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Минзянова Эндже Фаруковна</text:p>
          </table:table-cell>
          <table:table-cell office:value-type="string" calcext:value-type="string">
            <text:p>0230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5" calcext:value-type="float">
            <text:p>18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Салахова Ильгиза Габдраисовна</text:p>
          </table:table-cell>
          <table:table-cell office:value-type="string" calcext:value-type="string">
            <text:p>0231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6" calcext:value-type="float">
            <text:p>18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Исмагилова Эльвира Равефовна</text:p>
          </table:table-cell>
          <table:table-cell office:value-type="string" calcext:value-type="string">
            <text:p>0232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7" calcext:value-type="float">
            <text:p>184017</text:p>
          </table:table-cell>
          <table:table-cell office:value-type="string" calcext:value-type="string">
            <text:p>$2y$10$8dhprYkmExXbLv0s346yg.MltGwR0H9RJQKBWoRBa021lTDLVOAkG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Хаирова Гулия Спагидулловна</text:p>
          </table:table-cell>
          <table:table-cell office:value-type="string" calcext:value-type="string">
            <text:p>0233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8" calcext:value-type="float">
            <text:p>18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Валиева Надира Табрисовна</text:p>
          </table:table-cell>
          <table:table-cell office:value-type="string" calcext:value-type="string">
            <text:p>0234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19" calcext:value-type="float">
            <text:p>18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Габдрахманова Олеся Ринатовна</text:p>
          </table:table-cell>
          <table:table-cell office:value-type="string" calcext:value-type="string">
            <text:p>0235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0" calcext:value-type="float">
            <text:p>18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Хузиева Айгуль Нурмихаматовна</text:p>
          </table:table-cell>
          <table:table-cell office:value-type="string" calcext:value-type="string">
            <text:p>0236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2" calcext:value-type="float">
            <text:p>184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Фатихова Гульшат Рафисовна</text:p>
          </table:table-cell>
          <table:table-cell office:value-type="string" calcext:value-type="string">
            <text:p>0237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4" calcext:value-type="float">
            <text:p>184024</text:p>
          </table:table-cell>
          <table:table-cell office:value-type="string" calcext:value-type="string">
            <text:p>$2y$10$75sr6/mCSAIoTaHLHjbzBuxPmi2pQ4zIwUEHKozDqQBJfj271IfUG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Гарипова Лилия Мансуровна</text:p>
          </table:table-cell>
          <table:table-cell office:value-type="string" calcext:value-type="string">
            <text:p>0238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5" calcext:value-type="float">
            <text:p>18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Хайрутдинова Роза Талгатовна</text:p>
          </table:table-cell>
          <table:table-cell office:value-type="string" calcext:value-type="string">
            <text:p>0239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6" calcext:value-type="float">
            <text:p>184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Хафизова Ильхамия Рахимзяновна</text:p>
          </table:table-cell>
          <table:table-cell office:value-type="string" calcext:value-type="string">
            <text:p>0240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7" calcext:value-type="float">
            <text:p>184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Фатхрахманова Лилия Шагимулловна</text:p>
          </table:table-cell>
          <table:table-cell office:value-type="string" calcext:value-type="string">
            <text:p>0241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28" calcext:value-type="float">
            <text:p>184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Галиуллина Гульсина Габдрашитовна</text:p>
          </table:table-cell>
          <table:table-cell office:value-type="string" calcext:value-type="string">
            <text:p>0242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32" calcext:value-type="float">
            <text:p>184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Сафиуллина Гульшат Камилевна</text:p>
          </table:table-cell>
          <table:table-cell office:value-type="string" calcext:value-type="string">
            <text:p>0243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33" calcext:value-type="float">
            <text:p>184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Шамсемухаметова Гульназ Фирдусовна</text:p>
          </table:table-cell>
          <table:table-cell office:value-type="string" calcext:value-type="string">
            <text:p>0244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35" calcext:value-type="float">
            <text:p>184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Мустафина Гулина Галимзяновна</text:p>
          </table:table-cell>
          <table:table-cell office:value-type="string" calcext:value-type="string">
            <text:p>0245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38" calcext:value-type="float">
            <text:p>18403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Кутдусова Гульназ Муллануровна</text:p>
          </table:table-cell>
          <table:table-cell office:value-type="string" calcext:value-type="string">
            <text:p>0246@mail.m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4066" calcext:value-type="float">
            <text:p>18406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Сабирзянова Гузель Эдуардовна</text:p>
          </table:table-cell>
          <table:table-cell office:value-type="string" calcext:value-type="string">
            <text:p>b.atnsosh@mail.ru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1" calcext:value-type="float">
            <text:p>194001</text:p>
          </table:table-cell>
          <table:table-cell office:value-type="string" calcext:value-type="string">
            <text:p>$2y$10$6Jf/dKpHOqES.HP/rn4uIOcvWooC6ncpaECkzWszhBKId9i4Y7Wzm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Хисматуллина Алиса Дамировна</text:p>
          </table:table-cell>
          <table:table-cell office:value-type="string" calcext:value-type="string">
            <text:p>0248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2" calcext:value-type="float">
            <text:p>194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Гайнуллина Алия Юсуповна</text:p>
          </table:table-cell>
          <table:table-cell office:value-type="string" calcext:value-type="string">
            <text:p>0249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3" calcext:value-type="float">
            <text:p>194003</text:p>
          </table:table-cell>
          <table:table-cell office:value-type="string" calcext:value-type="string">
            <text:p>$2y$10$PfQEOoeel7C6gsw32zjW4uUiDU9zsOd6IP3s9UVGoxSW4nnhS0Xji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Курбанова Гульнара Фаргатовна</text:p>
          </table:table-cell>
          <table:table-cell office:value-type="string" calcext:value-type="string">
            <text:p>0250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4" calcext:value-type="float">
            <text:p>19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Гиниятов Илшат Салахутдинович</text:p>
          </table:table-cell>
          <table:table-cell office:value-type="string" calcext:value-type="string">
            <text:p>0251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5" calcext:value-type="float">
            <text:p>19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Гарипова Гузель Фарилевна</text:p>
          </table:table-cell>
          <table:table-cell office:value-type="string" calcext:value-type="string">
            <text:p>0252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6" calcext:value-type="float">
            <text:p>19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Паутова Гузель Габделнуровна</text:p>
          </table:table-cell>
          <table:table-cell office:value-type="string" calcext:value-type="string">
            <text:p>0253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7" calcext:value-type="float">
            <text:p>194007</text:p>
          </table:table-cell>
          <table:table-cell office:value-type="string" calcext:value-type="string">
            <text:p>$2y$10$QuwiXLN5HBh/UBErpXPeKu4WVXhLrt8TZlpjYy/.XoEwGiX3Donv6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Ахметова Ландыш Камилевна</text:p>
          </table:table-cell>
          <table:table-cell office:value-type="string" calcext:value-type="string">
            <text:p>lanfa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8" calcext:value-type="float">
            <text:p>194008</text:p>
          </table:table-cell>
          <table:table-cell office:value-type="string" calcext:value-type="string">
            <text:p>$2y$10$cHI6pCr5sBjsBt57vCL49utNFANmdNdA7btJuNmDfCLVQVeamY8y2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Хуснутдинова Алсу Мисалимовна</text:p>
          </table:table-cell>
          <table:table-cell office:value-type="string" calcext:value-type="string">
            <text:p>0255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09" calcext:value-type="float">
            <text:p>194009</text:p>
          </table:table-cell>
          <table:table-cell office:value-type="string" calcext:value-type="string">
            <text:p>$2y$10$J32KT2OqzvhlFr66pcSarORQPrtY0Wm8btCS0gA4mUXgD7rAEw4oS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Абдуллина Алсу Ленаровна</text:p>
          </table:table-cell>
          <table:table-cell office:value-type="string" calcext:value-type="string">
            <text:p>0256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10" calcext:value-type="float">
            <text:p>19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Гатауллина Айзиряк Рустамовна </text:p>
          </table:table-cell>
          <table:table-cell office:value-type="string" calcext:value-type="string">
            <text:p>0257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11" calcext:value-type="float">
            <text:p>19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Самигуллина Резеда Наилевна</text:p>
          </table:table-cell>
          <table:table-cell office:value-type="string" calcext:value-type="string">
            <text:p>0258@mail.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4013" calcext:value-type="float">
            <text:p>19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Сабирова Ирина Владимировна</text:p>
          </table:table-cell>
          <table:table-cell office:value-type="string" calcext:value-type="string">
            <text:p>0259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1001" calcext:value-type="float">
            <text:p>20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Хайруллина Миляуша Иреговна</text:p>
          </table:table-cell>
          <table:table-cell office:value-type="string" calcext:value-type="string">
            <text:p>0260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1002" calcext:value-type="float">
            <text:p>201002</text:p>
          </table:table-cell>
          <table:table-cell office:value-type="string" calcext:value-type="string">
            <text:p>$2y$10$me9ajYTJ3CBFniz7tKMTmeE01MpFpvSEvZj5uR3MK0p475D13FDti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Ханова Гульнара Вахитовна</text:p>
          </table:table-cell>
          <table:table-cell office:value-type="string" calcext:value-type="string">
            <text:p>0261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1003" calcext:value-type="float">
            <text:p>20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Бадриева Рамиля Миясаровна</text:p>
          </table:table-cell>
          <table:table-cell office:value-type="string" calcext:value-type="string">
            <text:p>0262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1005" calcext:value-type="float">
            <text:p>201005</text:p>
          </table:table-cell>
          <table:table-cell office:value-type="string" calcext:value-type="string">
            <text:p>$2y$10$QfJRZ3GYM2.pozDpxQZcZuMWGHsQkuR8VISDD35szxc2y2/Aw0dUG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Ахметова Гульнур Рахимовна</text:p>
          </table:table-cell>
          <table:table-cell office:value-type="string" calcext:value-type="string">
            <text:p>0263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1006" calcext:value-type="float">
            <text:p>20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Абдрахманова Роза Яткаровна</text:p>
          </table:table-cell>
          <table:table-cell office:value-type="string" calcext:value-type="string">
            <text:p>0264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1007" calcext:value-type="float">
            <text:p>20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Валеева Светлана Ильдаровна</text:p>
          </table:table-cell>
          <table:table-cell office:value-type="string" calcext:value-type="string">
            <text:p>0265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08" calcext:value-type="float">
            <text:p>20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Евстигнеева Вера Рафаилевна</text:p>
          </table:table-cell>
          <table:table-cell office:value-type="string" calcext:value-type="string">
            <text:p>0266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09" calcext:value-type="float">
            <text:p>20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Теребенина Татьяна Николаевна</text:p>
          </table:table-cell>
          <table:table-cell office:value-type="string" calcext:value-type="string">
            <text:p>0267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12" calcext:value-type="float">
            <text:p>20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Низамова Гузель Сабитовна</text:p>
          </table:table-cell>
          <table:table-cell office:value-type="string" calcext:value-type="string">
            <text:p>0268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13" calcext:value-type="float">
            <text:p>20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Тараканова Инна Александровна</text:p>
          </table:table-cell>
          <table:table-cell office:value-type="string" calcext:value-type="string">
            <text:p>0269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15" calcext:value-type="float">
            <text:p>20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Барунева Галина Викторовна</text:p>
          </table:table-cell>
          <table:table-cell office:value-type="string" calcext:value-type="string">
            <text:p>0270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16" calcext:value-type="float">
            <text:p>20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Семенова Вероника Ивановна</text:p>
          </table:table-cell>
          <table:table-cell office:value-type="string" calcext:value-type="string">
            <text:p>0271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2017" calcext:value-type="float">
            <text:p>20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Гайнутдинова Гузелия Мухаррамовна</text:p>
          </table:table-cell>
          <table:table-cell office:value-type="string" calcext:value-type="string">
            <text:p>0272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3004" calcext:value-type="float">
            <text:p>203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Газиева Гузель Рафаэлевна</text:p>
          </table:table-cell>
          <table:table-cell office:value-type="string" calcext:value-type="string">
            <text:p>0273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4010" calcext:value-type="float">
            <text:p>20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Хафизова Гелюся Хамитовна</text:p>
          </table:table-cell>
          <table:table-cell office:value-type="string" calcext:value-type="string">
            <text:p>0274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4011" calcext:value-type="float">
            <text:p>20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Кагирова Лилия Ильгизовна</text:p>
          </table:table-cell>
          <table:table-cell office:value-type="string" calcext:value-type="string">
            <text:p>0275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4014" calcext:value-type="float">
            <text:p>20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Вагизова Гульнара Зуфаровна</text:p>
          </table:table-cell>
          <table:table-cell office:value-type="string" calcext:value-type="string">
            <text:p>0276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4018" calcext:value-type="float">
            <text:p>20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Кашапова Илсияр Фатиховна</text:p>
          </table:table-cell>
          <table:table-cell office:value-type="string" calcext:value-type="string">
            <text:p>0277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4019" calcext:value-type="float">
            <text:p>20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Кивамова Лейсан Рагизовна</text:p>
          </table:table-cell>
          <table:table-cell office:value-type="string" calcext:value-type="string">
            <text:p>0278@mail.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4020" calcext:value-type="float">
            <text:p>20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Гиматовa Фануза Куттусовна</text:p>
          </table:table-cell>
          <table:table-cell office:value-type="string" calcext:value-type="string">
            <text:p>0279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1001" calcext:value-type="float">
            <text:p>211001</text:p>
          </table:table-cell>
          <table:table-cell office:value-type="string" calcext:value-type="string">
            <text:p>$2y$10$Q.159kNzukKnGOFP/U1C4ePVo2uJlJEePctw6VSF0KDpurhFQnSdW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Мукминова Миляуша Гильфановна</text:p>
          </table:table-cell>
          <table:table-cell office:value-type="string" calcext:value-type="string">
            <text:p>0280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1002" calcext:value-type="float">
            <text:p>211002</text:p>
          </table:table-cell>
          <table:table-cell office:value-type="string" calcext:value-type="string">
            <text:p>$2y$10$/osjwLQ.rqkhvO4bTl9vgeADv.x0IWx8NngZiQw0B7UCSXltf2inq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Понуркина Нелли Ивановна</text:p>
          </table:table-cell>
          <table:table-cell office:value-type="string" calcext:value-type="string">
            <text:p>0281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2003" calcext:value-type="float">
            <text:p>212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Яковлева Олеся Васильевна</text:p>
          </table:table-cell>
          <table:table-cell office:value-type="string" calcext:value-type="string">
            <text:p>0282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2004" calcext:value-type="float">
            <text:p>212004</text:p>
          </table:table-cell>
          <table:table-cell office:value-type="string" calcext:value-type="string">
            <text:p>$2y$10$BmUvZ1olTk1ZFw6Pi.mqeuWejpJkkvTUEkGL7V1ZrY0BosCUxOJNy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Зиатдинова Надежда Витальевна</text:p>
          </table:table-cell>
          <table:table-cell office:value-type="string" calcext:value-type="string">
            <text:p>0283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2005" calcext:value-type="float">
            <text:p>21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Валиева Раушания Урановна</text:p>
          </table:table-cell>
          <table:table-cell office:value-type="string" calcext:value-type="string">
            <text:p>0284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07" calcext:value-type="float">
            <text:p>21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Марданова Райхана Саубановна</text:p>
          </table:table-cell>
          <table:table-cell office:value-type="string" calcext:value-type="string">
            <text:p>0285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08" calcext:value-type="float">
            <text:p>21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Закирова Гульшат Габдульбаровна</text:p>
          </table:table-cell>
          <table:table-cell office:value-type="string" calcext:value-type="string">
            <text:p>0286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09" calcext:value-type="float">
            <text:p>21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Габдрахманова Танзиля Равиловна</text:p>
          </table:table-cell>
          <table:table-cell office:value-type="string" calcext:value-type="string">
            <text:p>0287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0" calcext:value-type="float">
            <text:p>214010</text:p>
          </table:table-cell>
          <table:table-cell office:value-type="string" calcext:value-type="string">
            <text:p>$2y$10$GS2g2tg.oNFETUmto88FFOQulVU6Blp..WEZP6ReQRv5c0UHqqonG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Насихова Глюза Равиловна</text:p>
          </table:table-cell>
          <table:table-cell office:value-type="string" calcext:value-type="string">
            <text:p>0288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1" calcext:value-type="float">
            <text:p>21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Хусаинова Миляуша Саматовна</text:p>
          </table:table-cell>
          <table:table-cell office:value-type="string" calcext:value-type="string">
            <text:p>0289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2" calcext:value-type="float">
            <text:p>21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Фарзиева Алсу Габделбаровна</text:p>
          </table:table-cell>
          <table:table-cell office:value-type="string" calcext:value-type="string">
            <text:p>0290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3" calcext:value-type="float">
            <text:p>214013</text:p>
          </table:table-cell>
          <table:table-cell office:value-type="string" calcext:value-type="string">
            <text:p>$2y$10$aH.VqnOyBz.Ii1z5Bqp8S.WfG3SBAaPxDSaie5qkjY8zCZxjpaQFS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Якупова Гульнур Зиннуровна</text:p>
          </table:table-cell>
          <table:table-cell office:value-type="string" calcext:value-type="string">
            <text:p>0291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4" calcext:value-type="float">
            <text:p>21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Исмагилова Гелюся Мухаррамовна</text:p>
          </table:table-cell>
          <table:table-cell office:value-type="string" calcext:value-type="string">
            <text:p>0292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5" calcext:value-type="float">
            <text:p>21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Васильева Гульназ Фазиловна</text:p>
          </table:table-cell>
          <table:table-cell office:value-type="string" calcext:value-type="string">
            <text:p>0293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6" calcext:value-type="float">
            <text:p>214016</text:p>
          </table:table-cell>
          <table:table-cell office:value-type="string" calcext:value-type="string">
            <text:p>$2y$10$Lk70PIQNKggDluc3QMHjeuQqBxabQVY23yiehRSHfY/ReyVtgZsvi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Габитова Сания Ильясовна</text:p>
          </table:table-cell>
          <table:table-cell office:value-type="string" calcext:value-type="string">
            <text:p>0294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7" calcext:value-type="float">
            <text:p>21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Хазиева Лейсан Мансуровна</text:p>
          </table:table-cell>
          <table:table-cell office:value-type="string" calcext:value-type="string">
            <text:p>10295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8" calcext:value-type="float">
            <text:p>214018</text:p>
          </table:table-cell>
          <table:table-cell office:value-type="string" calcext:value-type="string">
            <text:p>$2y$10$30hatb50CZW0VcQmP9Si7uys65XY7ie6nNd/ssznewJ55.5kfxl2K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Кабирова Раушания Маликовна</text:p>
          </table:table-cell>
          <table:table-cell office:value-type="string" calcext:value-type="string">
            <text:p>0296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19" calcext:value-type="float">
            <text:p>21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Ибрагимова Гульчачак Салимовна</text:p>
          </table:table-cell>
          <table:table-cell office:value-type="string" calcext:value-type="string">
            <text:p>0297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20" calcext:value-type="float">
            <text:p>21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Каримова Гульсинур Гайнановна</text:p>
          </table:table-cell>
          <table:table-cell office:value-type="string" calcext:value-type="string">
            <text:p>0298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21" calcext:value-type="float">
            <text:p>21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Рания Рафхатовна Рамазанова</text:p>
          </table:table-cell>
          <table:table-cell office:value-type="string" calcext:value-type="string">
            <text:p>0299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4022" calcext:value-type="float">
            <text:p>214022</text:p>
          </table:table-cell>
          <table:table-cell office:value-type="string" calcext:value-type="string">
            <text:p>$2y$10$Uv0GsBeLAvcg/ZXp7LT27eKC6zGHK.wW0JQVtT7FBI2Y7nh35M9Hq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Хабибуллина Танзия Магсумовна</text:p>
          </table:table-cell>
          <table:table-cell office:value-type="string" calcext:value-type="string">
            <text:p>0300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1" calcext:value-type="float">
            <text:p>21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Гарифуллина Ф. В.</text:p>
          </table:table-cell>
          <table:table-cell office:value-type="string" calcext:value-type="string">
            <text:p>0301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2" calcext:value-type="float">
            <text:p>21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Исрафилова Гадиля Мансуровна</text:p>
          </table:table-cell>
          <table:table-cell office:value-type="string" calcext:value-type="string">
            <text:p>0302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3" calcext:value-type="float">
            <text:p>215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Галлямова С.М.</text:p>
          </table:table-cell>
          <table:table-cell office:value-type="string" calcext:value-type="string">
            <text:p>0303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4" calcext:value-type="float">
            <text:p>215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Хабибуллина Милауша Лисуровна</text:p>
          </table:table-cell>
          <table:table-cell office:value-type="string" calcext:value-type="string">
            <text:p>0304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5" calcext:value-type="float">
            <text:p>215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Соловьёва Татьяна Ивановна</text:p>
          </table:table-cell>
          <table:table-cell office:value-type="string" calcext:value-type="string">
            <text:p>0305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6" calcext:value-type="float">
            <text:p>215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Асадуллина Гульфина Габделфартовна</text:p>
          </table:table-cell>
          <table:table-cell office:value-type="string" calcext:value-type="string">
            <text:p>0306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7" calcext:value-type="float">
            <text:p>215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Галиева Земфира Талгатовна</text:p>
          </table:table-cell>
          <table:table-cell office:value-type="string" calcext:value-type="string">
            <text:p>0307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8" calcext:value-type="float">
            <text:p>215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Заляева Алсу Гумеровна</text:p>
          </table:table-cell>
          <table:table-cell office:value-type="string" calcext:value-type="string">
            <text:p>0308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09" calcext:value-type="float">
            <text:p>215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Тухфатуллина Каусария Закиевна</text:p>
          </table:table-cell>
          <table:table-cell office:value-type="string" calcext:value-type="string">
            <text:p>0309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10" calcext:value-type="float">
            <text:p>215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Габделвалиева Ф.М.</text:p>
          </table:table-cell>
          <table:table-cell office:value-type="string" calcext:value-type="string">
            <text:p>0310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11" calcext:value-type="float">
            <text:p>215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Хафизова Райхана Файзрахмановна</text:p>
          </table:table-cell>
          <table:table-cell office:value-type="string" calcext:value-type="string">
            <text:p>0311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12" calcext:value-type="float">
            <text:p>215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Файзрахманова Таслима Зиннуровна</text:p>
          </table:table-cell>
          <table:table-cell office:value-type="string" calcext:value-type="string">
            <text:p>0312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13" calcext:value-type="float">
            <text:p>215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Ефремова Алевтина Петровна</text:p>
          </table:table-cell>
          <table:table-cell office:value-type="string" calcext:value-type="string">
            <text:p>0313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14" calcext:value-type="float">
            <text:p>215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Плотникова Елена Анатольевна</text:p>
          </table:table-cell>
          <table:table-cell office:value-type="string" calcext:value-type="string">
            <text:p>0314@mail.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5015" calcext:value-type="float">
            <text:p>215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Тарасова Елена Александровна</text:p>
          </table:table-cell>
          <table:table-cell office:value-type="string" calcext:value-type="string">
            <text:p>0315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1" calcext:value-type="float">
            <text:p>22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Бронникова Наталья Владимировна</text:p>
          </table:table-cell>
          <table:table-cell office:value-type="string" calcext:value-type="string">
            <text:p>0316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2" calcext:value-type="float">
            <text:p>22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Ткачева Елена Валентиновна</text:p>
          </table:table-cell>
          <table:table-cell office:value-type="string" calcext:value-type="string">
            <text:p>0317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3" calcext:value-type="float">
            <text:p>22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Прокопьева Наталья Александровна</text:p>
          </table:table-cell>
          <table:table-cell office:value-type="string" calcext:value-type="string">
            <text:p>0318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4" calcext:value-type="float">
            <text:p>22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Шарифуллина Айсылу Мардугалимовна</text:p>
          </table:table-cell>
          <table:table-cell office:value-type="string" calcext:value-type="string">
            <text:p>0319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5" calcext:value-type="float">
            <text:p>22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Бирючевская Диляра Юнеровна</text:p>
          </table:table-cell>
          <table:table-cell office:value-type="string" calcext:value-type="string">
            <text:p>0320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6" calcext:value-type="float">
            <text:p>22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Дюкова Ирина Евгеньевна</text:p>
          </table:table-cell>
          <table:table-cell office:value-type="string" calcext:value-type="string">
            <text:p>0321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7" calcext:value-type="float">
            <text:p>22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Иноятова София Альбертовна </text:p>
          </table:table-cell>
          <table:table-cell office:value-type="string" calcext:value-type="string">
            <text:p>0322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8" calcext:value-type="float">
            <text:p>22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Кукарова Альбина Фраисовна, Зиязова Айгуль Рашитовна</text:p>
          </table:table-cell>
          <table:table-cell office:value-type="string" calcext:value-type="string">
            <text:p>0323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09" calcext:value-type="float">
            <text:p>221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Осипович Татьяна Анатольевна</text:p>
          </table:table-cell>
          <table:table-cell office:value-type="string" calcext:value-type="string">
            <text:p>0324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10" calcext:value-type="float">
            <text:p>22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Романова Вероника Анатольевна</text:p>
          </table:table-cell>
          <table:table-cell office:value-type="string" calcext:value-type="string">
            <text:p>0325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11" calcext:value-type="float">
            <text:p>221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Владимирова Наталья Анатольевна</text:p>
          </table:table-cell>
          <table:table-cell office:value-type="string" calcext:value-type="string">
            <text:p>0326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12" calcext:value-type="float">
            <text:p>221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Набережнова Карина Робертовна</text:p>
          </table:table-cell>
          <table:table-cell office:value-type="string" calcext:value-type="string">
            <text:p>0327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1013" calcext:value-type="float">
            <text:p>221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Козыркина Галина Анатольевна</text:p>
          </table:table-cell>
          <table:table-cell office:value-type="string" calcext:value-type="string">
            <text:p>0328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19" calcext:value-type="float">
            <text:p>222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Матвеева Анна Александровна</text:p>
          </table:table-cell>
          <table:table-cell office:value-type="string" calcext:value-type="string">
            <text:p>0329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0" calcext:value-type="float">
            <text:p>222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Шипилова Татьяна Николаевна</text:p>
          </table:table-cell>
          <table:table-cell office:value-type="string" calcext:value-type="string">
            <text:p>0330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1" calcext:value-type="float">
            <text:p>22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Фаритова Изольда Александровна</text:p>
          </table:table-cell>
          <table:table-cell office:value-type="string" calcext:value-type="string">
            <text:p>0331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2" calcext:value-type="float">
            <text:p>22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Светлолобова Кристина Витальевна</text:p>
          </table:table-cell>
          <table:table-cell office:value-type="string" calcext:value-type="string">
            <text:p>0332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4" calcext:value-type="float">
            <text:p>222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Матурова Лилия Хазиповна</text:p>
          </table:table-cell>
          <table:table-cell office:value-type="string" calcext:value-type="string">
            <text:p>0333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5" calcext:value-type="float">
            <text:p>222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Чиглаков Ильдар Андреевич</text:p>
          </table:table-cell>
          <table:table-cell office:value-type="string" calcext:value-type="string">
            <text:p>0334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7" calcext:value-type="float">
            <text:p>222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Гильманова Эльвира Маратовна</text:p>
          </table:table-cell>
          <table:table-cell office:value-type="string" calcext:value-type="string">
            <text:p>0335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8" calcext:value-type="float">
            <text:p>222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Ивасишина Гузяль Рафиловна</text:p>
          </table:table-cell>
          <table:table-cell office:value-type="string" calcext:value-type="string">
            <text:p>0336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29" calcext:value-type="float">
            <text:p>222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Желованова Зоя <text:s/>Васильевна</text:p>
          </table:table-cell>
          <table:table-cell office:value-type="string" calcext:value-type="string">
            <text:p>0337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30" calcext:value-type="float">
            <text:p>2220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Галимзянова Рамзия Сагитовна</text:p>
          </table:table-cell>
          <table:table-cell office:value-type="string" calcext:value-type="string">
            <text:p>0338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32" calcext:value-type="float">
            <text:p>222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Губаева Рушания Фаатовна</text:p>
          </table:table-cell>
          <table:table-cell office:value-type="string" calcext:value-type="string">
            <text:p>0339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33" calcext:value-type="float">
            <text:p>222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Костина Ольга Александровна</text:p>
          </table:table-cell>
          <table:table-cell office:value-type="string" calcext:value-type="string">
            <text:p>0340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34" calcext:value-type="float">
            <text:p>222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Аминева Альфия Рифгатовна</text:p>
          </table:table-cell>
          <table:table-cell office:value-type="string" calcext:value-type="string">
            <text:p>0341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35" calcext:value-type="float">
            <text:p>222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Волкова Юлия Сергеевна</text:p>
          </table:table-cell>
          <table:table-cell office:value-type="string" calcext:value-type="string">
            <text:p>0342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2036" calcext:value-type="float">
            <text:p>22203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Гайнуллина Зоя Жамиловна</text:p>
          </table:table-cell>
          <table:table-cell office:value-type="string" calcext:value-type="string">
            <text:p>0343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3014" calcext:value-type="float">
            <text:p>223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Надершина Аклима Анасовна</text:p>
          </table:table-cell>
          <table:table-cell office:value-type="string" calcext:value-type="string">
            <text:p>schoolbug-16@yandex.ru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3016" calcext:value-type="float">
            <text:p>223016</text:p>
          </table:table-cell>
          <table:table-cell office:value-type="string" calcext:value-type="string">
            <text:p>$2y$10$8lMYOM7nSO5k1VeDj8Fas.Gsiu9R5.Z18xKRY0ZgegVEZH8mEVO8W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Загидуллина Диляра Рафиковна</text:p>
          </table:table-cell>
          <table:table-cell office:value-type="string" calcext:value-type="string">
            <text:p>0345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3018" calcext:value-type="float">
            <text:p>223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Кашапова Илюса Радиковна</text:p>
          </table:table-cell>
          <table:table-cell office:value-type="string" calcext:value-type="string">
            <text:p>0346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4023" calcext:value-type="float">
            <text:p>22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Янгирова Лейсан Фирдаусовна</text:p>
          </table:table-cell>
          <table:table-cell office:value-type="string" calcext:value-type="string">
            <text:p>0347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4029" calcext:value-type="float">
            <text:p>224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Субханова Исламия Аглямутдиновна</text:p>
          </table:table-cell>
          <table:table-cell office:value-type="string" calcext:value-type="string">
            <text:p>0348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4037" calcext:value-type="float">
            <text:p>22403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Хасанова Ольга Викторовна</text:p>
          </table:table-cell>
          <table:table-cell office:value-type="string" calcext:value-type="string">
            <text:p>0349@mail.m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5001" calcext:value-type="float">
            <text:p>22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Кошкина Наталья Михайловна </text:p>
          </table:table-cell>
          <table:table-cell office:value-type="string" calcext:value-type="string">
            <text:p>0350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1001" calcext:value-type="float">
            <text:p>23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Корунова Ольга Владимировна</text:p>
          </table:table-cell>
          <table:table-cell office:value-type="string" calcext:value-type="string">
            <text:p>0351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1002" calcext:value-type="float">
            <text:p>231002</text:p>
          </table:table-cell>
          <table:table-cell office:value-type="string" calcext:value-type="string">
            <text:p>$2y$10$i5cymFnMAvKALZv8ZUflvO8a3hWOmczxFtMfhbWVRJcAVzqtX6Ope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Ахметшина Гузель Фирдусовна</text:p>
          </table:table-cell>
          <table:table-cell office:value-type="string" calcext:value-type="string">
            <text:p>0352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1004" calcext:value-type="float">
            <text:p>231004</text:p>
          </table:table-cell>
          <table:table-cell office:value-type="string" calcext:value-type="string">
            <text:p>$2y$10$JMCngqNHcHNuyDy2lBf7NezJPyZTw81p1JBRjsv478Nr6qCwVRbMq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Гайнутдинова Эльмира Тавфиковна</text:p>
          </table:table-cell>
          <table:table-cell office:value-type="string" calcext:value-type="string">
            <text:p>0353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1005" calcext:value-type="float">
            <text:p>23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Школьникова Марина Викторовна</text:p>
          </table:table-cell>
          <table:table-cell office:value-type="string" calcext:value-type="string">
            <text:p>0354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1006" calcext:value-type="float">
            <text:p>23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Кудряшова Ильсеяр Магировна</text:p>
          </table:table-cell>
          <table:table-cell office:value-type="string" calcext:value-type="string">
            <text:p>0355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01" calcext:value-type="float">
            <text:p>232001</text:p>
          </table:table-cell>
          <table:table-cell office:value-type="string" calcext:value-type="string">
            <text:p>$2y$10$pyhN8faAoqpbNEc/WIiCjOJUPHTMkuLjsVvabB2Ul2tdyLDLPRDbm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Мингалиева Рузиня Расыховна</text:p>
          </table:table-cell>
          <table:table-cell office:value-type="string" calcext:value-type="string">
            <text:p>ruzinja1973@mail.r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07" calcext:value-type="float">
            <text:p>23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Никонова Альбина Владимировна</text:p>
          </table:table-cell>
          <table:table-cell office:value-type="string" calcext:value-type="string">
            <text:p>0357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09" calcext:value-type="float">
            <text:p>23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Каримова Гульгена Саетовна</text:p>
          </table:table-cell>
          <table:table-cell office:value-type="string" calcext:value-type="string">
            <text:p>0358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10" calcext:value-type="float">
            <text:p>23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Дяминова Ландыш Азатовна</text:p>
          </table:table-cell>
          <table:table-cell office:value-type="string" calcext:value-type="string">
            <text:p>0359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11" calcext:value-type="float">
            <text:p>23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Григорьева Светлана Валерьевна </text:p>
          </table:table-cell>
          <table:table-cell office:value-type="string" calcext:value-type="string">
            <text:p>0360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12" calcext:value-type="float">
            <text:p>23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Фомина Наталья Анатольевна</text:p>
          </table:table-cell>
          <table:table-cell office:value-type="string" calcext:value-type="string">
            <text:p>0361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17" calcext:value-type="float">
            <text:p>232017</text:p>
          </table:table-cell>
          <table:table-cell office:value-type="string" calcext:value-type="string">
            <text:p>$2y$10$Z8LW.7gp86fQUlQq1h9lb.w4XIQCwDSmbY9RtL6/Wst4o//n5BUSK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Медведева Нина Ивановна</text:p>
          </table:table-cell>
          <table:table-cell office:value-type="string" calcext:value-type="string">
            <text:p>0362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18" calcext:value-type="float">
            <text:p>232018</text:p>
          </table:table-cell>
          <table:table-cell office:value-type="string" calcext:value-type="string">
            <text:p>$2y$10$B1cVNOGmBKGABk6A6Mri3On8T03lHUGdbEiEcb4mqxuZkdHqZJq8C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Орлова Татьяна Анатольевна </text:p>
          </table:table-cell>
          <table:table-cell office:value-type="string" calcext:value-type="string">
            <text:p>0363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22" calcext:value-type="float">
            <text:p>23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Шурбина Ирина Николаевна </text:p>
          </table:table-cell>
          <table:table-cell office:value-type="string" calcext:value-type="string">
            <text:p>0364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23" calcext:value-type="float">
            <text:p>23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Гумерова Сирена Фатыховна</text:p>
          </table:table-cell>
          <table:table-cell office:value-type="string" calcext:value-type="string">
            <text:p>0365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28" calcext:value-type="float">
            <text:p>232028</text:p>
          </table:table-cell>
          <table:table-cell office:value-type="string" calcext:value-type="string">
            <text:p>$2y$10$5GDVrjC52eVXRRAAO/ORGeJWacdBdrBK05bGEVLJTnWM3XvTViSQa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Кильдюшева Людмила Васильевна </text:p>
          </table:table-cell>
          <table:table-cell office:value-type="string" calcext:value-type="string">
            <text:p>0366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2029" calcext:value-type="float">
            <text:p>232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Салахова Эльмира Искандаровна </text:p>
          </table:table-cell>
          <table:table-cell office:value-type="string" calcext:value-type="string">
            <text:p>0367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3003" calcext:value-type="float">
            <text:p>233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Ярмухаметова Чулпан Анваровна </text:p>
          </table:table-cell>
          <table:table-cell office:value-type="string" calcext:value-type="string">
            <text:p>0368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02" calcext:value-type="float">
            <text:p>234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Тютина Людмила Васильевна </text:p>
          </table:table-cell>
          <table:table-cell office:value-type="string" calcext:value-type="string">
            <text:p>0369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03" calcext:value-type="float">
            <text:p>234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Хайбуллина Гульшат Асгатовна</text:p>
          </table:table-cell>
          <table:table-cell office:value-type="string" calcext:value-type="string">
            <text:p>0370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08" calcext:value-type="float">
            <text:p>23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Махмутова Алсу Рашидовна</text:p>
          </table:table-cell>
          <table:table-cell office:value-type="string" calcext:value-type="string">
            <text:p>0371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15" calcext:value-type="float">
            <text:p>23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Залалова Эндже Абдулловна </text:p>
          </table:table-cell>
          <table:table-cell office:value-type="string" calcext:value-type="string">
            <text:p>0372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16" calcext:value-type="float">
            <text:p>23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Ахмадуллина Гульфина Равиловна</text:p>
          </table:table-cell>
          <table:table-cell office:value-type="string" calcext:value-type="string">
            <text:p>0373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19" calcext:value-type="float">
            <text:p>234019</text:p>
          </table:table-cell>
          <table:table-cell office:value-type="string" calcext:value-type="string">
            <text:p>$2y$10$MJH1qpyhHoZ3g4T32gQYJ.8i93mAXFtZG7U61YXSAbgzWeN2KMZwa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Сабирзянова Эндже Зуфаровна</text:p>
          </table:table-cell>
          <table:table-cell office:value-type="string" calcext:value-type="string">
            <text:p>0374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20" calcext:value-type="float">
            <text:p>23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Халитова Гелшат Нургалиевна</text:p>
          </table:table-cell>
          <table:table-cell office:value-type="string" calcext:value-type="string">
            <text:p>0375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21" calcext:value-type="float">
            <text:p>23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Сабирова Гульнара Шавкатовна </text:p>
          </table:table-cell>
          <table:table-cell office:value-type="string" calcext:value-type="string">
            <text:p>0376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24" calcext:value-type="float">
            <text:p>23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Шарафутдинова Резеда Рамазановна</text:p>
          </table:table-cell>
          <table:table-cell office:value-type="string" calcext:value-type="string">
            <text:p>0377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25" calcext:value-type="float">
            <text:p>23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Краснова Гюзелия Завитовна </text:p>
          </table:table-cell>
          <table:table-cell office:value-type="string" calcext:value-type="string">
            <text:p>0378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26" calcext:value-type="float">
            <text:p>234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Нефедова Марина Петровна</text:p>
          </table:table-cell>
          <table:table-cell office:value-type="string" calcext:value-type="string">
            <text:p>0379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27" calcext:value-type="float">
            <text:p>234027</text:p>
          </table:table-cell>
          <table:table-cell office:value-type="string" calcext:value-type="string">
            <text:p>$2y$10$UFSyI2KZ/.0hyX0DCPlthOvbfV1hishway3HDBYBvvgdyuB8f0v/a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Фахрутдинов Тахир Абдулганиевич</text:p>
          </table:table-cell>
          <table:table-cell office:value-type="string" calcext:value-type="string">
            <text:p>0380@mail.m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4030" calcext:value-type="float">
            <text:p>2340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Купчихина Алена Алексеевна</text:p>
          </table:table-cell>
          <table:table-cell office:value-type="string" calcext:value-type="string">
            <text:p>0381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1023" calcext:value-type="float">
            <text:p>241023</text:p>
          </table:table-cell>
          <table:table-cell office:value-type="string" calcext:value-type="string">
            <text:p>$2y$10$OEgWOIhlMV8bo8Iw8TQD8OP53WT/xgbTYlnj7DWYzGmG8KpAbYHUq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Калачева Нина Игоревна</text:p>
          </table:table-cell>
          <table:table-cell office:value-type="string" calcext:value-type="string">
            <text:p>nina09081986@mail.ru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1024" calcext:value-type="float">
            <text:p>241024</text:p>
          </table:table-cell>
          <table:table-cell office:value-type="string" calcext:value-type="string">
            <text:p>$2y$10$k9HJYfMgdXFMSJnuG5JoieCGcxN3XpY3uhcHo73keqebAjq1.P.0q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Зарипова Татьяна Васильева</text:p>
          </table:table-cell>
          <table:table-cell office:value-type="string" calcext:value-type="string">
            <text:p>0383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1" calcext:value-type="float">
            <text:p>242001</text:p>
          </table:table-cell>
          <table:table-cell office:value-type="string" calcext:value-type="string">
            <text:p>$2y$10$f7ls.gtH8Fo7xbYWHLsncehwz4RiAq5MnJ/cMwuCVCg0kERCBCbHe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Алия Хамитовна Гусамова</text:p>
          </table:table-cell>
          <table:table-cell office:value-type="string" calcext:value-type="string">
            <text:p>0384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2" calcext:value-type="float">
            <text:p>242002</text:p>
          </table:table-cell>
          <table:table-cell office:value-type="string" calcext:value-type="string">
            <text:p>$2y$10$CfmKIV.j6Ijycuc4RynnfOZZFOEqtE.wuEhVwnFgfglsUvqe4MXO6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Шарафеева Римма Анваровна</text:p>
          </table:table-cell>
          <table:table-cell office:value-type="string" calcext:value-type="string">
            <text:p>0385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3" calcext:value-type="float">
            <text:p>242003</text:p>
          </table:table-cell>
          <table:table-cell office:value-type="string" calcext:value-type="string">
            <text:p>$2y$10$mmhR7Z4g9il4Fu5fL/MUJuNq7obUysZwHmHsFtaMclsccAUCueW8S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Рыбкина Асия Фаритовна</text:p>
          </table:table-cell>
          <table:table-cell office:value-type="string" calcext:value-type="string">
            <text:p>0386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4" calcext:value-type="float">
            <text:p>242004</text:p>
          </table:table-cell>
          <table:table-cell office:value-type="string" calcext:value-type="string">
            <text:p>$2y$10$5JoKwhcPTJaUqRTdoqflc.GlSoDtqzNw5XZmHzcWfxEnCpe8kbRRG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Переведенцева Зимфира Альбертовна</text:p>
          </table:table-cell>
          <table:table-cell office:value-type="string" calcext:value-type="string">
            <text:p>0387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6" calcext:value-type="float">
            <text:p>242006</text:p>
          </table:table-cell>
          <table:table-cell office:value-type="string" calcext:value-type="string">
            <text:p>$2y$10$KlYSkAe0p.9WyAN7UB9R2uesQmRPYPRAKhBLfBcvJ2jzN4wPxGwQS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Бочкова Марина Николаевна</text:p>
          </table:table-cell>
          <table:table-cell office:value-type="string" calcext:value-type="string">
            <text:p>0388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7" calcext:value-type="float">
            <text:p>242007</text:p>
          </table:table-cell>
          <table:table-cell office:value-type="string" calcext:value-type="string">
            <text:p>$2y$10$pcd2If5r8WFpbk57lvhG6uMyfazM6/hCavqn.K0f4X5FWylAe/TZq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Гайфуллина Фания Хамитовна</text:p>
          </table:table-cell>
          <table:table-cell office:value-type="string" calcext:value-type="string">
            <text:p>0389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8" calcext:value-type="float">
            <text:p>242008</text:p>
          </table:table-cell>
          <table:table-cell office:value-type="string" calcext:value-type="string">
            <text:p>$2y$10$Dehi3pyoB6c0GFl/RtYRaOFRSAF1mLxOOgHJ7B9tbEGZCnrf.j3hW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Гиматдинова Айгуль Надировна</text:p>
          </table:table-cell>
          <table:table-cell office:value-type="string" calcext:value-type="string">
            <text:p>0390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09" calcext:value-type="float">
            <text:p>242009</text:p>
          </table:table-cell>
          <table:table-cell office:value-type="string" calcext:value-type="string">
            <text:p>$2y$10$llEmXhtM0m2AVqanYjScO.IISOyBv8bRYen6pKObY0XQVT80m3K2K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Антонова Лилия Миннеахметовна</text:p>
          </table:table-cell>
          <table:table-cell office:value-type="string" calcext:value-type="string">
            <text:p>0391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10" calcext:value-type="float">
            <text:p>242010</text:p>
          </table:table-cell>
          <table:table-cell office:value-type="string" calcext:value-type="string">
            <text:p>$2y$10$q/YyfoO8gp6X87ErXyH0oub7jsvE4KaUXncGC9nXIYE4cQfxor5ji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Жесткова Ольга Викторовна</text:p>
          </table:table-cell>
          <table:table-cell office:value-type="string" calcext:value-type="string">
            <text:p>0392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12" calcext:value-type="float">
            <text:p>242012</text:p>
          </table:table-cell>
          <table:table-cell office:value-type="string" calcext:value-type="string">
            <text:p>$2y$10$uUeMFWrqvALwmP9Pzx8cBeN2/LJvTopnKeAjwE8kLVrPzSuSdOs3u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Лашнева Екатерина Александровна</text:p>
          </table:table-cell>
          <table:table-cell office:value-type="string" calcext:value-type="string">
            <text:p>0393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13" calcext:value-type="float">
            <text:p>242013</text:p>
          </table:table-cell>
          <table:table-cell office:value-type="string" calcext:value-type="string">
            <text:p>$2y$10$WkNQg1vI9QIIO5NL/on04ueD0Hp80XDuDPagq.sLbYZkqHC82LePG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Федорова Татьяна Александровна</text:p>
          </table:table-cell>
          <table:table-cell office:value-type="string" calcext:value-type="string">
            <text:p>0394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14" calcext:value-type="float">
            <text:p>242014</text:p>
          </table:table-cell>
          <table:table-cell office:value-type="string" calcext:value-type="string">
            <text:p>$2y$10$/oVNfs/0fxSqWZJ7j4AtBOJJYmCYTgXwqtC4t/OjrdPNlzdhSbDQC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Карпова Наталья Александровна</text:p>
          </table:table-cell>
          <table:table-cell office:value-type="string" calcext:value-type="string">
            <text:p>0395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16" calcext:value-type="float">
            <text:p>242016</text:p>
          </table:table-cell>
          <table:table-cell office:value-type="string" calcext:value-type="string">
            <text:p>$2y$10$WCOpLkgSscQz.V8CRO25kOK8vUtZTGniYLlOv9oZdOAd6XXywnVLG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Игнатьева Альбина Сергеевна</text:p>
          </table:table-cell>
          <table:table-cell office:value-type="string" calcext:value-type="string">
            <text:p>0396@mail.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017" calcext:value-type="float">
            <text:p>242017</text:p>
          </table:table-cell>
          <table:table-cell office:value-type="string" calcext:value-type="string">
            <text:p>$2y$10$0hfaMXS919XwxQo2.FkZ2uoewpxl4ZJ5L9dxp10JzKlAKB/jrMNZi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Самигуллина Лилия Дамировна</text:p>
          </table:table-cell>
          <table:table-cell office:value-type="string" calcext:value-type="string">
            <text:p>0397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1" calcext:value-type="float">
            <text:p>25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Шигапова Лилия Зульфаровна</text:p>
          </table:table-cell>
          <table:table-cell office:value-type="string" calcext:value-type="string">
            <text:p>lilay04@mail.r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2" calcext:value-type="float">
            <text:p>252002</text:p>
          </table:table-cell>
          <table:table-cell office:value-type="string" calcext:value-type="string">
            <text:p>$2y$10$hTiR4RTyfL8U.4BDCCDPFOD6M2bWYY7.rhGyesyCZqQr2UwSq72IC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Тимохина Ольга Анатольевна</text:p>
          </table:table-cell>
          <table:table-cell office:value-type="string" calcext:value-type="string">
            <text:p>0399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3" calcext:value-type="float">
            <text:p>252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Узлова Венера Маратовна</text:p>
          </table:table-cell>
          <table:table-cell office:value-type="string" calcext:value-type="string">
            <text:p>0400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4" calcext:value-type="float">
            <text:p>25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Гилязова Лилия Габдрасиховна</text:p>
          </table:table-cell>
          <table:table-cell office:value-type="string" calcext:value-type="string">
            <text:p>0401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6" calcext:value-type="float">
            <text:p>25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Хамидуллина Альфия Абриковна</text:p>
          </table:table-cell>
          <table:table-cell office:value-type="string" calcext:value-type="string">
            <text:p>0402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7" calcext:value-type="float">
            <text:p>25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Галеева Гульнара Альбертовна</text:p>
          </table:table-cell>
          <table:table-cell office:value-type="string" calcext:value-type="string">
            <text:p>0403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09" calcext:value-type="float">
            <text:p>25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Залялиева Гульнара Илдусовна</text:p>
          </table:table-cell>
          <table:table-cell office:value-type="string" calcext:value-type="string">
            <text:p>0404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10" calcext:value-type="float">
            <text:p>25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Денисова Лилия Владимировна</text:p>
          </table:table-cell>
          <table:table-cell office:value-type="string" calcext:value-type="string">
            <text:p>0405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11" calcext:value-type="float">
            <text:p>25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Гелметдинова Фарида Халимовна</text:p>
          </table:table-cell>
          <table:table-cell office:value-type="string" calcext:value-type="string">
            <text:p>0406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12" calcext:value-type="float">
            <text:p>25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Ахманова Гульнара Фаязовна</text:p>
          </table:table-cell>
          <table:table-cell office:value-type="string" calcext:value-type="string">
            <text:p>0407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15" calcext:value-type="float">
            <text:p>252015</text:p>
          </table:table-cell>
          <table:table-cell office:value-type="string" calcext:value-type="string">
            <text:p>$2y$10$1lwb5eTjGOoAsj5DTdmBtOE9F3HLVeUAdy51JRAl7FiqjyM399J9K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Мустафина Зухра Наиловна</text:p>
          </table:table-cell>
          <table:table-cell office:value-type="string" calcext:value-type="string">
            <text:p>0408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18" calcext:value-type="float">
            <text:p>252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Фазылзянова Лейсан Дамировна</text:p>
          </table:table-cell>
          <table:table-cell office:value-type="string" calcext:value-type="string">
            <text:p>0409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20" calcext:value-type="float">
            <text:p>252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Захарова Альбина Алексеевна</text:p>
          </table:table-cell>
          <table:table-cell office:value-type="string" calcext:value-type="string">
            <text:p>0410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21" calcext:value-type="float">
            <text:p>25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Гараева Надия Хафизовна</text:p>
          </table:table-cell>
          <table:table-cell office:value-type="string" calcext:value-type="string">
            <text:p>0411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22" calcext:value-type="float">
            <text:p>25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Сибгатуллина Альбина Гаптельнуровна</text:p>
          </table:table-cell>
          <table:table-cell office:value-type="string" calcext:value-type="string">
            <text:p>0412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27" calcext:value-type="float">
            <text:p>252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Ганиева Эндже Радиковна</text:p>
          </table:table-cell>
          <table:table-cell office:value-type="string" calcext:value-type="string">
            <text:p>0413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2031" calcext:value-type="float">
            <text:p>2520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Закирова Рузиля Растямовна</text:p>
          </table:table-cell>
          <table:table-cell office:value-type="string" calcext:value-type="string">
            <text:p>0414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05" calcext:value-type="float">
            <text:p>25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Закирова Фирдаус Ахатовна</text:p>
          </table:table-cell>
          <table:table-cell office:value-type="string" calcext:value-type="string">
            <text:p>0415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14" calcext:value-type="float">
            <text:p>25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Ахмитянова Флюра Рафгатовна</text:p>
          </table:table-cell>
          <table:table-cell office:value-type="string" calcext:value-type="string">
            <text:p>0416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16" calcext:value-type="float">
            <text:p>25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Мухтарова Юлдуз Ильдаровна</text:p>
          </table:table-cell>
          <table:table-cell office:value-type="string" calcext:value-type="string">
            <text:p>0417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17" calcext:value-type="float">
            <text:p>25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Халикова Резеда Радиковна</text:p>
          </table:table-cell>
          <table:table-cell office:value-type="string" calcext:value-type="string">
            <text:p>0418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19" calcext:value-type="float">
            <text:p>25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Хидиятова Алсу Нуретдиновна</text:p>
          </table:table-cell>
          <table:table-cell office:value-type="string" calcext:value-type="string">
            <text:p>0419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21" calcext:value-type="float">
            <text:p>25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Насыбуллина Эндже Фаукатовна</text:p>
          </table:table-cell>
          <table:table-cell office:value-type="string" calcext:value-type="string">
            <text:p>kovali74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23" calcext:value-type="float">
            <text:p>25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Тухфатуллина Гульнар Равиловна</text:p>
          </table:table-cell>
          <table:table-cell office:value-type="string" calcext:value-type="string">
            <text:p>0421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24" calcext:value-type="float">
            <text:p>25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Cабирова Гульназ Мансуровна</text:p>
          </table:table-cell>
          <table:table-cell office:value-type="string" calcext:value-type="string">
            <text:p>0422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25" calcext:value-type="float">
            <text:p>25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Рахманова Гюзель Гатаулловнна</text:p>
          </table:table-cell>
          <table:table-cell office:value-type="string" calcext:value-type="string">
            <text:p>0423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26" calcext:value-type="float">
            <text:p>254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Ахмадиева Гульназ Наилевна</text:p>
          </table:table-cell>
          <table:table-cell office:value-type="string" calcext:value-type="string">
            <text:p>iske-kazanshk22b@mail.r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4046" calcext:value-type="float">
            <text:p>254046</text:p>
          </table:table-cell>
          <table:table-cell office:value-type="string" calcext:value-type="string">
            <text:p>$2y$10$L7VgJ6422BWfOKaVSfkFLubZpuI1.ChJZT18D9BMXJU4JA11gJJNi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Файзуллина Гульнара Ильдусовна</text:p>
          </table:table-cell>
          <table:table-cell office:value-type="string" calcext:value-type="string">
            <text:p>0425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5010" calcext:value-type="float">
            <text:p>255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Хусаинова Эндже Ильдусовна</text:p>
          </table:table-cell>
          <table:table-cell office:value-type="string" calcext:value-type="string">
            <text:p>0426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5021" calcext:value-type="float">
            <text:p>255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Габдуллина Люция Раисовна</text:p>
          </table:table-cell>
          <table:table-cell office:value-type="string" calcext:value-type="string">
            <text:p>0427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5025" calcext:value-type="float">
            <text:p>255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Ибрагимова Рамиля Фаритовна</text:p>
          </table:table-cell>
          <table:table-cell office:value-type="string" calcext:value-type="string">
            <text:p>0428@mail.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6025" calcext:value-type="float">
            <text:p>256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Канашова Лейля Харисовна</text:p>
          </table:table-cell>
          <table:table-cell office:value-type="string" calcext:value-type="string">
            <text:p>leyla.kanashova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01" calcext:value-type="float">
            <text:p>261001</text:p>
          </table:table-cell>
          <table:table-cell office:value-type="string" calcext:value-type="string">
            <text:p>$2y$10$WP16XFSBtCZUHW23XVNh/.zd/akOYirKH3veULwUfbNMChpkBltDG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Фролова Юлия Юрьевна</text:p>
          </table:table-cell>
          <table:table-cell office:value-type="string" calcext:value-type="string">
            <text:p>frolova-school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05" calcext:value-type="float">
            <text:p>261005</text:p>
          </table:table-cell>
          <table:table-cell office:value-type="string" calcext:value-type="string">
            <text:p>$2y$10$VYkjHogpw4OFZTF7PP0Ai./cjYJJjyNu8Ou3de3Zhv881fZbP0I8e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Хасанова Лилия Флеровна</text:p>
          </table:table-cell>
          <table:table-cell office:value-type="string" calcext:value-type="string">
            <text:p>sch6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06" calcext:value-type="float">
            <text:p>261006</text:p>
          </table:table-cell>
          <table:table-cell office:value-type="string" calcext:value-type="string">
            <text:p>$2y$10$QU9brQtFrRCtNqnW72ruHOHBMhuOvD2Dgw7Ta312P4stbYobeYaf2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Ерхонина Наталья Андреевна</text:p>
          </table:table-cell>
          <table:table-cell office:value-type="string" calcext:value-type="string">
            <text:p>0432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07" calcext:value-type="float">
            <text:p>26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Ромашина Елена Александровна</text:p>
          </table:table-cell>
          <table:table-cell office:value-type="string" calcext:value-type="string">
            <text:p>sch8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08" calcext:value-type="float">
            <text:p>261008</text:p>
          </table:table-cell>
          <table:table-cell office:value-type="string" calcext:value-type="string">
            <text:p>$2y$10$h0wkdksy6KFlLZwEnGgvmemPPe0SqgPu8sFEguZmLFfIK1JhY12BW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Хайруллина Гульназ Наиловна</text:p>
          </table:table-cell>
          <table:table-cell office:value-type="string" calcext:value-type="string">
            <text:p><text:span text:style-name="T1"><text:a xlink:href="mailto:261009@mail.m" xlink:type="simple">261009@mail.m</text:a></text:span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09" calcext:value-type="float">
            <text:p>261009</text:p>
          </table:table-cell>
          <table:table-cell office:value-type="string" calcext:value-type="string">
            <text:p>$2y$10$C1Z6gQ27aNxgm33uMmKt/ef6tGQqaS0no.fGyWp8PzytXivtWm3om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Шарипова Динария Фанусовна</text:p>
          </table:table-cell>
          <table:table-cell office:value-type="string" calcext:value-type="string">
            <text:p>0435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0" calcext:value-type="float">
            <text:p>26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Колбашева Гульнара Галиевна</text:p>
          </table:table-cell>
          <table:table-cell office:value-type="string" calcext:value-type="string">
            <text:p>sch11_nab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1" calcext:value-type="float">
            <text:p>261011</text:p>
          </table:table-cell>
          <table:table-cell office:value-type="string" calcext:value-type="string">
            <text:p>$2y$10$l.p4nTSWbBZbMD86FMFw1emSrWQvbierAUN7gs9zl505inrE2AEWS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Шафигуллина Лидия Алексеевна</text:p>
          </table:table-cell>
          <table:table-cell office:value-type="string" calcext:value-type="string">
            <text:p>0437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3" calcext:value-type="float">
            <text:p>261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Степанова Марина Владимировна </text:p>
          </table:table-cell>
          <table:table-cell office:value-type="string" calcext:value-type="string">
            <text:p>0438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5" calcext:value-type="float">
            <text:p>261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Фазуллина Светлана Владимировна</text:p>
          </table:table-cell>
          <table:table-cell office:value-type="string" calcext:value-type="string">
            <text:p>0439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6" calcext:value-type="float">
            <text:p>261016</text:p>
          </table:table-cell>
          <table:table-cell office:value-type="string" calcext:value-type="string">
            <text:p>$2y$10$eh7k7Nd0I8hBBHnFwMqPD.uOF9DjyWE9lDu1tqeYwr6o1y9pYgTMC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Богачева Наталья Валентиновна</text:p>
          </table:table-cell>
          <table:table-cell office:value-type="string" calcext:value-type="string">
            <text:p>044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7" calcext:value-type="float">
            <text:p>261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Князева Любовь Леонидовна</text:p>
          </table:table-cell>
          <table:table-cell office:value-type="string" calcext:value-type="string">
            <text:p>sch19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19" calcext:value-type="float">
            <text:p>261019</text:p>
          </table:table-cell>
          <table:table-cell office:value-type="string" calcext:value-type="string">
            <text:p>$2y$10$CkQK1amLtF5K/sPjHdZ/n.EADvoJ8dRb0kHxtZccYyUMVajIS73B6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Коварина Альбина Галинуровна</text:p>
          </table:table-cell>
          <table:table-cell office:value-type="string" calcext:value-type="string">
            <text:p>0442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0" calcext:value-type="float">
            <text:p>261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Шакирова Розалия Хиразетдинова</text:p>
          </table:table-cell>
          <table:table-cell office:value-type="string" calcext:value-type="string">
            <text:p>Shakirovar-1971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1" calcext:value-type="float">
            <text:p>261021</text:p>
          </table:table-cell>
          <table:table-cell office:value-type="string" calcext:value-type="string">
            <text:p>$2y$10$uVsoTc0V5pO/P9gtrKHome5WAkQw3d.kNd9sH2JS2dGdAhNkMYutC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Беляева Асфия Шарифхановна</text:p>
          </table:table-cell>
          <table:table-cell office:value-type="string" calcext:value-type="string">
            <text:p>0444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2" calcext:value-type="float">
            <text:p>261022</text:p>
          </table:table-cell>
          <table:table-cell office:value-type="string" calcext:value-type="string">
            <text:p>$2y$10$dQEauG.rEtOocS9884S25ecM3Cz4JMXosF0G/MohF0fqCtZg7.lqq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Яковлева Елена Владимировна</text:p>
          </table:table-cell>
          <table:table-cell office:value-type="string" calcext:value-type="string">
            <text:p>sch23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3" calcext:value-type="float">
            <text:p>261023</text:p>
          </table:table-cell>
          <table:table-cell office:value-type="string" calcext:value-type="string">
            <text:p>$2y$10$MuHKE91CPyeJTyKxvwbeuOAkFm91r0/sZMV6GmA8WCNw4HZK5rtom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Бадыкшанова Айгуль Рафиковна</text:p>
          </table:table-cell>
          <table:table-cell office:value-type="string" calcext:value-type="string">
            <text:p>0446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4" calcext:value-type="float">
            <text:p>261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Абдуллина Эльвира Фирдусовна</text:p>
          </table:table-cell>
          <table:table-cell office:value-type="string" calcext:value-type="string">
            <text:p>aef_1977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5" calcext:value-type="float">
            <text:p>261025</text:p>
          </table:table-cell>
          <table:table-cell office:value-type="string" calcext:value-type="string">
            <text:p>$2y$10$zeMz3qGEhIdf8ds.hX2K1ua7k1NT3FktfspT5v4wsHEeNne6ZUiLa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Роденко Евгения Валерьевна</text:p>
          </table:table-cell>
          <table:table-cell office:value-type="string" calcext:value-type="string">
            <text:p>rodenko_e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6" calcext:value-type="float">
            <text:p>261026</text:p>
          </table:table-cell>
          <table:table-cell office:value-type="string" calcext:value-type="string">
            <text:p>$2y$10$f6QsB9Dr5Sihu6N31QwSuu/NYeBhnrW7i.n0ouRUGu67lFwghlrzG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Сираева Эльвира Талиповна</text:p>
          </table:table-cell>
          <table:table-cell office:value-type="string" calcext:value-type="string">
            <text:p>0449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7" calcext:value-type="float">
            <text:p>261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Багаутдинова Дания Василовна</text:p>
          </table:table-cell>
          <table:table-cell office:value-type="string" calcext:value-type="string">
            <text:p>045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28" calcext:value-type="float">
            <text:p>261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Салимова Эльвера Раифовна</text:p>
          </table:table-cell>
          <table:table-cell office:value-type="string" calcext:value-type="string">
            <text:p>sch30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0" calcext:value-type="float">
            <text:p>261030</text:p>
          </table:table-cell>
          <table:table-cell office:value-type="string" calcext:value-type="string">
            <text:p>$2y$10$sLtYl5MoQ7XDAg/HDnTV4.x/y2ZABKPRPCy7ZiKiw3J3NcfFnpaLO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Галеева Эвелина Шамилевна</text:p>
          </table:table-cell>
          <table:table-cell office:value-type="string" calcext:value-type="string">
            <text:p>govfoda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1" calcext:value-type="float">
            <text:p>261031</text:p>
          </table:table-cell>
          <table:table-cell office:value-type="string" calcext:value-type="string">
            <text:p>$2y$10$MxXO//HXqxvMVinxmDqCzOOTEY2gs.1vCG4cY/IVjmmzDjf8sCrNW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Белоусова Елена Васильевна</text:p>
          </table:table-cell>
          <table:table-cell office:value-type="string" calcext:value-type="string">
            <text:p>0453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2" calcext:value-type="float">
            <text:p>261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Урманчеева Светлана Александровна</text:p>
          </table:table-cell>
          <table:table-cell office:value-type="string" calcext:value-type="string">
            <text:p>sofiy_70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3" calcext:value-type="float">
            <text:p>261033</text:p>
          </table:table-cell>
          <table:table-cell office:value-type="string" calcext:value-type="string">
            <text:p>$2y$10$pU/PYFTrFJB9JXYfdDknfOnXS8UE.d/uc0x.N9U7TLjkN8SMBcYo.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Любимова Дарья Изетовна</text:p>
          </table:table-cell>
          <table:table-cell office:value-type="string" calcext:value-type="string">
            <text:p>sch34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4" calcext:value-type="float">
            <text:p>261034</text:p>
          </table:table-cell>
          <table:table-cell office:value-type="string" calcext:value-type="string">
            <text:p>$2y$10$9Z5QzLZNBXNdjSMpxViMw.YTEtb113SmY1pL4N4wtBFkyQxhfv93u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Валеева Диляра Равилевна</text:p>
          </table:table-cell>
          <table:table-cell office:value-type="string" calcext:value-type="string">
            <text:p>0456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5" calcext:value-type="float">
            <text:p>261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Шерунова Екатерина Васильевна</text:p>
          </table:table-cell>
          <table:table-cell office:value-type="string" calcext:value-type="string">
            <text:p>0457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6" calcext:value-type="float">
            <text:p>26103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Кожевникова Людмила Анатольевна</text:p>
          </table:table-cell>
          <table:table-cell office:value-type="string" calcext:value-type="string">
            <text:p>0458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7" calcext:value-type="float">
            <text:p>261037</text:p>
          </table:table-cell>
          <table:table-cell office:value-type="string" calcext:value-type="string">
            <text:p>$2y$10$yMsKWsUMRvyp02fbxO2AzuIZ8GBgl8GODUPpbFtu1hEjMqPhDtl3m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Антонова Людмила Анатольевна</text:p>
          </table:table-cell>
          <table:table-cell office:value-type="string" calcext:value-type="string">
            <text:p>0459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8" calcext:value-type="float">
            <text:p>26103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Салахова Мария Владимировна</text:p>
          </table:table-cell>
          <table:table-cell office:value-type="string" calcext:value-type="string">
            <text:p>046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39" calcext:value-type="float">
            <text:p>261039</text:p>
          </table:table-cell>
          <table:table-cell office:value-type="string" calcext:value-type="string">
            <text:p>$2y$10$q9xPDxTdrGFbvp9dLP2zvuT53zbTXHopVsn53/tmYocAwRJgOvz0O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Хабирова Раушания Ильгизовна</text:p>
          </table:table-cell>
          <table:table-cell office:value-type="string" calcext:value-type="string">
            <text:p>rushana0780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0" calcext:value-type="float">
            <text:p>261040</text:p>
          </table:table-cell>
          <table:table-cell office:value-type="string" calcext:value-type="string">
            <text:p>$2y$10$.uvxOQJ6F9kBGWUlE33AQ.b2AfME/HcLoc7ef9kj9taPeRrlepVK2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Таврук Юлия Викторовна</text:p>
          </table:table-cell>
          <table:table-cell office:value-type="string" calcext:value-type="string">
            <text:p>tavruk.yuliya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1" calcext:value-type="float">
            <text:p>261041</text:p>
          </table:table-cell>
          <table:table-cell office:value-type="string" calcext:value-type="string">
            <text:p>$2y$10$Fzd16Dg1F2n4tOItb9uQbutUCsaSxcSzGGBGa02LbXZLAcK0BuJI2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Еремина Людмила Николаевна</text:p>
          </table:table-cell>
          <table:table-cell office:value-type="string" calcext:value-type="string">
            <text:p>0463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2" calcext:value-type="float">
            <text:p>261042</text:p>
          </table:table-cell>
          <table:table-cell office:value-type="string" calcext:value-type="string">
            <text:p>$2y$10$EMQ0kQCrTaJ/wQ6c5tqyQO5yWCjlMmT8nDptHl28IpwoPPPkfKmIC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Мухаметова Алсу Вазиловна</text:p>
          </table:table-cell>
          <table:table-cell office:value-type="string" calcext:value-type="string">
            <text:p>0464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3" calcext:value-type="float">
            <text:p>26104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Гараева Жанна Григорьевна</text:p>
          </table:table-cell>
          <table:table-cell office:value-type="string" calcext:value-type="string">
            <text:p>sch44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4" calcext:value-type="float">
            <text:p>261044</text:p>
          </table:table-cell>
          <table:table-cell office:value-type="string" calcext:value-type="string">
            <text:p>$2y$10$0tWTdB4JRDZn5KDRvifZdeDG3JfGDhE/0eQgMKZOIvGk3g3qaDU/.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Насибуллина Айгуль Радиковна</text:p>
          </table:table-cell>
          <table:table-cell office:value-type="string" calcext:value-type="string">
            <text:p>nasibullina-18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5" calcext:value-type="float">
            <text:p>261045</text:p>
          </table:table-cell>
          <table:table-cell office:value-type="string" calcext:value-type="string">
            <text:p>$2y$10$Kj54eHMECAqHZY/JHy0jtez0YWe3oLm/u0/icrZ/8ymGWnl4mE2Wq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Багаутдинова Лилия Исмагиловна</text:p>
          </table:table-cell>
          <table:table-cell office:value-type="string" calcext:value-type="string">
            <text:p>0467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6" calcext:value-type="float">
            <text:p>26104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Етриванова Марина Николаевна</text:p>
          </table:table-cell>
          <table:table-cell office:value-type="string" calcext:value-type="string">
            <text:p>sch47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7" calcext:value-type="float">
            <text:p>261047</text:p>
          </table:table-cell>
          <table:table-cell office:value-type="string" calcext:value-type="string">
            <text:p>$2y$10$HmzWUMeWD5temvsQCrzVpe4uHBaEybm4zTAWKZBhjW.Z7VorgPftq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Пантина Земфира Халимовна</text:p>
          </table:table-cell>
          <table:table-cell office:value-type="string" calcext:value-type="string">
            <text:p>5143000204@edu.tatar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8" calcext:value-type="float">
            <text:p>261048</text:p>
          </table:table-cell>
          <table:table-cell office:value-type="string" calcext:value-type="string">
            <text:p>$2y$10$SSqD9j4NQ1LWuc9uKpAh/.iOrnyVYJK3tCZeyJtI/zz7IVMJeb8jW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Шехерева Диляра Абулгасовна</text:p>
          </table:table-cell>
          <table:table-cell office:value-type="string" calcext:value-type="string">
            <text:p>047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49" calcext:value-type="float">
            <text:p>26104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Афанасьева Наталья Геннадьевна</text:p>
          </table:table-cell>
          <table:table-cell office:value-type="string" calcext:value-type="string">
            <text:p><text:a xlink:href="mailto:261050@mail.m" xlink:type="simple">261050@mail.m</text:a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0" calcext:value-type="float">
            <text:p>261050</text:p>
          </table:table-cell>
          <table:table-cell office:value-type="string" calcext:value-type="string">
            <text:p>$2y$10$OWOMiaIeEbLNTD012LxzXeAjS/dEWwNsIBbe6MgwXEgCQbOW4s/AS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Кустовская Татьяна Васильевна</text:p>
          </table:table-cell>
          <table:table-cell office:value-type="string" calcext:value-type="string">
            <text:p>gurova-77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1" calcext:value-type="float">
            <text:p>261051</text:p>
          </table:table-cell>
          <table:table-cell office:value-type="string" calcext:value-type="string">
            <text:p>$2y$10$MsF9wxzPZ64z59cyWXxAd.6cweWYg4OcAoejtQINIxhulVRmMPgh2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Усманова Ильмира Ирековна</text:p>
          </table:table-cell>
          <table:table-cell office:value-type="string" calcext:value-type="string">
            <text:p>0473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3" calcext:value-type="float">
            <text:p>26105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Кустова Светлана Максимовна</text:p>
          </table:table-cell>
          <table:table-cell office:value-type="string" calcext:value-type="string">
            <text:p>s.kustova20@yandex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5" calcext:value-type="float">
            <text:p>261055</text:p>
          </table:table-cell>
          <table:table-cell office:value-type="string" calcext:value-type="string">
            <text:p>$2y$10$smLq75cxUANH8ggefIh64eV0xpFK7nZsB76c5hWSG5UL.uzPo0E/C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Шайдуллина Римма Рафаэлевна</text:p>
          </table:table-cell>
          <table:table-cell office:value-type="string" calcext:value-type="string">
            <text:p>0475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6" calcext:value-type="float">
            <text:p>26105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Лышова Юлия Валерьевна</text:p>
          </table:table-cell>
          <table:table-cell office:value-type="string" calcext:value-type="string">
            <text:p>0476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7" calcext:value-type="float">
            <text:p>26105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Шайдуллина Илюзя Ильфаковна</text:p>
          </table:table-cell>
          <table:table-cell office:value-type="string" calcext:value-type="string">
            <text:p>0477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59" calcext:value-type="float">
            <text:p>26105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Секунова Наталья Николаевна</text:p>
          </table:table-cell>
          <table:table-cell office:value-type="string" calcext:value-type="string">
            <text:p>sch60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60" calcext:value-type="float">
            <text:p>261060</text:p>
          </table:table-cell>
          <table:table-cell office:value-type="string" calcext:value-type="string">
            <text:p>$2y$10$DOPMicumIpm.V9WA2iKtnOsTh7ohZce9YLBiJ9b37Mn//PA9piMbS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Чухно Наталья Анатольевна</text:p>
          </table:table-cell>
          <table:table-cell office:value-type="string" calcext:value-type="string">
            <text:p>0479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61" calcext:value-type="float">
            <text:p>26106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Рыжкова Ольга Вячеславовна</text:p>
          </table:table-cell>
          <table:table-cell office:value-type="string" calcext:value-type="string">
            <text:p>048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62" calcext:value-type="float">
            <text:p>26106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Галлямова Галина Павловна</text:p>
          </table:table-cell>
          <table:table-cell office:value-type="string" calcext:value-type="string">
            <text:p>0481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64" calcext:value-type="float">
            <text:p>26106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Шумнова Ольга Алепександровна </text:p>
          </table:table-cell>
          <table:table-cell office:value-type="string" calcext:value-type="string">
            <text:p>0482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75" calcext:value-type="float">
            <text:p>26107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Динмухаметова Елена Анатольевна</text:p>
          </table:table-cell>
          <table:table-cell office:value-type="string" calcext:value-type="string">
            <text:p>0483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76" calcext:value-type="float">
            <text:p>26107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Кремнева Алена Сергеевна</text:p>
          </table:table-cell>
          <table:table-cell office:value-type="string" calcext:value-type="string">
            <text:p>licey78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78" calcext:value-type="float">
            <text:p>261078</text:p>
          </table:table-cell>
          <table:table-cell office:value-type="string" calcext:value-type="string">
            <text:p>$2y$10$sUPnN1um2SZxA5bTsFwWDu4s5HMtxELfwamR9pXxRJJdrJ8hgC3Cy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Гиндуллина Зухра Робертовна</text:p>
          </table:table-cell>
          <table:table-cell office:value-type="string" calcext:value-type="string">
            <text:p>0485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80" calcext:value-type="float">
            <text:p>26108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Фахриева Ирина Ильдусовна</text:p>
          </table:table-cell>
          <table:table-cell office:value-type="string" calcext:value-type="string">
            <text:p>kalkan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81" calcext:value-type="float">
            <text:p>261081</text:p>
          </table:table-cell>
          <table:table-cell office:value-type="string" calcext:value-type="string">
            <text:p>$2y$10$1UNrsGmcZ73s1xrqRO9Zb.YXTD4ygFqbBaZ0QQpAbHycdeXmhVo5.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Фаляхиева Альбина Масхудовна</text:p>
          </table:table-cell>
          <table:table-cell office:value-type="string" calcext:value-type="string">
            <text:p>0487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82" calcext:value-type="float">
            <text:p>26108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Прудникова Светлана Вячеславовна</text:p>
          </table:table-cell>
          <table:table-cell office:value-type="string" calcext:value-type="string">
            <text:p>coplgto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83" calcext:value-type="float">
            <text:p>261083</text:p>
          </table:table-cell>
          <table:table-cell office:value-type="string" calcext:value-type="string">
            <text:p>$2y$10$UUfe/z8eOZrd2bXy7Er21uqTtRIw3l0wKc3hd5FKf1qYHCgs3fjr6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Шахмаева Елена Николаевна</text:p>
          </table:table-cell>
          <table:table-cell office:value-type="string" calcext:value-type="string">
            <text:p>Lena_ymnica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86" calcext:value-type="float">
            <text:p>261086</text:p>
          </table:table-cell>
          <table:table-cell office:value-type="string" calcext:value-type="string">
            <text:p>$2y$10$eMF93Zw81WDZo2ArN/UDb.YAlNMKleI1TMSXBvS/LNhcjdLvk1wSe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Мухаметзянова Роза Геннадьевна</text:p>
          </table:table-cell>
          <table:table-cell office:value-type="string" calcext:value-type="string">
            <text:p>049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1087" calcext:value-type="float">
            <text:p>26108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Тимофеева Гульшат Зуфаровна</text:p>
          </table:table-cell>
          <table:table-cell office:value-type="string" calcext:value-type="string">
            <text:p>denisgulchat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02" calcext:value-type="float">
            <text:p>263002</text:p>
          </table:table-cell>
          <table:table-cell office:value-type="string" calcext:value-type="string">
            <text:p>$2y$10$f5ZGEXWvtCxkXp4wsC5zQeQMW9EHOO9zgY6YSDywGWs6FcI/lKXNu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Петрова Юлия Викторовна</text:p>
          </table:table-cell>
          <table:table-cell office:value-type="string" calcext:value-type="string">
            <text:p><text:a xlink:href="mailto:263003@mail.m" xlink:type="simple">263003@mail.m</text:a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03" calcext:value-type="float">
            <text:p>263003</text:p>
          </table:table-cell>
          <table:table-cell office:value-type="string" calcext:value-type="string">
            <text:p>$2y$10$qWeF3K06ks2WhSrhDYnow.GGt7w6V1xm6gfw57VbcXaAsUE9AI6xi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Шайдуллина Дильфара Наилевна</text:p>
          </table:table-cell>
          <table:table-cell office:value-type="string" calcext:value-type="string">
            <text:p>0493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04" calcext:value-type="float">
            <text:p>263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Гарипова Ляйсан Халимовна</text:p>
          </table:table-cell>
          <table:table-cell office:value-type="string" calcext:value-type="string">
            <text:p>lsakhap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12" calcext:value-type="float">
            <text:p>263012</text:p>
          </table:table-cell>
          <table:table-cell office:value-type="string" calcext:value-type="string">
            <text:p>$2y$10$xO6ma5jaIzKX8YyRTdqxv.T3uWC.4HhvfW2Tftq7ydFRZVIHnOf2i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Хазиева Эльвера Рашитовна</text:p>
          </table:table-cell>
          <table:table-cell office:value-type="string" calcext:value-type="string">
            <text:p>elverahazieva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18" calcext:value-type="float">
            <text:p>263018</text:p>
          </table:table-cell>
          <table:table-cell office:value-type="string" calcext:value-type="string">
            <text:p>$2y$10$v0Iw9zHx2gOtmd/Pw2N70uT/Pkj11HuZp9dTGwzUaIy0o2sOx8Xh6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Газизова Ильсеяр Халисовна</text:p>
          </table:table-cell>
          <table:table-cell office:value-type="string" calcext:value-type="string">
            <text:p>0496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29" calcext:value-type="float">
            <text:p>263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Зарипова Алия Фанисовна</text:p>
          </table:table-cell>
          <table:table-cell office:value-type="string" calcext:value-type="string">
            <text:p><text:a xlink:href="mailto:263052@mail.m" xlink:type="simple">263052@mail.m</text:a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52" calcext:value-type="float">
            <text:p>263052</text:p>
          </table:table-cell>
          <table:table-cell office:value-type="string" calcext:value-type="string">
            <text:p>$2y$10$UVabduPOdV6N2BiKBkvO9ukqw0FXw1PTd1RCxgXZ3mVtSaBLsqz96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Хатипова Эльмира Ильфатовна</text:p>
          </table:table-cell>
          <table:table-cell office:value-type="string" calcext:value-type="string">
            <text:p>gim54-chelny@yandex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54" calcext:value-type="float">
            <text:p>263054</text:p>
          </table:table-cell>
          <table:table-cell office:value-type="string" calcext:value-type="string">
            <text:p>$2y$10$.YxmZRz1dU2ugj0m7.oV5O1BtUhKWN6Cklh0iVtvPPEN.FHpwNEkm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Фаррахова Альфира Рифкатовна</text:p>
          </table:table-cell>
          <table:table-cell office:value-type="string" calcext:value-type="string">
            <text:p>0499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58" calcext:value-type="float">
            <text:p>263058</text:p>
          </table:table-cell>
          <table:table-cell office:value-type="string" calcext:value-type="string">
            <text:p>$2y$10$1tALn79l1l8erXhj2CQJcuqKKrw3OLiTLlG3ehZcwkl04fiU3zG.O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Биктагирова Светлана Гумеровна</text:p>
          </table:table-cell>
          <table:table-cell office:value-type="string" calcext:value-type="string">
            <text:p>0500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79" calcext:value-type="float">
            <text:p>26307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Сафиуллин Ильшат Тагирович</text:p>
          </table:table-cell>
          <table:table-cell office:value-type="string" calcext:value-type="string">
            <text:p>0501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3084" calcext:value-type="float">
            <text:p>26308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Тимербаева Гузель Хамитовна</text:p>
          </table:table-cell>
          <table:table-cell office:value-type="string" calcext:value-type="string">
            <text:p>0502@mail.m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5001" calcext:value-type="float">
            <text:p>26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Зеленина Ирина Маратовна</text:p>
          </table:table-cell>
          <table:table-cell office:value-type="string" calcext:value-type="string">
            <text:p>z.irina38@bk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5002" calcext:value-type="float">
            <text:p>265002</text:p>
          </table:table-cell>
          <table:table-cell office:value-type="string" calcext:value-type="string">
            <text:p>$2y$10$26BhQ6q63Tvf.8kv3puQJe4FASznpQYmg7TdcpVm225NnT2q0.ytq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Хафизова Гульнара Якубовна</text:p>
          </table:table-cell>
          <table:table-cell office:value-type="string" calcext:value-type="string">
            <text:p>0504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01" calcext:value-type="float">
            <text:p>27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Басырова Разида Заудатовна</text:p>
          </table:table-cell>
          <table:table-cell office:value-type="string" calcext:value-type="string">
            <text:p>0505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03" calcext:value-type="float">
            <text:p>272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Петрова Валентина Николаевна</text:p>
          </table:table-cell>
          <table:table-cell office:value-type="string" calcext:value-type="string">
            <text:p>0506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04" calcext:value-type="float">
            <text:p>27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Алексеева Ольга Анатольевна</text:p>
          </table:table-cell>
          <table:table-cell office:value-type="string" calcext:value-type="string">
            <text:p>0507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05" calcext:value-type="float">
            <text:p>27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Насибулллова Фарида Шамилевна</text:p>
          </table:table-cell>
          <table:table-cell office:value-type="string" calcext:value-type="string">
            <text:p>0508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08" calcext:value-type="float">
            <text:p>27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Долгов Иван Петрович</text:p>
          </table:table-cell>
          <table:table-cell office:value-type="string" calcext:value-type="string">
            <text:p>0509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09" calcext:value-type="float">
            <text:p>27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Казакова Светлана Георгиевна</text:p>
          </table:table-cell>
          <table:table-cell office:value-type="string" calcext:value-type="string">
            <text:p>0510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10" calcext:value-type="float">
            <text:p>27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Буланова Елена Валерьяновна</text:p>
          </table:table-cell>
          <table:table-cell office:value-type="string" calcext:value-type="string">
            <text:p>0511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11" calcext:value-type="float">
            <text:p>27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Копьева Лариса Николаевна</text:p>
          </table:table-cell>
          <table:table-cell office:value-type="string" calcext:value-type="string">
            <text:p>0512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14" calcext:value-type="float">
            <text:p>27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Мишкина Валентина Ивановна</text:p>
          </table:table-cell>
          <table:table-cell office:value-type="string" calcext:value-type="string">
            <text:p>0513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16" calcext:value-type="float">
            <text:p>27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Журавлев Валерий Васильевич</text:p>
          </table:table-cell>
          <table:table-cell office:value-type="string" calcext:value-type="string">
            <text:p>0514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17" calcext:value-type="float">
            <text:p>27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Бахитова Гулия Мансуровна</text:p>
          </table:table-cell>
          <table:table-cell office:value-type="string" calcext:value-type="string">
            <text:p>0515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20" calcext:value-type="float">
            <text:p>272020</text:p>
          </table:table-cell>
          <table:table-cell office:value-type="string" calcext:value-type="string">
            <text:p>$2y$10$0n/IB9L5XuTBST4OPrPOje.9dM7GJ1Q1zkAAG4.QCei.5tEk6QwVu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Юманова Татьяна Валерьевна</text:p>
          </table:table-cell>
          <table:table-cell office:value-type="string" calcext:value-type="string">
            <text:p>0516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22" calcext:value-type="float">
            <text:p>27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Тарасова Валентина Николаевна</text:p>
          </table:table-cell>
          <table:table-cell office:value-type="string" calcext:value-type="string">
            <text:p>0517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26" calcext:value-type="float">
            <text:p>272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Краснова Тамара Виталиевна</text:p>
          </table:table-cell>
          <table:table-cell office:value-type="string" calcext:value-type="string">
            <text:p>0518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30" calcext:value-type="float">
            <text:p>2720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Куликова Лариса Фадеевна</text:p>
          </table:table-cell>
          <table:table-cell office:value-type="string" calcext:value-type="string">
            <text:p>0519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32" calcext:value-type="float">
            <text:p>272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Мартынова Ольга Петровна</text:p>
          </table:table-cell>
          <table:table-cell office:value-type="string" calcext:value-type="string">
            <text:p>0520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2036" calcext:value-type="float">
            <text:p>27203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Якупова Эльмира Рамисовна</text:p>
          </table:table-cell>
          <table:table-cell office:value-type="string" calcext:value-type="string">
            <text:p>0521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02" calcext:value-type="float">
            <text:p>274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Низамова Альбина Ильдусовна</text:p>
          </table:table-cell>
          <table:table-cell office:value-type="string" calcext:value-type="string">
            <text:p>0522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06" calcext:value-type="float">
            <text:p>27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Калимова Гульнара Раисовна</text:p>
          </table:table-cell>
          <table:table-cell office:value-type="string" calcext:value-type="string">
            <text:p>0523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07" calcext:value-type="float">
            <text:p>27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Миначева Гульчачак Камиловна</text:p>
          </table:table-cell>
          <table:table-cell office:value-type="string" calcext:value-type="string">
            <text:p>0524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12" calcext:value-type="float">
            <text:p>27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Фахрутдинова Миляуша Энверовна</text:p>
          </table:table-cell>
          <table:table-cell office:value-type="string" calcext:value-type="string">
            <text:p>0525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13" calcext:value-type="float">
            <text:p>27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Халимова Наиля Зямиловна</text:p>
          </table:table-cell>
          <table:table-cell office:value-type="string" calcext:value-type="string">
            <text:p>0526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15" calcext:value-type="float">
            <text:p>27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Кириллова Галина Вавиловна</text:p>
          </table:table-cell>
          <table:table-cell office:value-type="string" calcext:value-type="string">
            <text:p>0527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18" calcext:value-type="float">
            <text:p>27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Хисаметдинова Венера Рашитовна</text:p>
          </table:table-cell>
          <table:table-cell office:value-type="string" calcext:value-type="string">
            <text:p>0528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19" calcext:value-type="float">
            <text:p>27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Халитова Гузель Шамельбековна</text:p>
          </table:table-cell>
          <table:table-cell office:value-type="string" calcext:value-type="string">
            <text:p>0529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21" calcext:value-type="float">
            <text:p>27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Айнутдинова Лилия Ахмедулловна</text:p>
          </table:table-cell>
          <table:table-cell office:value-type="string" calcext:value-type="string">
            <text:p>0530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23" calcext:value-type="float">
            <text:p>27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Ханзярова Гузалия Рифкатовна</text:p>
          </table:table-cell>
          <table:table-cell office:value-type="string" calcext:value-type="string">
            <text:p>0531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29" calcext:value-type="float">
            <text:p>274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Алимбикова Гузелия Садятулловна</text:p>
          </table:table-cell>
          <table:table-cell office:value-type="string" calcext:value-type="string">
            <text:p>0532@mail.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4034" calcext:value-type="float">
            <text:p>274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Гайфутдинова Люция Ринатовна</text:p>
          </table:table-cell>
          <table:table-cell office:value-type="string" calcext:value-type="string">
            <text:p>0533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1" calcext:value-type="float">
            <text:p>28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Паранина Елена Николаевна</text:p>
          </table:table-cell>
          <table:table-cell office:value-type="string" calcext:value-type="string">
            <text:p>elena.paranina@mail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2" calcext:value-type="float">
            <text:p>281002</text:p>
          </table:table-cell>
          <table:table-cell office:value-type="string" calcext:value-type="string">
            <text:p>$2y$10$HRV5VJEiz5kTeTvfwoA1wegrIfgHhT6xcSxwlAGw7pQapXEhMWNhG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Полуйко Наталья Геннадьевна</text:p>
          </table:table-cell>
          <table:table-cell office:value-type="string" calcext:value-type="string">
            <text:p>0535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3" calcext:value-type="float">
            <text:p>281003</text:p>
          </table:table-cell>
          <table:table-cell office:value-type="string" calcext:value-type="string">
            <text:p>$2y$10$palSWa71PXDiyvfxWt90C.ZRX.mv67LJfeLVYwWFOrRzzIQHkqQgy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Айдашева Кадрия Амирзяновна</text:p>
          </table:table-cell>
          <table:table-cell office:value-type="string" calcext:value-type="string">
            <text:p>0536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4" calcext:value-type="float">
            <text:p>281004</text:p>
          </table:table-cell>
          <table:table-cell office:value-type="string" calcext:value-type="string">
            <text:p>$2y$10$cpjrhFnBzmzjhfGc4fsrgOnQEjocFdBE3Ks4Y9ppQgU7lzItnS0su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Пчеловодова Татьяна Вячеславовна</text:p>
          </table:table-cell>
          <table:table-cell office:value-type="string" calcext:value-type="string">
            <text:p>0537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5" calcext:value-type="float">
            <text:p>281005</text:p>
          </table:table-cell>
          <table:table-cell office:value-type="string" calcext:value-type="string">
            <text:p>$2y$10$6/gRABrVNqfHKzZSM3uRhOYEWABkn0EHLvaKSOw6GVdQymtTovtP2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Константинова Татьяна Николаевна</text:p>
          </table:table-cell>
          <table:table-cell office:value-type="string" calcext:value-type="string">
            <text:p>0538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6" calcext:value-type="float">
            <text:p>28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Пономарева Ксения Яковлевна</text:p>
          </table:table-cell>
          <table:table-cell office:value-type="string" calcext:value-type="string">
            <text:p>0539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8" calcext:value-type="float">
            <text:p>28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Дружинина Ольга Сергеевна</text:p>
          </table:table-cell>
          <table:table-cell office:value-type="string" calcext:value-type="string">
            <text:p>russkiholga2013@yandex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09" calcext:value-type="float">
            <text:p>281009</text:p>
          </table:table-cell>
          <table:table-cell office:value-type="string" calcext:value-type="string">
            <text:p>$2y$10$m7zKSoBqUyOO.BIIrdA9ZuukdegSZlH/Qjwblpiscd/LX0yLpqAeq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Закирова Эльмира Равилевна</text:p>
          </table:table-cell>
          <table:table-cell office:value-type="string" calcext:value-type="string">
            <text:p>elmira.zakirova76@mail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10" calcext:value-type="float">
            <text:p>281010</text:p>
          </table:table-cell>
          <table:table-cell office:value-type="string" calcext:value-type="string">
            <text:p>$2y$10$Y..pROrh6qc7Z9RkBNz6/.f/.m3lYIcEnDd.knvEJUC0Eh2b76e5i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Бикбулатова Юлия Сергеевна</text:p>
          </table:table-cell>
          <table:table-cell office:value-type="string" calcext:value-type="string">
            <text:p>0542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1026" calcext:value-type="float">
            <text:p>281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Лобанова Елена Александровна</text:p>
          </table:table-cell>
          <table:table-cell office:value-type="string" calcext:value-type="string">
            <text:p>0543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07" calcext:value-type="float">
            <text:p>28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Колчина Светлана Михайловна</text:p>
          </table:table-cell>
          <table:table-cell office:value-type="string" calcext:value-type="string">
            <text:p>1822000094@edu.tatar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14" calcext:value-type="float">
            <text:p>282014</text:p>
          </table:table-cell>
          <table:table-cell office:value-type="string" calcext:value-type="string">
            <text:p>$2y$10$q.yrEpbbUEMQKycAmmOrN.Q/CcEeeaV7GIdX6vh7NQ3U4NGAGe5qC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Чубарева Юлия Николаевна</text:p>
          </table:table-cell>
          <table:table-cell office:value-type="string" calcext:value-type="string">
            <text:p>smh_chub_fam@mail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16" calcext:value-type="float">
            <text:p>282016</text:p>
          </table:table-cell>
          <table:table-cell office:value-type="string" calcext:value-type="string">
            <text:p>$2y$10$BNVGnpdDdh.FjIHaV9OkieMuSwJkV3Gg8PPfCK8TAllZWnnvSWGAy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Егорова Надежда Ивановна</text:p>
          </table:table-cell>
          <table:table-cell office:value-type="string" calcext:value-type="string">
            <text:p>0546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17" calcext:value-type="float">
            <text:p>28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Липина Светлана Юрьевна</text:p>
          </table:table-cell>
          <table:table-cell office:value-type="string" calcext:value-type="string">
            <text:p>0547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18" calcext:value-type="float">
            <text:p>282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Хачатрян Ирина <text:s/>Ивановна</text:p>
          </table:table-cell>
          <table:table-cell office:value-type="string" calcext:value-type="string">
            <text:p>Slek.Elb@tatar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21" calcext:value-type="float">
            <text:p>282021</text:p>
          </table:table-cell>
          <table:table-cell office:value-type="string" calcext:value-type="string">
            <text:p>$2y$10$wDqMWQoXADClOAXGmF0Bu.LssUHQ7XSE9VJOOyTeVqY8PVO8HCG92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Харченко Ксенья Геннадьевна</text:p>
          </table:table-cell>
          <table:table-cell office:value-type="string" calcext:value-type="string">
            <text:p>0549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22" calcext:value-type="float">
            <text:p>28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Агафонова Лилия Газинуровна</text:p>
          </table:table-cell>
          <table:table-cell office:value-type="string" calcext:value-type="string">
            <text:p>lyalya.2000@mail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23" calcext:value-type="float">
            <text:p>282023</text:p>
          </table:table-cell>
          <table:table-cell office:value-type="string" calcext:value-type="string">
            <text:p>$2y$10$TU8qBcYxdubjUgwyGg9BjOUr7w6F8J3uhIBtuIVwlRfQoEPORtcNq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Миросанова Валентина Васильевна</text:p>
          </table:table-cell>
          <table:table-cell office:value-type="string" calcext:value-type="string">
            <text:p>0551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2024" calcext:value-type="float">
            <text:p>282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Гаделшина Эльмира Ильдаровна</text:p>
          </table:table-cell>
          <table:table-cell office:value-type="string" calcext:value-type="string">
            <text:p>G2.Elb@tatar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3011" calcext:value-type="float">
            <text:p>283011</text:p>
          </table:table-cell>
          <table:table-cell office:value-type="string" calcext:value-type="string">
            <text:p>$2y$10$pUvClajYOPCvBjfHCuXBvezXL9yqmh2VW8kHM21klcxN5u3UuqGM.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Фатыхова Разина Мударисовна</text:p>
          </table:table-cell>
          <table:table-cell office:value-type="string" calcext:value-type="string">
            <text:p>0553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3012" calcext:value-type="float">
            <text:p>283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Мухаметзянова Гульназ Сабирзяновна</text:p>
          </table:table-cell>
          <table:table-cell office:value-type="string" calcext:value-type="string">
            <text:p><text:a xlink:href="mailto:283013@mail.m" xlink:type="simple">283013@mail.m</text:a>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3013" calcext:value-type="float">
            <text:p>283013</text:p>
          </table:table-cell>
          <table:table-cell office:value-type="string" calcext:value-type="string">
            <text:p>$2y$10$gNNje/YCwgn9O9nx1u8n0OBZKpSzhXCSob3BAKCv7AXz8kF./46KG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Хусаинова Гульчачак Равиловна</text:p>
          </table:table-cell>
          <table:table-cell office:value-type="string" calcext:value-type="string">
            <text:p>0555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4015" calcext:value-type="float">
            <text:p>28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Губайдуллина Зульфира Ниязовна</text:p>
          </table:table-cell>
          <table:table-cell office:value-type="string" calcext:value-type="string">
            <text:p>0556@mail.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4020" calcext:value-type="float">
            <text:p>28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Слободина Елена Александровна</text:p>
          </table:table-cell>
          <table:table-cell office:value-type="string" calcext:value-type="string">
            <text:p>0557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1" calcext:value-type="float">
            <text:p>29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Галимова Розалия Кирамутдиновна</text:p>
          </table:table-cell>
          <table:table-cell office:value-type="string" calcext:value-type="string">
            <text:p>0558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2" calcext:value-type="float">
            <text:p>29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Ягудина Клара Гапбасовна</text:p>
          </table:table-cell>
          <table:table-cell office:value-type="string" calcext:value-type="string">
            <text:p>0559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3" calcext:value-type="float">
            <text:p>29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Калистратова Венера Зуфировна</text:p>
          </table:table-cell>
          <table:table-cell office:value-type="string" calcext:value-type="string">
            <text:p>0560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4" calcext:value-type="float">
            <text:p>29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Нуруллина Ильмира Александровна</text:p>
          </table:table-cell>
          <table:table-cell office:value-type="string" calcext:value-type="string">
            <text:p>0561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5" calcext:value-type="float">
            <text:p>29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Шакирова Гузаль Дамировна</text:p>
          </table:table-cell>
          <table:table-cell office:value-type="string" calcext:value-type="string">
            <text:p>0562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6" calcext:value-type="float">
            <text:p>29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Петрова Альфия Минирахмановна</text:p>
          </table:table-cell>
          <table:table-cell office:value-type="string" calcext:value-type="string">
            <text:p>0563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1007" calcext:value-type="float">
            <text:p>29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Саляхова Алина Исхаковна </text:p>
          </table:table-cell>
          <table:table-cell office:value-type="string" calcext:value-type="string">
            <text:p>0564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2008" calcext:value-type="float">
            <text:p>29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Мухтарова Гелюся Ирековна</text:p>
          </table:table-cell>
          <table:table-cell office:value-type="string" calcext:value-type="string">
            <text:p>0565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2013" calcext:value-type="float">
            <text:p>29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Архипова Юлия Леонидовна</text:p>
          </table:table-cell>
          <table:table-cell office:value-type="string" calcext:value-type="string">
            <text:p>0566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2016" calcext:value-type="float">
            <text:p>29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Зарипова Рамзия Рашитовна</text:p>
          </table:table-cell>
          <table:table-cell office:value-type="string" calcext:value-type="string">
            <text:p>0567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2017" calcext:value-type="float">
            <text:p>29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Шигабетдинова Лилия Равгатовна</text:p>
          </table:table-cell>
          <table:table-cell office:value-type="string" calcext:value-type="string">
            <text:p>0568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2021" calcext:value-type="float">
            <text:p>29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Жулева Татьяна Михайловна</text:p>
          </table:table-cell>
          <table:table-cell office:value-type="string" calcext:value-type="string">
            <text:p>0569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2022" calcext:value-type="float">
            <text:p>29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Бариев Рафил Миниразимович</text:p>
          </table:table-cell>
          <table:table-cell office:value-type="string" calcext:value-type="string">
            <text:p>0570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3028" calcext:value-type="float">
            <text:p>293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Цыганова Ольга Александровна</text:p>
          </table:table-cell>
          <table:table-cell office:value-type="string" calcext:value-type="string">
            <text:p>0571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10" calcext:value-type="float">
            <text:p>29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Прохорова Гульназ Музакировна</text:p>
          </table:table-cell>
          <table:table-cell office:value-type="string" calcext:value-type="string">
            <text:p>0572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11" calcext:value-type="float">
            <text:p>29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Ахметзянова Лилия Фаниловна</text:p>
          </table:table-cell>
          <table:table-cell office:value-type="string" calcext:value-type="string">
            <text:p>0573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12" calcext:value-type="float">
            <text:p>29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Ситдикова Такия Мизгатовна</text:p>
          </table:table-cell>
          <table:table-cell office:value-type="string" calcext:value-type="string">
            <text:p>0574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15" calcext:value-type="float">
            <text:p>29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Данилина Лейсан Николаевна</text:p>
          </table:table-cell>
          <table:table-cell office:value-type="string" calcext:value-type="string">
            <text:p>0575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18" calcext:value-type="float">
            <text:p>29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Фасхиева Рамиля Рашитовна</text:p>
          </table:table-cell>
          <table:table-cell office:value-type="string" calcext:value-type="string">
            <text:p>0576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24" calcext:value-type="float">
            <text:p>29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Ягафарова Рушания Хаматзакировна</text:p>
          </table:table-cell>
          <table:table-cell office:value-type="string" calcext:value-type="string">
            <text:p>0577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25" calcext:value-type="float">
            <text:p>29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Хабибуллина Гульзира Замиловна</text:p>
          </table:table-cell>
          <table:table-cell office:value-type="string" calcext:value-type="string">
            <text:p>0578@mail.m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4027" calcext:value-type="float">
            <text:p>294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Кириллова Ольга Владимировна</text:p>
          </table:table-cell>
          <table:table-cell office:value-type="string" calcext:value-type="string">
            <text:p>0579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2" calcext:value-type="float">
            <text:p>301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Емелина Юлия Борисовна</text:p>
          </table:table-cell>
          <table:table-cell office:value-type="string" calcext:value-type="string">
            <text:p>0580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3" calcext:value-type="float">
            <text:p>301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Хуснутдинова Татьяна Васильевна</text:p>
          </table:table-cell>
          <table:table-cell office:value-type="string" calcext:value-type="string">
            <text:p>0581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4" calcext:value-type="float">
            <text:p>301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Курникова Дарья Александровна</text:p>
          </table:table-cell>
          <table:table-cell office:value-type="string" calcext:value-type="string">
            <text:p>0582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5" calcext:value-type="float">
            <text:p>301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Баданова Оксана Юрьевна</text:p>
          </table:table-cell>
          <table:table-cell office:value-type="string" calcext:value-type="string">
            <text:p>0583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6" calcext:value-type="float">
            <text:p>301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Троцюк Ольга Германовна</text:p>
          </table:table-cell>
          <table:table-cell office:value-type="string" calcext:value-type="string">
            <text:p>0584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7" calcext:value-type="float">
            <text:p>301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Ахмедова Эльвира Ахматовна</text:p>
          </table:table-cell>
          <table:table-cell office:value-type="string" calcext:value-type="string">
            <text:p>ah-elya@yandex.r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8" calcext:value-type="float">
            <text:p>301018</text:p>
          </table:table-cell>
          <table:table-cell office:value-type="string" calcext:value-type="string">
            <text:p>$2y$10$17XFWVYEqIOGerAd26YSDO6vSvjBUqho7Cx.1AJLwGzBIeYT05/RS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Кольцова Ирина Николаевна</text:p>
          </table:table-cell>
          <table:table-cell office:value-type="string" calcext:value-type="string">
            <text:p>0586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19" calcext:value-type="float">
            <text:p>301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Леонтьева Юлия Александровна</text:p>
          </table:table-cell>
          <table:table-cell office:value-type="string" calcext:value-type="string">
            <text:p>0587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1" calcext:value-type="float">
            <text:p>301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Иванова Ирина Михайловна</text:p>
          </table:table-cell>
          <table:table-cell office:value-type="string" calcext:value-type="string">
            <text:p>0588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2" calcext:value-type="float">
            <text:p>301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Устинова Ольга Александровна</text:p>
          </table:table-cell>
          <table:table-cell office:value-type="string" calcext:value-type="string">
            <text:p>0589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3" calcext:value-type="float">
            <text:p>301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Краснослободцева Лилия Ириковна</text:p>
          </table:table-cell>
          <table:table-cell office:value-type="string" calcext:value-type="string">
            <text:p>0590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4" calcext:value-type="float">
            <text:p>301024</text:p>
          </table:table-cell>
          <table:table-cell office:value-type="string" calcext:value-type="string">
            <text:p>$2y$10$bbYY8OHyHoMvsdDVo/5/K.zfAHg/jcRADfyfYCcHlJ6xdSgktPRJG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Газимзянова Гульнара Гарифзяновна</text:p>
          </table:table-cell>
          <table:table-cell office:value-type="string" calcext:value-type="string">
            <text:p>0591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5" calcext:value-type="float">
            <text:p>301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Самсонова Любовь Александровна</text:p>
          </table:table-cell>
          <table:table-cell office:value-type="string" calcext:value-type="string">
            <text:p>0592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6" calcext:value-type="float">
            <text:p>301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Уракова Анастасия Николаевна</text:p>
          </table:table-cell>
          <table:table-cell office:value-type="string" calcext:value-type="string">
            <text:p>09an86@mail.r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1027" calcext:value-type="float">
            <text:p>301027</text:p>
          </table:table-cell>
          <table:table-cell office:value-type="string" calcext:value-type="string">
            <text:p>$2y$10$4HbinopVVtZlDCYQLrWsSefNQdyeR4ZWz9y.KCEqHlyezSLX1n1w2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Лукьянова Альбина Альбертовна</text:p>
          </table:table-cell>
          <table:table-cell office:value-type="string" calcext:value-type="string">
            <text:p>0594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01" calcext:value-type="float">
            <text:p>30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Никешина Мария Павловна</text:p>
          </table:table-cell>
          <table:table-cell office:value-type="string" calcext:value-type="string">
            <text:p>0595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05" calcext:value-type="float">
            <text:p>30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Файзуллина Лилия Фаритовна</text:p>
          </table:table-cell>
          <table:table-cell office:value-type="string" calcext:value-type="string">
            <text:p>0596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07" calcext:value-type="float">
            <text:p>30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Гизатуллина Рима Илдусовна</text:p>
          </table:table-cell>
          <table:table-cell office:value-type="string" calcext:value-type="string">
            <text:p>0597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10" calcext:value-type="float">
            <text:p>30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Форостовская Олеся Николаевна</text:p>
          </table:table-cell>
          <table:table-cell office:value-type="string" calcext:value-type="string">
            <text:p>0598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11" calcext:value-type="float">
            <text:p>30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Камалютдинова Мария Владимировна</text:p>
          </table:table-cell>
          <table:table-cell office:value-type="string" calcext:value-type="string">
            <text:p>0599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12" calcext:value-type="float">
            <text:p>30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Краснова Ольга Николаевна</text:p>
          </table:table-cell>
          <table:table-cell office:value-type="string" calcext:value-type="string">
            <text:p>0600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14" calcext:value-type="float">
            <text:p>30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Салахова Регина Маратовна</text:p>
          </table:table-cell>
          <table:table-cell office:value-type="string" calcext:value-type="string">
            <text:p>0601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16" calcext:value-type="float">
            <text:p>30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Семина Елена Николаевна</text:p>
          </table:table-cell>
          <table:table-cell office:value-type="string" calcext:value-type="string">
            <text:p>0602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2017" calcext:value-type="float">
            <text:p>30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Гатауллин Радик Равилевич</text:p>
          </table:table-cell>
          <table:table-cell office:value-type="string" calcext:value-type="string">
            <text:p>0603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3020" calcext:value-type="float">
            <text:p>303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Калятьева Людмила Борисовна</text:p>
          </table:table-cell>
          <table:table-cell office:value-type="string" calcext:value-type="string">
            <text:p>0604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3027" calcext:value-type="float">
            <text:p>303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Ревенко Ирина Александровна</text:p>
          </table:table-cell>
          <table:table-cell office:value-type="string" calcext:value-type="string">
            <text:p>0605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3028" calcext:value-type="float">
            <text:p>303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Набиуллин Дамир Гусманович</text:p>
          </table:table-cell>
          <table:table-cell office:value-type="string" calcext:value-type="string">
            <text:p>0606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05" calcext:value-type="float">
            <text:p>30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Гатиятуллин Марат Гумарович</text:p>
          </table:table-cell>
          <table:table-cell office:value-type="string" calcext:value-type="string">
            <text:p>0607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06" calcext:value-type="float">
            <text:p>30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Гарифуллина Гульсина Юнусовна</text:p>
          </table:table-cell>
          <table:table-cell office:value-type="string" calcext:value-type="string">
            <text:p>0608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07" calcext:value-type="float">
            <text:p>30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Ахметзянова Гульшат Тахировна</text:p>
          </table:table-cell>
          <table:table-cell office:value-type="string" calcext:value-type="string">
            <text:p>0609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08" calcext:value-type="float">
            <text:p>30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Салахиева Сумбел Юнусовна</text:p>
          </table:table-cell>
          <table:table-cell office:value-type="string" calcext:value-type="string">
            <text:p>0610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09" calcext:value-type="float">
            <text:p>30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Ахметшина Лилия Нафталовна</text:p>
          </table:table-cell>
          <table:table-cell office:value-type="string" calcext:value-type="string">
            <text:p>sch208@yandex.r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0" calcext:value-type="float">
            <text:p>304010</text:p>
          </table:table-cell>
          <table:table-cell office:value-type="string" calcext:value-type="string">
            <text:p>$2y$10$YUPzSdJxVofA0NNzdbBkX.Hxl.fcndzDK50d7sfLNGQomGenVPFym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Абдулхакимова Гульнара Фидаилевна</text:p>
          </table:table-cell>
          <table:table-cell office:value-type="string" calcext:value-type="string">
            <text:p>0612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1" calcext:value-type="float">
            <text:p>30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Гибадуллина Гульназ Ильдусовна</text:p>
          </table:table-cell>
          <table:table-cell office:value-type="string" calcext:value-type="string">
            <text:p>0613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3" calcext:value-type="float">
            <text:p>30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Зайнуллина Лилия Фаридовна</text:p>
          </table:table-cell>
          <table:table-cell office:value-type="string" calcext:value-type="string">
            <text:p>0614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5" calcext:value-type="float">
            <text:p>30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Юсупова Лилия Аминовна</text:p>
          </table:table-cell>
          <table:table-cell office:value-type="string" calcext:value-type="string">
            <text:p>0615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6" calcext:value-type="float">
            <text:p>30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Шайхутдинова Лейсан Талгатовна</text:p>
          </table:table-cell>
          <table:table-cell office:value-type="string" calcext:value-type="string">
            <text:p>0616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7" calcext:value-type="float">
            <text:p>30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Талипова Милауша Гусмановна</text:p>
          </table:table-cell>
          <table:table-cell office:value-type="string" calcext:value-type="string">
            <text:p>0617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19" calcext:value-type="float">
            <text:p>30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Шайхнурова Гульнара Рашидовна</text:p>
          </table:table-cell>
          <table:table-cell office:value-type="string" calcext:value-type="string">
            <text:p>0618@mail.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4021" calcext:value-type="float">
            <text:p>30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Власова Татьяна Анатольевна</text:p>
          </table:table-cell>
          <table:table-cell office:value-type="string" calcext:value-type="string">
            <text:p>0619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2006" calcext:value-type="float">
            <text:p>31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Тихонова Алевтина Александровна</text:p>
          </table:table-cell>
          <table:table-cell office:value-type="string" calcext:value-type="string">
            <text:p>ala.tikhonova.73@mail.ru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2008" calcext:value-type="float">
            <text:p>31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Григорьева Альбина Владимировна</text:p>
          </table:table-cell>
          <table:table-cell office:value-type="string" calcext:value-type="string">
            <text:p>0621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2013" calcext:value-type="float">
            <text:p>312013</text:p>
          </table:table-cell>
          <table:table-cell office:value-type="string" calcext:value-type="string">
            <text:p>$2y$10$GNjAsLkFwJNXVumKFoHtNu8yOFX421J6J5GmK4Pta2OYwsEwheS5K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Насыбуллина Земфира Мусалимовна</text:p>
          </table:table-cell>
          <table:table-cell office:value-type="string" calcext:value-type="string">
            <text:p>0622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2015" calcext:value-type="float">
            <text:p>31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Закирова Гульнара Вазыгуллаевна</text:p>
          </table:table-cell>
          <table:table-cell office:value-type="string" calcext:value-type="string">
            <text:p>gulnarasv@rambler.ru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2018" calcext:value-type="float">
            <text:p>312018</text:p>
          </table:table-cell>
          <table:table-cell office:value-type="string" calcext:value-type="string">
            <text:p>$2y$10$DH8yORZLbWdHRBZs45Gfzes/PrNXS9ifE3vUMd3H59CVn7MnkOhm6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Вахитова Фанзиля Фаритовна</text:p>
          </table:table-cell>
          <table:table-cell office:value-type="string" calcext:value-type="string">
            <text:p>0624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2019" calcext:value-type="float">
            <text:p>312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Сибгатуллина Милеуша Дамировна</text:p>
          </table:table-cell>
          <table:table-cell office:value-type="string" calcext:value-type="string">
            <text:p>sch722@rambler.ru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01" calcext:value-type="float">
            <text:p>314001</text:p>
          </table:table-cell>
          <table:table-cell office:value-type="string" calcext:value-type="string">
            <text:p>$2y$10$FfgEB1ml63Mk4WW5O0Cq1O0U3rcYyZznI8EVIw17k4uLzog9l6BuO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Шарафутдинова Ландыш Тальгатовна</text:p>
          </table:table-cell>
          <table:table-cell office:value-type="string" calcext:value-type="string">
            <text:p>0626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02" calcext:value-type="float">
            <text:p>314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Капитонова Лиана Александровна</text:p>
          </table:table-cell>
          <table:table-cell office:value-type="string" calcext:value-type="string">
            <text:p>st.tyaber.1@gmail.co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03" calcext:value-type="float">
            <text:p>314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Козлова Алина Вениаминовна</text:p>
          </table:table-cell>
          <table:table-cell office:value-type="string" calcext:value-type="string">
            <text:p>0628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04" calcext:value-type="float">
            <text:p>31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Кальчева Вероника Валерьевна</text:p>
          </table:table-cell>
          <table:table-cell office:value-type="string" calcext:value-type="string">
            <text:p>0629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05" calcext:value-type="float">
            <text:p>31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Мухутдинова Алсу Назымовна</text:p>
          </table:table-cell>
          <table:table-cell office:value-type="string" calcext:value-type="string">
            <text:p>alsumuhutdinova@rambler.ru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09" calcext:value-type="float">
            <text:p>314009</text:p>
          </table:table-cell>
          <table:table-cell office:value-type="string" calcext:value-type="string">
            <text:p>$2y$10$2E9mUUBcdUk70ug5b2s36uc2387uC.WyvJEq3whTXOl6L6gpzwtI6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Сабирова Гуль-Шагидя Харисовна</text:p>
          </table:table-cell>
          <table:table-cell office:value-type="string" calcext:value-type="string">
            <text:p>0631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11" calcext:value-type="float">
            <text:p>31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Сайфутдинова Алсу Мансуровна</text:p>
          </table:table-cell>
          <table:table-cell office:value-type="string" calcext:value-type="string">
            <text:p>0632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12" calcext:value-type="float">
            <text:p>31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Калимуллина Рафия Рифкатовна</text:p>
          </table:table-cell>
          <table:table-cell office:value-type="string" calcext:value-type="string">
            <text:p>0633@mail.m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4014" calcext:value-type="float">
            <text:p>31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Равилов Фарит Рашитович</text:p>
          </table:table-cell>
          <table:table-cell office:value-type="string" calcext:value-type="string">
            <text:p>0634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1001" calcext:value-type="float">
            <text:p>32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Феткулова Ильмира Ирековна</text:p>
          </table:table-cell>
          <table:table-cell office:value-type="string" calcext:value-type="string">
            <text:p>0635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1002" calcext:value-type="float">
            <text:p>32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Климчук Анастасия Николаевна</text:p>
          </table:table-cell>
          <table:table-cell office:value-type="string" calcext:value-type="string">
            <text:p>0636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1003" calcext:value-type="float">
            <text:p>321003</text:p>
          </table:table-cell>
          <table:table-cell office:value-type="string" calcext:value-type="string">
            <text:p>$2y$10$KdD0Yg/uOKjDSrcVNzpVV.CNHYMkIatvLosOBMVjew8u5yPJfpdwy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Шайдуллина Римма Габдрашитовна</text:p>
          </table:table-cell>
          <table:table-cell office:value-type="string" calcext:value-type="string">
            <text:p>lensn13@mail.ru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5004" calcext:value-type="float">
            <text:p>355004</text:p>
          </table:table-cell>
          <table:table-cell office:value-type="string" calcext:value-type="string">
            <text:p>$2y$10$Ny03vZHxA8VVUYyBK30al.4MiitbKgANGzICk.sq8S9TRnTcnWZma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Семагина Наталья Геннадьевна</text:p>
          </table:table-cell>
          <table:table-cell office:value-type="string" calcext:value-type="string">
            <text:p>kshi-zaton@rambler.ru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1017" calcext:value-type="float">
            <text:p>321017</text:p>
          </table:table-cell>
          <table:table-cell office:value-type="string" calcext:value-type="string">
            <text:p>$2y$10$Z5T7IcQyo/tT2AAvAvec1uGHIV16Vtr/uOMfXWSdXG0BAvqP6toRq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Каримуллин Азат Рауфович</text:p>
          </table:table-cell>
          <table:table-cell office:value-type="string" calcext:value-type="string">
            <text:p>0639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2005" calcext:value-type="float">
            <text:p>32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Маслова Гульсина Мунировна</text:p>
          </table:table-cell>
          <table:table-cell office:value-type="string" calcext:value-type="string">
            <text:p>0640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2006" calcext:value-type="float">
            <text:p>32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Назарычева Марина Александровна</text:p>
          </table:table-cell>
          <table:table-cell office:value-type="string" calcext:value-type="string">
            <text:p>0641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2012" calcext:value-type="float">
            <text:p>32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Букушкина Екатерина Михайловна</text:p>
          </table:table-cell>
          <table:table-cell office:value-type="string" calcext:value-type="string">
            <text:p>0642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2014" calcext:value-type="float">
            <text:p>32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Гизутдинова Нурзия Рифатовна</text:p>
          </table:table-cell>
          <table:table-cell office:value-type="string" calcext:value-type="string">
            <text:p>0643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3004" calcext:value-type="float">
            <text:p>323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Гараева Сакина Рауфовна</text:p>
          </table:table-cell>
          <table:table-cell office:value-type="string" calcext:value-type="string">
            <text:p>0644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4013" calcext:value-type="float">
            <text:p>32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Шангараева Зульфия Ирековна</text:p>
          </table:table-cell>
          <table:table-cell office:value-type="string" calcext:value-type="string">
            <text:p>0645@mail.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24016" calcext:value-type="float">
            <text:p>32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Сайфуллина Ландыш Ринатовна</text:p>
          </table:table-cell>
          <table:table-cell office:value-type="string" calcext:value-type="string">
            <text:p>0647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1002" calcext:value-type="float">
            <text:p>33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Низамова Диляра Рафиковна</text:p>
          </table:table-cell>
          <table:table-cell office:value-type="string" calcext:value-type="string">
            <text:p>0648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1003" calcext:value-type="float">
            <text:p>33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Ромазанова Елена Валентиновна</text:p>
          </table:table-cell>
          <table:table-cell office:value-type="string" calcext:value-type="string">
            <text:p>0649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1004" calcext:value-type="float">
            <text:p>33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Мутигуллина Лилия Равилевна</text:p>
          </table:table-cell>
          <table:table-cell office:value-type="string" calcext:value-type="string">
            <text:p>0650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05" calcext:value-type="float">
            <text:p>332005</text:p>
          </table:table-cell>
          <table:table-cell office:value-type="string" calcext:value-type="string">
            <text:p>$2y$10$kddwJUfFOORioz3U2HaiJ.UHosx.PtLbPlomRk3HaYMI9DoIGswNa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Хасанова Миляуша Гаязовна</text:p>
          </table:table-cell>
          <table:table-cell office:value-type="string" calcext:value-type="string">
            <text:p>0651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06" calcext:value-type="float">
            <text:p>33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Губайдуллина Ляйсан Аюповна</text:p>
          </table:table-cell>
          <table:table-cell office:value-type="string" calcext:value-type="string">
            <text:p>0652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07" calcext:value-type="float">
            <text:p>33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Козлова Регина Геннадьевна</text:p>
          </table:table-cell>
          <table:table-cell office:value-type="string" calcext:value-type="string">
            <text:p>0653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08" calcext:value-type="float">
            <text:p>33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Владимирова Татьяна Васильевна</text:p>
          </table:table-cell>
          <table:table-cell office:value-type="string" calcext:value-type="string">
            <text:p>0654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24" calcext:value-type="float">
            <text:p>332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Фёдорова Рамзия Габтулхаевна</text:p>
          </table:table-cell>
          <table:table-cell office:value-type="string" calcext:value-type="string">
            <text:p>0655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25" calcext:value-type="float">
            <text:p>332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Васильева Наталья Анатольевна</text:p>
          </table:table-cell>
          <table:table-cell office:value-type="string" calcext:value-type="string">
            <text:p>0656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26" calcext:value-type="float">
            <text:p>332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Ромазанова Ольга Михайловна</text:p>
          </table:table-cell>
          <table:table-cell office:value-type="string" calcext:value-type="string">
            <text:p>0657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27" calcext:value-type="float">
            <text:p>332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Ярмиева <text:s/>Алия Фанисовна</text:p>
          </table:table-cell>
          <table:table-cell office:value-type="string" calcext:value-type="string">
            <text:p>0658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28" calcext:value-type="float">
            <text:p>332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Исанькина Юлия Васильевна</text:p>
          </table:table-cell>
          <table:table-cell office:value-type="string" calcext:value-type="string">
            <text:p>0659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29" calcext:value-type="float">
            <text:p>332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Яковлева Лилия Михайловна</text:p>
          </table:table-cell>
          <table:table-cell office:value-type="string" calcext:value-type="string">
            <text:p>0660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2030" calcext:value-type="float">
            <text:p>3320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Афлятунова Фануза Маснавиевна</text:p>
          </table:table-cell>
          <table:table-cell office:value-type="string" calcext:value-type="string">
            <text:p>0661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3001" calcext:value-type="float">
            <text:p>333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Ханафиева Рузия Марселевна</text:p>
          </table:table-cell>
          <table:table-cell office:value-type="string" calcext:value-type="string">
            <text:p>0662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09" calcext:value-type="float">
            <text:p>33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Мубаракова Роза Равилевна</text:p>
          </table:table-cell>
          <table:table-cell office:value-type="string" calcext:value-type="string">
            <text:p>0663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0" calcext:value-type="float">
            <text:p>334010</text:p>
          </table:table-cell>
          <table:table-cell office:value-type="string" calcext:value-type="string">
            <text:p>$2y$10$H0tR2CjP1gFrl41sDNzTwu.775h8ZSgwHV0ya43n/yuex1V9N2m3m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Шамсутдинов Габдельнур Мулланурович</text:p>
          </table:table-cell>
          <table:table-cell office:value-type="string" calcext:value-type="string">
            <text:p>0664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1" calcext:value-type="float">
            <text:p>33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Шарафиева Альбина Альбертовна</text:p>
          </table:table-cell>
          <table:table-cell office:value-type="string" calcext:value-type="string">
            <text:p>0665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2" calcext:value-type="float">
            <text:p>33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Зиятдинова Расима Камиловна</text:p>
          </table:table-cell>
          <table:table-cell office:value-type="string" calcext:value-type="string">
            <text:p>0666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3" calcext:value-type="float">
            <text:p>33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Нуруллина Земфира Назимовна</text:p>
          </table:table-cell>
          <table:table-cell office:value-type="string" calcext:value-type="string">
            <text:p>0667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4" calcext:value-type="float">
            <text:p>33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Фаттахова Земфира Рашитовна</text:p>
          </table:table-cell>
          <table:table-cell office:value-type="string" calcext:value-type="string">
            <text:p>0668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5" calcext:value-type="float">
            <text:p>33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Рахимова Айсылу Афраимовна</text:p>
          </table:table-cell>
          <table:table-cell office:value-type="string" calcext:value-type="string">
            <text:p>0669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6" calcext:value-type="float">
            <text:p>33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Самигуллина Римма Расуловна</text:p>
          </table:table-cell>
          <table:table-cell office:value-type="string" calcext:value-type="string">
            <text:p>0670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7" calcext:value-type="float">
            <text:p>33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Хурамшина Айгуль Нургалиевна</text:p>
          </table:table-cell>
          <table:table-cell office:value-type="string" calcext:value-type="string">
            <text:p>0671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8" calcext:value-type="float">
            <text:p>334018</text:p>
          </table:table-cell>
          <table:table-cell office:value-type="string" calcext:value-type="string">
            <text:p>$2y$10$95G2FMu2K6wKc1Plncq23eRrLQ1.BtXmb9Ph9RKt6SeEfmBvdGr/6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Чираева Ильмира Рашидовна</text:p>
          </table:table-cell>
          <table:table-cell office:value-type="string" calcext:value-type="string">
            <text:p>0672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19" calcext:value-type="float">
            <text:p>33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Файзуллина Эндже Ахматгалиевна</text:p>
          </table:table-cell>
          <table:table-cell office:value-type="string" calcext:value-type="string">
            <text:p>0673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20" calcext:value-type="float">
            <text:p>334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Николаева Ирина Валерьевна</text:p>
          </table:table-cell>
          <table:table-cell office:value-type="string" calcext:value-type="string">
            <text:p>0674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21" calcext:value-type="float">
            <text:p>334021</text:p>
          </table:table-cell>
          <table:table-cell office:value-type="string" calcext:value-type="string">
            <text:p>$2y$10$dNJLiF.JqmhUsHmqZ8XbZ.7fRhKwr0HgJ2fqP4PXQtxn3D1RFnSvO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Габбасова Гамиля Магсумовна</text:p>
          </table:table-cell>
          <table:table-cell office:value-type="string" calcext:value-type="string">
            <text:p>0675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22" calcext:value-type="float">
            <text:p>334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Абаева Ландыш Айдаровна</text:p>
          </table:table-cell>
          <table:table-cell office:value-type="string" calcext:value-type="string">
            <text:p>0676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23" calcext:value-type="float">
            <text:p>334023</text:p>
          </table:table-cell>
          <table:table-cell office:value-type="string" calcext:value-type="string">
            <text:p>$2y$10$PL00LlVuewUqMdH8508te.YUEley4trWnt.8Mfo2Dxw8pKqRZfja6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Нигматуллина Гульназ Нурисламовна </text:p>
          </table:table-cell>
          <table:table-cell office:value-type="string" calcext:value-type="string">
            <text:p>0677@mail.m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4082" calcext:value-type="float">
            <text:p>33408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Музеева Мадина Алдангоровна</text:p>
          </table:table-cell>
          <table:table-cell office:value-type="string" calcext:value-type="string">
            <text:p>0678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0005" calcext:value-type="float">
            <text:p>340005</text:p>
          </table:table-cell>
          <table:table-cell office:value-type="string" calcext:value-type="string">
            <text:p>$2y$10$sQ7QO73FneVSSXrRidMUcu0jB14Ofolr8Yn0.xbaaks8YbYe1M6kq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Иванова Алла Александровна</text:p>
          </table:table-cell>
          <table:table-cell office:value-type="string" calcext:value-type="string">
            <text:p>0679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0017" calcext:value-type="float">
            <text:p>340017</text:p>
          </table:table-cell>
          <table:table-cell office:value-type="string" calcext:value-type="string">
            <text:p>$2y$10$onQjLerkjhoOZv8fZRvkreHyDNYxGRjLQ4xj1wVOsqHHSRtObuAiG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Павлова Татьяна Дмитриевна</text:p>
          </table:table-cell>
          <table:table-cell office:value-type="string" calcext:value-type="string">
            <text:p>punktum@mail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0019" calcext:value-type="float">
            <text:p>340019</text:p>
          </table:table-cell>
          <table:table-cell office:value-type="string" calcext:value-type="string">
            <text:p>$2y$10$ovYBjmkx0wuALKGUaX4HseDD4pZ8j/mvc23lbzh8eI/g8X9fbF5u.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Фатыхова Рафида Фоатовна</text:p>
          </table:table-cell>
          <table:table-cell office:value-type="string" calcext:value-type="string">
            <text:p>0681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0020" calcext:value-type="float">
            <text:p>340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Аникина Екатерина Владимировна</text:p>
          </table:table-cell>
          <table:table-cell office:value-type="string" calcext:value-type="string">
            <text:p>sch228@mail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1001" calcext:value-type="float">
            <text:p>341001</text:p>
          </table:table-cell>
          <table:table-cell office:value-type="string" calcext:value-type="string">
            <text:p>$2y$10$4ByS1h5b0o.TKkJSKpz52OTwiGIq4WimLybkZRNt2/h26N67.0wAm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Махмутова Айгуль Ришатовна</text:p>
          </table:table-cell>
          <table:table-cell office:value-type="string" calcext:value-type="string">
            <text:p>Mbou.Lsch2@tatar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1002" calcext:value-type="float">
            <text:p>341002</text:p>
          </table:table-cell>
          <table:table-cell office:value-type="string" calcext:value-type="string">
            <text:p>$2y$10$sT/eYQCOwVL/7pmmQIMcHO2U7QfLT2rTv3idFFZHHnrEASvgrpSsm</text:p>
          </table:table-cell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Хасбиева Савия Ахлиевна</text:p>
          </table:table-cell>
          <table:table-cell office:value-type="string" calcext:value-type="string">
            <text:p>0684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03" calcext:value-type="float">
            <text:p>342003</text:p>
          </table:table-cell>
          <table:table-cell office:value-type="string" calcext:value-type="string">
            <text:p>$2y$10$viC6BAfD3gCu81EeSzLgTeeXhHJeg6a8wR/ZvBmp5kTZISROI1vJO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Якимова Ольга Валентиновна</text:p>
          </table:table-cell>
          <table:table-cell office:value-type="string" calcext:value-type="string">
            <text:p>0685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05" calcext:value-type="float">
            <text:p>34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Рахимбердина Элена Нуриевна</text:p>
          </table:table-cell>
          <table:table-cell office:value-type="string" calcext:value-type="string">
            <text:p>0686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06" calcext:value-type="float">
            <text:p>342006</text:p>
          </table:table-cell>
          <table:table-cell office:value-type="string" calcext:value-type="string">
            <text:p>$2y$10$BnnGegFASR7OcQP6fIcjHuKmREKJ8PZsXlaGN4AElRfctgEwQh40O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Галиева Эльвира Ринадовна</text:p>
          </table:table-cell>
          <table:table-cell office:value-type="string" calcext:value-type="string">
            <text:p>0687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09" calcext:value-type="float">
            <text:p>34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Задовская Альбина Аркадьевна</text:p>
          </table:table-cell>
          <table:table-cell office:value-type="string" calcext:value-type="string">
            <text:p>0688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12" calcext:value-type="float">
            <text:p>342012</text:p>
          </table:table-cell>
          <table:table-cell office:value-type="string" calcext:value-type="string">
            <text:p>$2y$10$xLhvfozB1IjbAp2OM5RxDetgx8H90Hx.N6hoHubft6TPkrCzGDoDO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Гогова Татьяна Александровна</text:p>
          </table:table-cell>
          <table:table-cell office:value-type="string" calcext:value-type="string">
            <text:p>Mbou.Nikolsk@tatar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13" calcext:value-type="float">
            <text:p>342013</text:p>
          </table:table-cell>
          <table:table-cell office:value-type="string" calcext:value-type="string">
            <text:p>$2y$10$p6q6RZr1TH4E3SGaYbN7EOSGHhItrkLKCsNsrGk6mLASIjThkdiUq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Хаматгалеева Регина Ильшатовна</text:p>
          </table:table-cell>
          <table:table-cell office:value-type="string" calcext:value-type="string">
            <text:p>0690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18" calcext:value-type="float">
            <text:p>342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Гилязова Динара Ринатовна</text:p>
          </table:table-cell>
          <table:table-cell office:value-type="string" calcext:value-type="string">
            <text:p>0691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20" calcext:value-type="float">
            <text:p>342020</text:p>
          </table:table-cell>
          <table:table-cell office:value-type="string" calcext:value-type="string">
            <text:p>$2y$10$K1s9mc3UUMZqHD0MwWKNCeOzw90OtlZQKcIJRPtQKd0k0b99Oqm5K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Сарбаева Венера Ильсуровна</text:p>
          </table:table-cell>
          <table:table-cell office:value-type="string" calcext:value-type="string">
            <text:p>0692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21" calcext:value-type="float">
            <text:p>342021</text:p>
          </table:table-cell>
          <table:table-cell office:value-type="string" calcext:value-type="string">
            <text:p>$2y$10$ipRybYIt1laGe06urOqZzutFKw/M4Xrca/VbPmTMgDybcCNcvolf6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Давлетшина Елена Николаевна</text:p>
          </table:table-cell>
          <table:table-cell office:value-type="string" calcext:value-type="string">
            <text:p>0693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22" calcext:value-type="float">
            <text:p>342022</text:p>
          </table:table-cell>
          <table:table-cell office:value-type="string" calcext:value-type="string">
            <text:p>$2y$10$VBADqVk4nt3tn7rE8FbyXerSClv7vA32rfRNewYaIWn7rBjBCWYRW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Шишкова Халида Дамировна</text:p>
          </table:table-cell>
          <table:table-cell office:value-type="string" calcext:value-type="string">
            <text:p>0694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25" calcext:value-type="float">
            <text:p>342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Галавова Лилия Фаилевна</text:p>
          </table:table-cell>
          <table:table-cell office:value-type="string" calcext:value-type="string">
            <text:p>0695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26" calcext:value-type="float">
            <text:p>342026</text:p>
          </table:table-cell>
          <table:table-cell office:value-type="string" calcext:value-type="string">
            <text:p>$2y$10$cmOI8yZGKO1aNqFD/Wxv/ue/7MiYE02QEcdooPqMtSRSduimB6RsO</text:p>
          </table:table-cell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Ковалева Елена Николаевна</text:p>
          </table:table-cell>
          <table:table-cell office:value-type="string" calcext:value-type="string">
            <text:p><text:a xlink:href="mailto:0696@mail.m" xlink:type="simple">0696@mail.m</text:a>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2031" calcext:value-type="float">
            <text:p>3420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Хамитова Ландыш Талгатовна</text:p>
          </table:table-cell>
          <table:table-cell office:value-type="string" calcext:value-type="string">
            <text:p>landysh-x@yandex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04" calcext:value-type="float">
            <text:p>344004</text:p>
          </table:table-cell>
          <table:table-cell office:value-type="string" calcext:value-type="string">
            <text:p>$2y$10$k5WY..6pwN/4SFMoEEigvu7nu.FAO.pVRmAfBF9qqzI/l1bIsb.aq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Мифтахова Рамиля Рафинадовна</text:p>
          </table:table-cell>
          <table:table-cell office:value-type="string" calcext:value-type="string">
            <text:p>0698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07" calcext:value-type="float">
            <text:p>34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Диярова Гульфия Исхаковна</text:p>
          </table:table-cell>
          <table:table-cell office:value-type="string" calcext:value-type="string">
            <text:p>0699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08" calcext:value-type="float">
            <text:p>344008</text:p>
          </table:table-cell>
          <table:table-cell office:value-type="string" calcext:value-type="string">
            <text:p>$2y$10$Wt5jz5DFVMjjqyToPAqoOeaDpsg.rYpb3bBYLCrUugKgG5Y.lvBCa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Рахматуллина Луиза Ильгизяровна</text:p>
          </table:table-cell>
          <table:table-cell office:value-type="string" calcext:value-type="string">
            <text:p>0700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10" calcext:value-type="float">
            <text:p>344010</text:p>
          </table:table-cell>
          <table:table-cell office:value-type="string" calcext:value-type="string">
            <text:p>$2y$10$swdN66IThyHS1OOgQA1kF.YfNnzLIfddwjS214fy5zMSZtZmpD3rm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Сунгатова Гулуса Миннулловна</text:p>
          </table:table-cell>
          <table:table-cell office:value-type="string" calcext:value-type="string">
            <text:p>gulusa4@mail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11" calcext:value-type="float">
            <text:p>344011</text:p>
          </table:table-cell>
          <table:table-cell office:value-type="string" calcext:value-type="string">
            <text:p>$2y$10$ZC5O9EWLo9kWQ8yEOwjxPei4qRbJRwT15QXLa.urjwY5t1WGlEQ5y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Саляхова Гульгена Габдулловна</text:p>
          </table:table-cell>
          <table:table-cell office:value-type="string" calcext:value-type="string">
            <text:p>0702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16" calcext:value-type="float">
            <text:p>344016</text:p>
          </table:table-cell>
          <table:table-cell office:value-type="string" calcext:value-type="string">
            <text:p>$2y$10$7JX.JzBWXnBtoOrkVXdRhuv.Q8Jsi6I6rijNL2xmcwT2CeGo4zcJS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Гарафиева Рушания Ахмадулловна</text:p>
          </table:table-cell>
          <table:table-cell office:value-type="string" calcext:value-type="string">
            <text:p>0703@mail.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24" calcext:value-type="float">
            <text:p>344024</text:p>
          </table:table-cell>
          <table:table-cell office:value-type="string" calcext:value-type="string">
            <text:p>$2y$10$9knj/7fG3SUmv5VCS3sdKeiaMR9jrrHPubHurcL4pF.Y8K94mYtgS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Модина Ксения Николаевна</text:p>
          </table:table-cell>
          <table:table-cell office:value-type="string" calcext:value-type="string">
            <text:p>0704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1" calcext:value-type="float">
            <text:p>35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Галиева Дания Ринатовна</text:p>
          </table:table-cell>
          <table:table-cell office:value-type="string" calcext:value-type="string">
            <text:p>0705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2" calcext:value-type="float">
            <text:p>351002</text:p>
          </table:table-cell>
          <table:table-cell office:value-type="string" calcext:value-type="string">
            <text:p>$2y$10$CPwJ1s4vBoeHlNI0CH0R6e6n2H4VgOsLUsaaAoej6cX9apeQCOacq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Журавлева Марина Петровна</text:p>
          </table:table-cell>
          <table:table-cell office:value-type="string" calcext:value-type="string">
            <text:p>0706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3" calcext:value-type="float">
            <text:p>351003</text:p>
          </table:table-cell>
          <table:table-cell office:value-type="string" calcext:value-type="string">
            <text:p>$2y$10$/JHNu5PwgPgUKUNlqAfvWuTAhXOjSyuILxQe7ErVAXZyckMNcexqS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Шагиева Гольназ Фаритовна</text:p>
          </table:table-cell>
          <table:table-cell office:value-type="string" calcext:value-type="string">
            <text:p>0707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4" calcext:value-type="float">
            <text:p>35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Гисматуллина Альбина Мирзагитовна</text:p>
          </table:table-cell>
          <table:table-cell office:value-type="string" calcext:value-type="string">
            <text:p>0708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5" calcext:value-type="float">
            <text:p>35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Шайхутдинова Розалия Ралифовна.</text:p>
          </table:table-cell>
          <table:table-cell office:value-type="string" calcext:value-type="string">
            <text:p>0709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6" calcext:value-type="float">
            <text:p>35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Зарубежнова Людмила Дмитриевна</text:p>
          </table:table-cell>
          <table:table-cell office:value-type="string" calcext:value-type="string">
            <text:p>0710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7" calcext:value-type="float">
            <text:p>35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Ларина Татьяна Владимировна</text:p>
          </table:table-cell>
          <table:table-cell office:value-type="string" calcext:value-type="string">
            <text:p>0711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08" calcext:value-type="float">
            <text:p>351008</text:p>
          </table:table-cell>
          <table:table-cell office:value-type="string" calcext:value-type="string">
            <text:p>$2y$10$biY.sFcbmMvDPws5YsumoO.1WX4fWqnX9fuRBEWdX.MLVs5wcd46W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Гафиятуллина Аниса Наильевна</text:p>
          </table:table-cell>
          <table:table-cell office:value-type="string" calcext:value-type="string">
            <text:p>0712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10" calcext:value-type="float">
            <text:p>35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Карасева Оксана Александровна</text:p>
          </table:table-cell>
          <table:table-cell office:value-type="string" calcext:value-type="string">
            <text:p>0713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1012" calcext:value-type="float">
            <text:p>351012</text:p>
          </table:table-cell>
          <table:table-cell office:value-type="string" calcext:value-type="string">
            <text:p>$2y$10$7u0QNbAFHXk7If9LByapiuZ3R9opgPKQchJVmxROPmbYg6yYhpFAW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Гарифуллина Эльмира Исхаковна</text:p>
          </table:table-cell>
          <table:table-cell office:value-type="string" calcext:value-type="string">
            <text:p>0714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1" calcext:value-type="float">
            <text:p>35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Ризванова Галия Насиховна</text:p>
          </table:table-cell>
          <table:table-cell office:value-type="string" calcext:value-type="string">
            <text:p>0715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2" calcext:value-type="float">
            <text:p>352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Лапицкая Марина Петровна</text:p>
          </table:table-cell>
          <table:table-cell office:value-type="string" calcext:value-type="string">
            <text:p>0716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3" calcext:value-type="float">
            <text:p>35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Хайрова Расима Фуатовна</text:p>
          </table:table-cell>
          <table:table-cell office:value-type="string" calcext:value-type="string">
            <text:p>0717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4" calcext:value-type="float">
            <text:p>352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Филипповская Гузель Робертовна</text:p>
          </table:table-cell>
          <table:table-cell office:value-type="string" calcext:value-type="string">
            <text:p>0718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5" calcext:value-type="float">
            <text:p>352025</text:p>
          </table:table-cell>
          <table:table-cell office:value-type="string" calcext:value-type="string">
            <text:p>$2y$10$PMn9GTmLnvd.bnpIhRrpouOyVkbjFjpGPRvstR5C5kid8FpoFJBau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Костина Нина Григорьевна</text:p>
          </table:table-cell>
          <table:table-cell office:value-type="string" calcext:value-type="string">
            <text:p>0719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6" calcext:value-type="float">
            <text:p>352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Фаррахова Гульнара Рамилевна</text:p>
          </table:table-cell>
          <table:table-cell office:value-type="string" calcext:value-type="string">
            <text:p>0720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7" calcext:value-type="float">
            <text:p>352027</text:p>
          </table:table-cell>
          <table:table-cell office:value-type="string" calcext:value-type="string">
            <text:p>$2y$10$lzskYBt6Sf6FczSVho6PoOV0/xmgg2REJn4id2nlaCPgozjBTGn72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Кузьмина Марина Григорьевна</text:p>
          </table:table-cell>
          <table:table-cell office:value-type="string" calcext:value-type="string">
            <text:p>0721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29" calcext:value-type="float">
            <text:p>352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Степанова Маргарита Николаевна</text:p>
          </table:table-cell>
          <table:table-cell office:value-type="string" calcext:value-type="string">
            <text:p>0722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2040" calcext:value-type="float">
            <text:p>35204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Самигуллина Венера Минсагитовна</text:p>
          </table:table-cell>
          <table:table-cell office:value-type="string" calcext:value-type="string">
            <text:p>0723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3011" calcext:value-type="float">
            <text:p>353011</text:p>
          </table:table-cell>
          <table:table-cell office:value-type="string" calcext:value-type="string">
            <text:p>$2y$10$syu.502bXuiAnu5/TeSAwOqqHuCtt4TZqJfgZZqCsRAl/OHCRVPKu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Минахметова Эльмира Хазиевна</text:p>
          </table:table-cell>
          <table:table-cell office:value-type="string" calcext:value-type="string">
            <text:p>0724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1" calcext:value-type="float">
            <text:p>354031</text:p>
          </table:table-cell>
          <table:table-cell office:value-type="string" calcext:value-type="string">
            <text:p>$2y$10$.Pu8v1vQ5PF54SKQE7DMw.KOEkpXAUmzMK5zosmxTtezO6COnyywW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Вильданова Гульнара Ринадовна</text:p>
          </table:table-cell>
          <table:table-cell office:value-type="string" calcext:value-type="string">
            <text:p>Zai-Karataishcola@yandex.ru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2" calcext:value-type="float">
            <text:p>354032</text:p>
          </table:table-cell>
          <table:table-cell office:value-type="string" calcext:value-type="string">
            <text:p>$2y$10$tMMPZHCxlkVE.8GQ1G4n1eb3jGrpZL6UB/SmqUt.OJmlhGIyAiKRK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Вафина Венера Минеракиповна</text:p>
          </table:table-cell>
          <table:table-cell office:value-type="string" calcext:value-type="string">
            <text:p>Guliya.Vafina@tatar.ru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3" calcext:value-type="float">
            <text:p>354033</text:p>
          </table:table-cell>
          <table:table-cell office:value-type="string" calcext:value-type="string">
            <text:p>$2y$10$tJVZnR79NXeVcCRXGFlK7.G/33PW9qQYTEQ1IB9W8p6JKaCbFcccu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Мухаметзянова Зульфия Мукатдасовна</text:p>
          </table:table-cell>
          <table:table-cell office:value-type="string" calcext:value-type="string">
            <text:p>0727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4" calcext:value-type="float">
            <text:p>354034</text:p>
          </table:table-cell>
          <table:table-cell office:value-type="string" calcext:value-type="string">
            <text:p>$2y$10$taHMByOCMBgC.4BVW9KwfehbNhXYTN9ICmEa2gu0vAzsKpfutuIqa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Сахабутдинова Резида Имаметдиновна</text:p>
          </table:table-cell>
          <table:table-cell office:value-type="string" calcext:value-type="string">
            <text:p>0728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5" calcext:value-type="float">
            <text:p>354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Зиангирова Дания Котдусовна</text:p>
          </table:table-cell>
          <table:table-cell office:value-type="string" calcext:value-type="string">
            <text:p>0729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6" calcext:value-type="float">
            <text:p>354036</text:p>
          </table:table-cell>
          <table:table-cell office:value-type="string" calcext:value-type="string">
            <text:p>$2y$10$BSOflpUMQSuiwbhssaNVFuwx8E./FQTqAo0EImVjvnw61FrHkIKAC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Ялакова Фания Габдулбариевна</text:p>
          </table:table-cell>
          <table:table-cell office:value-type="string" calcext:value-type="string">
            <text:p>0730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37" calcext:value-type="float">
            <text:p>35403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ГараеваАльбинаАльбертовна</text:p>
          </table:table-cell>
          <table:table-cell office:value-type="string" calcext:value-type="string">
            <text:p>0731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41" calcext:value-type="float">
            <text:p>35404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Хаматшина Альбина Марсельевна</text:p>
          </table:table-cell>
          <table:table-cell office:value-type="string" calcext:value-type="string">
            <text:p>0732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4043" calcext:value-type="float">
            <text:p>35404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Ишниязов Ренат Дильминович</text:p>
          </table:table-cell>
          <table:table-cell office:value-type="string" calcext:value-type="string">
            <text:p>0733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5001" calcext:value-type="float">
            <text:p>355001</text:p>
          </table:table-cell>
          <table:table-cell office:value-type="string" calcext:value-type="string">
            <text:p>$2y$10$paTaUAUmfjUyog9ZxWumRuaX6qqfgr32lrXr.VlagQHpsyiqn9B2q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Галимова Алия Тагировна</text:p>
          </table:table-cell>
          <table:table-cell office:value-type="string" calcext:value-type="string">
            <text:p>0734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5002" calcext:value-type="float">
            <text:p>355002</text:p>
          </table:table-cell>
          <table:table-cell office:value-type="string" calcext:value-type="string">
            <text:p>$2y$10$dEzGjd3cl4LmuUDRGAh8fOo0Hw904JmL9n592ZSvJ5nIKX9SK89gS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Хабибуллина Лилия Талгатовна</text:p>
          </table:table-cell>
          <table:table-cell office:value-type="string" calcext:value-type="string">
            <text:p>0735@mail.m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5003" calcext:value-type="float">
            <text:p>355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Зиннатова Альфия Гафуровна</text:p>
          </table:table-cell>
          <table:table-cell office:value-type="string" calcext:value-type="string">
            <text:p>0736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1001" calcext:value-type="float">
            <text:p>361001</text:p>
          </table:table-cell>
          <table:table-cell office:value-type="string" calcext:value-type="string">
            <text:p>$2y$10$QW77jMkQoyFVjkNlXymMb.Qd.3wy/S043CzTEV2tYZlg4mKqF83am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Лукманова Ильнара Нагимовна</text:p>
          </table:table-cell>
          <table:table-cell office:value-type="string" calcext:value-type="string">
            <text:p>0737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1002" calcext:value-type="float">
            <text:p>361002</text:p>
          </table:table-cell>
          <table:table-cell office:value-type="string" calcext:value-type="string">
            <text:p>$2y$10$bzQsA3mLu4G5bkpwCrozNeIeCMm6zczUVdwOYkxUXmGTiRfU8XsCy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Хайруллина Гульнара Кафилевна</text:p>
          </table:table-cell>
          <table:table-cell office:value-type="string" calcext:value-type="string">
            <text:p>s3.mamadish@mail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$2y$10$GQdKzorNpFxg/1MOX.GDMehZzTw95wvZl4KIrL.RZhSQDRYMtdE/m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Габдрахманова Зульфия Махмутовна</text:p>
          </table:table-cell>
          <table:table-cell office:value-type="string" calcext:value-type="string">
            <text:p>0739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1004" calcext:value-type="float">
            <text:p>361004</text:p>
          </table:table-cell>
          <table:table-cell office:value-type="string" calcext:value-type="string">
            <text:p>$2y$10$7wqDw2V0kHGSpJJbyhGHsuP63oqVhWaGnz4CosTh/V.w6gWw5zMdq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Асапова Т.В.</text:p>
          </table:table-cell>
          <table:table-cell office:value-type="string" calcext:value-type="string">
            <text:p>Sbsh.Mam@tatar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06" calcext:value-type="float">
            <text:p>362006</text:p>
          </table:table-cell>
          <table:table-cell office:value-type="string" calcext:value-type="string">
            <text:p>$2y$10$67KCZ0UcFHokputStPTa4.C.6LHJasJKjEFd05AxdKSOyyoQ397aS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Двойничкова Тамара Михайловна</text:p>
          </table:table-cell>
          <table:table-cell office:value-type="string" calcext:value-type="string">
            <text:p>0741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10" calcext:value-type="float">
            <text:p>36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Павлова Елена Александровна</text:p>
          </table:table-cell>
          <table:table-cell office:value-type="string" calcext:value-type="string">
            <text:p>0742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14" calcext:value-type="float">
            <text:p>36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Якупова Зиля Рафаэлевна</text:p>
          </table:table-cell>
          <table:table-cell office:value-type="string" calcext:value-type="string">
            <text:p>0743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15" calcext:value-type="float">
            <text:p>362015</text:p>
          </table:table-cell>
          <table:table-cell office:value-type="string" calcext:value-type="string">
            <text:p>$2y$10$XkKpjsbpUxUBXoHZuLsddu2s9OwLbtn55d4ard67Ns5617hK3q6nO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Шандренкова Елена Валентиновна</text:p>
          </table:table-cell>
          <table:table-cell office:value-type="string" calcext:value-type="string">
            <text:p>0744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23" calcext:value-type="float">
            <text:p>36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Вагайцева О.И.</text:p>
          </table:table-cell>
          <table:table-cell office:value-type="string" calcext:value-type="string">
            <text:p>Lesechka.2009@mail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25" calcext:value-type="float">
            <text:p>362025</text:p>
          </table:table-cell>
          <table:table-cell office:value-type="string" calcext:value-type="string">
            <text:p>$2y$10$gyicr4Sr1YZEfrblj9L5oefYka75Z0zQErSP0RgznsZX6NXHB.IG2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Ханафеева Эльмира василовна </text:p>
          </table:table-cell>
          <table:table-cell office:value-type="string" calcext:value-type="string">
            <text:p>0746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27" calcext:value-type="float">
            <text:p>362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Шигаева Зимфира Мирзагаптуллаевна</text:p>
          </table:table-cell>
          <table:table-cell office:value-type="string" calcext:value-type="string">
            <text:p>0747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34" calcext:value-type="float">
            <text:p>362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Васильева Рушания Кутдусовна</text:p>
          </table:table-cell>
          <table:table-cell office:value-type="string" calcext:value-type="string">
            <text:p>0748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2074" calcext:value-type="float">
            <text:p>362074</text:p>
          </table:table-cell>
          <table:table-cell office:value-type="string" calcext:value-type="string">
            <text:p>$2y$10$OGux128x1yqJUrLEBgZ4Ie2Gnef2NoQHDDzLlEeBnzvoMhGbn4SUS</text:p>
          </table:table-cell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Кирушина Елизавета Васильевна</text:p>
          </table:table-cell>
          <table:table-cell office:value-type="string" calcext:value-type="string">
            <text:p>Salbm.mam@tatar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05" calcext:value-type="float">
            <text:p>364005</text:p>
          </table:table-cell>
          <table:table-cell office:value-type="string" calcext:value-type="string">
            <text:p>$2y$10$2L1HJKlonBNK950t1sMZdOOXAR10t5uKQz.WGWNLcsXs7yO2pV6DW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Газизова Миляуша Наиловна</text:p>
          </table:table-cell>
          <table:table-cell office:value-type="string" calcext:value-type="string">
            <text:p>0750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07" calcext:value-type="float">
            <text:p>36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Егорова Елена Петровна</text:p>
          </table:table-cell>
          <table:table-cell office:value-type="string" calcext:value-type="string">
            <text:p>sdusmet.mam@tatar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09" calcext:value-type="float">
            <text:p>364009</text:p>
          </table:table-cell>
          <table:table-cell office:value-type="string" calcext:value-type="string">
            <text:p>$2y$10$QdMGabqGiCiliymMC03I2uY6wwOcxdsHb7dPoQ7xZOT1GdRqETXRK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Фатихова Диляра Рахимовна</text:p>
          </table:table-cell>
          <table:table-cell office:value-type="string" calcext:value-type="string">
            <text:p>0753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11" calcext:value-type="float">
            <text:p>36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Шарифуллина Ильсеяр Мунировна</text:p>
          </table:table-cell>
          <table:table-cell office:value-type="string" calcext:value-type="string">
            <text:p>0754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12" calcext:value-type="float">
            <text:p>364012</text:p>
          </table:table-cell>
          <table:table-cell office:value-type="string" calcext:value-type="string">
            <text:p>$2y$10$939sVMQ4XiyTPdB12EXaG.NP16zosoK19m7A.lel3vLCP6ob2EAVK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Миннекаева Елизавета Арсентьевна</text:p>
          </table:table-cell>
          <table:table-cell office:value-type="string" calcext:value-type="string">
            <text:p>elizaveta.minnekaeva1963@mail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13" calcext:value-type="float">
            <text:p>364013</text:p>
          </table:table-cell>
          <table:table-cell office:value-type="string" calcext:value-type="string">
            <text:p>$2y$10$IZzNQMwMWEixWaj9JiVSM.C032e3UHXqJK72Xuj0YVRKaNsZ2u5cG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Гараева Гульзира Миннефаиловна</text:p>
          </table:table-cell>
          <table:table-cell office:value-type="string" calcext:value-type="string">
            <text:p>Ske.mam@tatar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16" calcext:value-type="float">
            <text:p>364016</text:p>
          </table:table-cell>
          <table:table-cell office:value-type="string" calcext:value-type="string">
            <text:p>$2y$10$kUjmqAqLHt58p8VQNBJHY.iLblHiatQ4.6arVQSZRleWP1gHGb8VC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Нигматуллина Эльмира Энгелевна</text:p>
          </table:table-cell>
          <table:table-cell office:value-type="string" calcext:value-type="string">
            <text:p>1974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18" calcext:value-type="float">
            <text:p>364018</text:p>
          </table:table-cell>
          <table:table-cell office:value-type="string" calcext:value-type="string">
            <text:p>$2y$10$NlIzOPOeoptMkDDKwcgy4.6e4qkRF5LKiZgbp19aROj02xlmde6WK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Шакирова Зайтуна Каримовна</text:p>
          </table:table-cell>
          <table:table-cell office:value-type="string" calcext:value-type="string">
            <text:p>0758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19" calcext:value-type="float">
            <text:p>364019</text:p>
          </table:table-cell>
          <table:table-cell office:value-type="string" calcext:value-type="string">
            <text:p>$2y$10$mgt2R.sTpTiJWYqk2VGbeO6KI4UPzYN78upMxj8SfsS498HkMoqW.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Сахапова Лейсан Ильдусовна</text:p>
          </table:table-cell>
          <table:table-cell office:value-type="string" calcext:value-type="string">
            <text:p>0759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20" calcext:value-type="float">
            <text:p>364020</text:p>
          </table:table-cell>
          <table:table-cell office:value-type="string" calcext:value-type="string">
            <text:p>$2y$10$ueB5VBlDxZHBjkW4rR7F7OBMbZO68qEPrXLLB6gBRBRZlhGlR3/IC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Салахеева Ляйсан Фазылзяновна</text:p>
          </table:table-cell>
          <table:table-cell office:value-type="string" calcext:value-type="string">
            <text:p>0760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21" calcext:value-type="float">
            <text:p>364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Ганеева Эндже Магсумовна</text:p>
          </table:table-cell>
          <table:table-cell office:value-type="string" calcext:value-type="string">
            <text:p>0761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22" calcext:value-type="float">
            <text:p>364022</text:p>
          </table:table-cell>
          <table:table-cell office:value-type="string" calcext:value-type="string">
            <text:p>$2y$10$9y74hjg1uXeALzp8BfU.peKnb5OtlmpC/fUqi.jAy9DMMfG8T3zJS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Шайдуллина Л.А.</text:p>
          </table:table-cell>
          <table:table-cell office:value-type="string" calcext:value-type="string">
            <text:p>0762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26" calcext:value-type="float">
            <text:p>364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Хамзина Гульназ Хавиловна</text:p>
          </table:table-cell>
          <table:table-cell office:value-type="string" calcext:value-type="string">
            <text:p>0763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28" calcext:value-type="float">
            <text:p>364028</text:p>
          </table:table-cell>
          <table:table-cell office:value-type="string" calcext:value-type="string">
            <text:p>$2y$10$lNaC2pPvmQtLf18/Zay2mePlZh65Ru7A1y.vXF0l61OEINW3kqGWa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Хайбуллина Зубарджат Габделхаковна</text:p>
          </table:table-cell>
          <table:table-cell office:value-type="string" calcext:value-type="string">
            <text:p>0764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29" calcext:value-type="float">
            <text:p>3640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Шрыкова Гузель Ильдусовна</text:p>
          </table:table-cell>
          <table:table-cell office:value-type="string" calcext:value-type="string">
            <text:p>ssdc.mam@tatar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30" calcext:value-type="float">
            <text:p>364030</text:p>
          </table:table-cell>
          <table:table-cell office:value-type="string" calcext:value-type="string">
            <text:p>$2y$10$j22sgko2B43TXMQ8sMCEaeAjwAGiPZ1Yu7rIkorZSBVev3LHIr5CO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Романова Галина Ивановна</text:p>
          </table:table-cell>
          <table:table-cell office:value-type="string" calcext:value-type="string">
            <text:p>0766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31" calcext:value-type="float">
            <text:p>3640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Зиятдинова Гульнар Ильгизовна</text:p>
          </table:table-cell>
          <table:table-cell office:value-type="string" calcext:value-type="string">
            <text:p>0767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35" calcext:value-type="float">
            <text:p>364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Максимова ТамараПавловна</text:p>
          </table:table-cell>
          <table:table-cell office:value-type="string" calcext:value-type="string">
            <text:p>0768@mail.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37" calcext:value-type="float">
            <text:p>364037</text:p>
          </table:table-cell>
          <table:table-cell office:value-type="string" calcext:value-type="string">
            <text:p>$2y$10$Z8M6NGQ4bJVnsRqHan.XbezrFYp74verAUsH82OC3FB/RRQr7Bmdy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Фархуллин Раиф Сунгатович</text:p>
          </table:table-cell>
          <table:table-cell office:value-type="string" calcext:value-type="string">
            <text:p>SMKirmen.Mam@tatar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4038" calcext:value-type="float">
            <text:p>36403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Мифтахова Эльмира Рифкатовна</text:p>
          </table:table-cell>
          <table:table-cell office:value-type="string" calcext:value-type="string">
            <text:p>0770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1001" calcext:value-type="float">
            <text:p>371001</text:p>
          </table:table-cell>
          <table:table-cell office:value-type="string" calcext:value-type="string">
            <text:p>$2y$10$AeIuEtkPn9iQ/Qfa/c.lhulBR6rkhgn21yJ3Fq.48VW0DfPFMx9HO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Архипова Наталья Николаевна</text:p>
          </table:table-cell>
          <table:table-cell office:value-type="string" calcext:value-type="string">
            <text:p>0771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1002" calcext:value-type="float">
            <text:p>371002</text:p>
          </table:table-cell>
          <table:table-cell office:value-type="string" calcext:value-type="string">
            <text:p>$2y$10$vShUndRNTXBv0.8PSKTMyuMQog1GxGzJiP1b/YPU6fkJfiGV6O3GO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Гончар Светлана Николаевна</text:p>
          </table:table-cell>
          <table:table-cell office:value-type="string" calcext:value-type="string">
            <text:p>0772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1003" calcext:value-type="float">
            <text:p>371003</text:p>
          </table:table-cell>
          <table:table-cell office:value-type="string" calcext:value-type="string">
            <text:p>$2y$10$XJAMIQNO3wRU6ielgsREGeK.loIJK1FHfa7fuCUV9NUIQNC.EKjM.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Максимов Геннадий Валерьевич</text:p>
          </table:table-cell>
          <table:table-cell office:value-type="string" calcext:value-type="string">
            <text:p>0773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1004" calcext:value-type="float">
            <text:p>371004</text:p>
          </table:table-cell>
          <table:table-cell office:value-type="string" calcext:value-type="string">
            <text:p>$2y$10$EdQ3l01nBWy6qf.mdUSOx..IhLPva90z1Xb2L6/i89pWaYt8glKPq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Ахмадышева Екатерина Николаевна</text:p>
          </table:table-cell>
          <table:table-cell office:value-type="string" calcext:value-type="string">
            <text:p>0774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1005" calcext:value-type="float">
            <text:p>371005</text:p>
          </table:table-cell>
          <table:table-cell office:value-type="string" calcext:value-type="string">
            <text:p>$2y$10$CZKzWKjsgWOGFBOQQ6uNaevZ9pG4h2WklErsj9LtVY5jbJlWHuhsi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Скворцова Лариса Николаевна</text:p>
          </table:table-cell>
          <table:table-cell office:value-type="string" calcext:value-type="string">
            <text:p>0775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09" calcext:value-type="float">
            <text:p>372009</text:p>
          </table:table-cell>
          <table:table-cell office:value-type="string" calcext:value-type="string">
            <text:p>$2y$10$QHiRf8pxfT1M.yh0Fp8WgeX.tzCSxE4amothymCwnH6rg2xBE6.qS</text:p>
          </table:table-cell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Алексеева Татьяна Ивановна</text:p>
          </table:table-cell>
          <table:table-cell office:value-type="string" calcext:value-type="string">
            <text:p>0776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10" calcext:value-type="float">
            <text:p>372010</text:p>
          </table:table-cell>
          <table:table-cell office:value-type="string" calcext:value-type="string">
            <text:p>$2y$10$cC4BZOVkWp2mPi5KxdM2lOqNbpCnlCxTkuQBK.j3Kvgrkp3/kqhzy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Андреева Светлана Юрьевна</text:p>
          </table:table-cell>
          <table:table-cell office:value-type="string" calcext:value-type="string">
            <text:p>2710000275@edu.tatar.ru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11" calcext:value-type="float">
            <text:p>372011</text:p>
          </table:table-cell>
          <table:table-cell office:value-type="string" calcext:value-type="string">
            <text:p>$2y$10$JmS3QcFuJdFlCupL09mHTeGMB.cXD6H9EldPB9hdjnKeJVypzNxIi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Иванова Айгуль Саетнуровна</text:p>
          </table:table-cell>
          <table:table-cell office:value-type="string" calcext:value-type="string">
            <text:p>0778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13" calcext:value-type="float">
            <text:p>37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Шакирова Рушания Инсофовна</text:p>
          </table:table-cell>
          <table:table-cell office:value-type="string" calcext:value-type="string">
            <text:p>0779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17" calcext:value-type="float">
            <text:p>372017</text:p>
          </table:table-cell>
          <table:table-cell office:value-type="string" calcext:value-type="string">
            <text:p>$2y$10$Cx4ZA1mGzbSa6/fj.c9L3utO/cLZOz0cqUW7OlOtkr/gHnkFF70b.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Ахмадуллина Светлана Андреевна</text:p>
          </table:table-cell>
          <table:table-cell office:value-type="string" calcext:value-type="string">
            <text:p>0780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21" calcext:value-type="float">
            <text:p>37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Гилязетдинова Гулюза Маратовна</text:p>
          </table:table-cell>
          <table:table-cell office:value-type="string" calcext:value-type="string">
            <text:p>0781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2023" calcext:value-type="float">
            <text:p>37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Сидорова Земфира Айдаровна</text:p>
          </table:table-cell>
          <table:table-cell office:value-type="string" calcext:value-type="string">
            <text:p>0782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3006" calcext:value-type="float">
            <text:p>373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Ахметшина Резеда Рифнуровна</text:p>
          </table:table-cell>
          <table:table-cell office:value-type="string" calcext:value-type="string">
            <text:p>1983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4007" calcext:value-type="float">
            <text:p>374007</text:p>
          </table:table-cell>
          <table:table-cell office:value-type="string" calcext:value-type="string">
            <text:p>$2y$10$C0U4Z9iBZioMMp3Mnq0i.OhDdXWmZpdJwGpkOVtw.WCgXPuGhh8.q</text:p>
          </table:table-cell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Шакиров Ленар Саетзянович</text:p>
          </table:table-cell>
          <table:table-cell office:value-type="string" calcext:value-type="string">
            <text:p>0784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4008" calcext:value-type="float">
            <text:p>37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Фаттахова Альфия Агзамовна</text:p>
          </table:table-cell>
          <table:table-cell office:value-type="string" calcext:value-type="string">
            <text:p>0785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4014" calcext:value-type="float">
            <text:p>374014</text:p>
          </table:table-cell>
          <table:table-cell office:value-type="string" calcext:value-type="string">
            <text:p>$2y$10$zfGcCzXlbQOXyGGRJFcKn.GAU7.57k/WOwMaYdI5TdrylnIQpl1py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Ситдикова Юлия Касимовна</text:p>
          </table:table-cell>
          <table:table-cell office:value-type="string" calcext:value-type="string">
            <text:p>0786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4015" calcext:value-type="float">
            <text:p>374015</text:p>
          </table:table-cell>
          <table:table-cell office:value-type="string" calcext:value-type="string">
            <text:p>$2y$10$gk4lJY3kOmx8JTuckk.UTebGndPSY.K3lPaE.3VdM0qjDuX2nnKw.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Ахунова Венера Марсельевна</text:p>
          </table:table-cell>
          <table:table-cell office:value-type="string" calcext:value-type="string">
            <text:p>0787@mail.m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4022" calcext:value-type="float">
            <text:p>374022</text:p>
          </table:table-cell>
          <table:table-cell office:value-type="string" calcext:value-type="string">
            <text:p>$2y$10$wJME29d4zmRgaHSxPLz1Gu8JhWQXoFkmrcC3aLfOEAQXseXfEcry2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Шамсиева Эльвира Ивановна</text:p>
          </table:table-cell>
          <table:table-cell office:value-type="string" calcext:value-type="string">
            <text:p>0788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1001" calcext:value-type="float">
            <text:p>381001</text:p>
          </table:table-cell>
          <table:table-cell office:value-type="string" calcext:value-type="string">
            <text:p>$2y$10$dPvTi5OV7CSZU/6WDXXguuNEeKXOSxVkTDPWVgUcs3RgV9l/BgbQ2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Латыпова Лилия Камилевна</text:p>
          </table:table-cell>
          <table:table-cell office:value-type="string" calcext:value-type="string">
            <text:p>2802000435@edu.tatar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1002" calcext:value-type="float">
            <text:p>381002</text:p>
          </table:table-cell>
          <table:table-cell office:value-type="string" calcext:value-type="string">
            <text:p>$2y$10$CZgPv41W0yUy1pHxZ6AtRetCfAYBoGAep4jn/1CU7imxK8mN5/dNq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Галиева Вера Михайловна</text:p>
          </table:table-cell>
          <table:table-cell office:value-type="string" calcext:value-type="string">
            <text:p>mvm_1902@mail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1003" calcext:value-type="float">
            <text:p>381003</text:p>
          </table:table-cell>
          <table:table-cell office:value-type="string" calcext:value-type="string">
            <text:p>$2y$10$qHZfAcdy4BRLNVWyFkmHA.LOdJrIkMEsW5lN9U5vqjSzgaCotCBDW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Газизова Рамиля Альмировна</text:p>
          </table:table-cell>
          <table:table-cell office:value-type="string" calcext:value-type="string">
            <text:p>Lukc88@mail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1022" calcext:value-type="float">
            <text:p>381022</text:p>
          </table:table-cell>
          <table:table-cell office:value-type="string" calcext:value-type="string">
            <text:p>$2y$10$UBV6zV4OYKtMtKKVBofYVeq7A.whINVjgYl9RabJyhOj6qZN.nFzK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Яманаева Альбина Филимоновна</text:p>
          </table:table-cell>
          <table:table-cell office:value-type="string" calcext:value-type="string">
            <text:p>0792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2007" calcext:value-type="float">
            <text:p>38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Суфиярова Джамиля Ильдусовна</text:p>
          </table:table-cell>
          <table:table-cell office:value-type="string" calcext:value-type="string">
            <text:p>dzhamilya.sufiyarova@mail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2008" calcext:value-type="float">
            <text:p>382008</text:p>
          </table:table-cell>
          <table:table-cell office:value-type="string" calcext:value-type="string">
            <text:p>$2y$10$HNx8TTuo7E3tRCu9LXKQXuU/Dn/lGd2kh2UjKFyvwO9zhv4iA8Kna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Миляуша Тухбатуллина</text:p>
          </table:table-cell>
          <table:table-cell office:value-type="string" calcext:value-type="string">
            <text:p>gmilja1980@gmail.co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2009" calcext:value-type="float">
            <text:p>382009</text:p>
          </table:table-cell>
          <table:table-cell office:value-type="string" calcext:value-type="string">
            <text:p>$2y$10$BxduG1OLoQv5zIwGlMTuVu68x/8AsqNfEl3F2MPgYxji/giMKqX1q</text:p>
          </table:table-cell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Казанцева Надежда Сергеевна</text:p>
          </table:table-cell>
          <table:table-cell office:value-type="string" calcext:value-type="string">
            <text:p>st-matveevka@yandex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2010" calcext:value-type="float">
            <text:p>382010</text:p>
          </table:table-cell>
          <table:table-cell office:value-type="string" calcext:value-type="string">
            <text:p>$2y$10$5zvhJG9v/8dd2qNoLnVIJOuVa65h8SXOlhZ/c2obsen/lM1xbuFz6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Гатауллина Эльмира Рашитовна</text:p>
          </table:table-cell>
          <table:table-cell office:value-type="string" calcext:value-type="string">
            <text:p>0796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2011" calcext:value-type="float">
            <text:p>38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Галеева Елена Ирековна</text:p>
          </table:table-cell>
          <table:table-cell office:value-type="string" calcext:value-type="string">
            <text:p>0797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2018" calcext:value-type="float">
            <text:p>382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Бадретдинова Альбина Музагитовна</text:p>
          </table:table-cell>
          <table:table-cell office:value-type="string" calcext:value-type="string">
            <text:p>1965albina@bk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3017" calcext:value-type="float">
            <text:p>383017</text:p>
          </table:table-cell>
          <table:table-cell office:value-type="string" calcext:value-type="string">
            <text:p>$2y$10$GCMY2dyEcRVgnXiepHjCSeUMYvglTvdsGM.H4c5iXmmUYEMcVDQIC</text:p>
          </table:table-cell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Насырова Дилара Наиловна</text:p>
          </table:table-cell>
          <table:table-cell office:value-type="string" calcext:value-type="string">
            <text:p>0799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4004" calcext:value-type="float">
            <text:p>38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Николаева Надежда Михайловна</text:p>
          </table:table-cell>
          <table:table-cell office:value-type="string" calcext:value-type="string">
            <text:p>0800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4006" calcext:value-type="float">
            <text:p>38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Галиева Гульсария Ульфатовна</text:p>
          </table:table-cell>
          <table:table-cell office:value-type="string" calcext:value-type="string">
            <text:p>0801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4014" calcext:value-type="float">
            <text:p>384014</text:p>
          </table:table-cell>
          <table:table-cell office:value-type="string" calcext:value-type="string">
            <text:p>$2y$10$Lnv1NSux7fx4NU1yvdPZo.SqOaUUdvDY/Qze6DYaIWPHQZfUmi/7e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Зарипова Фарида Фаизовна</text:p>
          </table:table-cell>
          <table:table-cell office:value-type="string" calcext:value-type="string">
            <text:p>0802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4015" calcext:value-type="float">
            <text:p>38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Закирова Лариса Нурмухамиетовна</text:p>
          </table:table-cell>
          <table:table-cell office:value-type="string" calcext:value-type="string">
            <text:p>0803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4016" calcext:value-type="float">
            <text:p>38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Шарафетдинова Фарида Рафисовна</text:p>
          </table:table-cell>
          <table:table-cell office:value-type="string" calcext:value-type="string">
            <text:p>0804@mail.m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84017" calcext:value-type="float">
            <text:p>384017</text:p>
          </table:table-cell>
          <table:table-cell office:value-type="string" calcext:value-type="string">
            <text:p>$2y$10$Qu5sAPVpdZpZ5nD/v3ydNOp/CCZZZ.BMdae9eug46m6uu04xXyrpy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Гильфанова Лилия Мирзарифовна</text:p>
          </table:table-cell>
          <table:table-cell office:value-type="string" calcext:value-type="string">
            <text:p>0805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2004" calcext:value-type="float">
            <text:p>39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Гарипова Лилия Фоатовна</text:p>
          </table:table-cell>
          <table:table-cell office:value-type="string" calcext:value-type="string">
            <text:p>0806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2005" calcext:value-type="float">
            <text:p>39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Латыйпова Алсу Галиевна</text:p>
          </table:table-cell>
          <table:table-cell office:value-type="string" calcext:value-type="string">
            <text:p>0807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2008" calcext:value-type="float">
            <text:p>39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Миркасимова Лилия Айратовна</text:p>
          </table:table-cell>
          <table:table-cell office:value-type="string" calcext:value-type="string">
            <text:p>0808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2010" calcext:value-type="float">
            <text:p>392010</text:p>
          </table:table-cell>
          <table:table-cell office:value-type="string" calcext:value-type="string">
            <text:p>$2y$10$9RAwv4ZC8z8FSzLGjNuDL.nhHyioJlnylU7IkHwoY/LQ.7W5zrVX.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Лобанова Лариса Валерьевна</text:p>
          </table:table-cell>
          <table:table-cell office:value-type="string" calcext:value-type="string">
            <text:p>0809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2011" calcext:value-type="float">
            <text:p>39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Хакимова Гульнара Шариповна</text:p>
          </table:table-cell>
          <table:table-cell office:value-type="string" calcext:value-type="string">
            <text:p>0810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01" calcext:value-type="float">
            <text:p>394001</text:p>
          </table:table-cell>
          <table:table-cell office:value-type="string" calcext:value-type="string">
            <text:p>$2y$10$EyZW.18JwxOD65La4M2eROdxcj3azwLj.2Po9ZZV.LRzkCiHO.MxO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Мадьярова Айгуль Ильгизовна</text:p>
          </table:table-cell>
          <table:table-cell office:value-type="string" calcext:value-type="string">
            <text:p>0811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02" calcext:value-type="float">
            <text:p>394002</text:p>
          </table:table-cell>
          <table:table-cell office:value-type="string" calcext:value-type="string">
            <text:p>$2y$10$EARgwaWu9Syyb8ygl.RQ7O5h5AmrhdnmT2tRADD1bnqJNoxAnl0D.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Каримова Миляуша Мирзануровна</text:p>
          </table:table-cell>
          <table:table-cell office:value-type="string" calcext:value-type="string">
            <text:p>0812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03" calcext:value-type="float">
            <text:p>394003</text:p>
          </table:table-cell>
          <table:table-cell office:value-type="string" calcext:value-type="string">
            <text:p>$2y$10$eqNmF9WVT0C1RVaDs1vRVe4pPC4PEtx4gbnaXAVNzmHNVFZU05CB.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Мухаметзянова Гульшат Ильясовна</text:p>
          </table:table-cell>
          <table:table-cell office:value-type="string" calcext:value-type="string">
            <text:p>0813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06" calcext:value-type="float">
            <text:p>394006</text:p>
          </table:table-cell>
          <table:table-cell office:value-type="string" calcext:value-type="string">
            <text:p>$2y$10$YDkgk0Rpgrq59CPATqAt/OREzcFDz7lO92xAoPaRsxyFWtqV8rvIq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Мирсалихова Гульнур Радильевана</text:p>
          </table:table-cell>
          <table:table-cell office:value-type="string" calcext:value-type="string">
            <text:p>0814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07" calcext:value-type="float">
            <text:p>39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Хусаенова Гузель Асгатовна</text:p>
          </table:table-cell>
          <table:table-cell office:value-type="string" calcext:value-type="string">
            <text:p>0815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09" calcext:value-type="float">
            <text:p>39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Султанова ТанзиляРависовна</text:p>
          </table:table-cell>
          <table:table-cell office:value-type="string" calcext:value-type="string">
            <text:p>0816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13" calcext:value-type="float">
            <text:p>39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Давлетгареева Айгуль Рафисовна</text:p>
          </table:table-cell>
          <table:table-cell office:value-type="string" calcext:value-type="string">
            <text:p>0817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14" calcext:value-type="float">
            <text:p>394014</text:p>
          </table:table-cell>
          <table:table-cell office:value-type="string" calcext:value-type="string">
            <text:p>$2y$10$xmdOb.GSdVjZkGd3AyUtEuwplJzeQdhUExg5fUpB7Ya0JjZ89uOay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Ризатдинова Айгуль Мударисовна</text:p>
          </table:table-cell>
          <table:table-cell office:value-type="string" calcext:value-type="string">
            <text:p>0818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15" calcext:value-type="float">
            <text:p>39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Ахметова Сурия Фарисовна</text:p>
          </table:table-cell>
          <table:table-cell office:value-type="string" calcext:value-type="string">
            <text:p>0819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18" calcext:value-type="float">
            <text:p>39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Аюпова Инзиля Шогаеповна</text:p>
          </table:table-cell>
          <table:table-cell office:value-type="string" calcext:value-type="string">
            <text:p><text:a xlink:href="mailto:394019@mail.m" xlink:type="simple">394019@mail.m</text:a>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19" calcext:value-type="float">
            <text:p>394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Шагалиева Фаузия Наиловна</text:p>
          </table:table-cell>
          <table:table-cell office:value-type="string" calcext:value-type="string">
            <text:p>0821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4025" calcext:value-type="float">
            <text:p>39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Хусаенова Гульнара Голусовна</text:p>
          </table:table-cell>
          <table:table-cell office:value-type="string" calcext:value-type="string">
            <text:p>0822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5001" calcext:value-type="float">
            <text:p>39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Гимранова Гульнара Валеевна</text:p>
          </table:table-cell>
          <table:table-cell office:value-type="string" calcext:value-type="string">
            <text:p>0823@mail.m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95002" calcext:value-type="float">
            <text:p>39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Субханкулова Эльвира Галинуровна</text:p>
          </table:table-cell>
          <table:table-cell office:value-type="string" calcext:value-type="string">
            <text:p>0824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1" calcext:value-type="float">
            <text:p>40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Ситдикова Рамиля Рамилевна </text:p>
          </table:table-cell>
          <table:table-cell office:value-type="string" calcext:value-type="string">
            <text:p>0825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2" calcext:value-type="float">
            <text:p>40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Фунтикова Энза Николаевна</text:p>
          </table:table-cell>
          <table:table-cell office:value-type="string" calcext:value-type="string">
            <text:p>0826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3" calcext:value-type="float">
            <text:p>40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Дорофеева Лилия Ильинична</text:p>
          </table:table-cell>
          <table:table-cell office:value-type="string" calcext:value-type="string">
            <text:p>lilya1971163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6" calcext:value-type="float">
            <text:p>401006</text:p>
          </table:table-cell>
          <table:table-cell office:value-type="string" calcext:value-type="string">
            <text:p>$2y$10$aemu/9GQfYMeXF6AK.FhMuFACsMm9.QesGz1dHpgQtPiWRx7I1oDq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Кондратьева Татьяна Григорьевна</text:p>
          </table:table-cell>
          <table:table-cell office:value-type="string" calcext:value-type="string">
            <text:p>3007000064@edu.tatar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7" calcext:value-type="float">
            <text:p>401007</text:p>
          </table:table-cell>
          <table:table-cell office:value-type="string" calcext:value-type="string">
            <text:p>$2y$10$n11U3XIWWxKXq4pvQovSOudE1tStRboGLQ/0Fo8WuLfqyjLyRsL/G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Ахметова Римма Габдулловна</text:p>
          </table:table-cell>
          <table:table-cell office:value-type="string" calcext:value-type="string">
            <text:p>0829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8" calcext:value-type="float">
            <text:p>40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Халиуллина Светлана Сергеевна</text:p>
          </table:table-cell>
          <table:table-cell office:value-type="string" calcext:value-type="string">
            <text:p>hal.svetlana78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09" calcext:value-type="float">
            <text:p>401009</text:p>
          </table:table-cell>
          <table:table-cell office:value-type="string" calcext:value-type="string">
            <text:p>$2y$10$iIr7TEIbdBTI2JHp/2Ccqua0XpVxXxq1QlgUiVgaveC1P1vove7.2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Козлова Марина Васильевна</text:p>
          </table:table-cell>
          <table:table-cell office:value-type="string" calcext:value-type="string">
            <text:p>0831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0" calcext:value-type="float">
            <text:p>40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Бобкова Светлана Васильевна</text:p>
          </table:table-cell>
          <table:table-cell office:value-type="string" calcext:value-type="string">
            <text:p>s.bobkova72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1" calcext:value-type="float">
            <text:p>401011</text:p>
          </table:table-cell>
          <table:table-cell office:value-type="string" calcext:value-type="string">
            <text:p>$2y$10$AoIPGLlvRcsKr6lVBAw41eETFfup9D3Cz5EvNVM0K9kjifJkBUXa2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Аляшева Роза Абдулкадировна</text:p>
          </table:table-cell>
          <table:table-cell office:value-type="string" calcext:value-type="string">
            <text:p>mag7013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2" calcext:value-type="float">
            <text:p>401012</text:p>
          </table:table-cell>
          <table:table-cell office:value-type="string" calcext:value-type="string">
            <text:p>$2y$10$EWQQL8BwgonOKPa8Mx53AenHk9P.0kxIiP5Fr7L.hE0pM9gTcNtr.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Ишмухаметов Ильгам Шакирзянович</text:p>
          </table:table-cell>
          <table:table-cell office:value-type="string" calcext:value-type="string">
            <text:p>0834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3" calcext:value-type="float">
            <text:p>401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Хаматова Гульнара Раисовна</text:p>
          </table:table-cell>
          <table:table-cell office:value-type="string" calcext:value-type="string">
            <text:p>0835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4" calcext:value-type="float">
            <text:p>401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Гора Алсу Сагитовна</text:p>
          </table:table-cell>
          <table:table-cell office:value-type="string" calcext:value-type="string">
            <text:p>Alsumalyutka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5" calcext:value-type="float">
            <text:p>401015</text:p>
          </table:table-cell>
          <table:table-cell office:value-type="string" calcext:value-type="string">
            <text:p>$2y$10$8kRRUNfvgRpX9d3usk6zveCKHAdn7d7Oj6FgYco/.Mh7pzmNte.8m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Гайнутдинова Зальфира Рашидовна </text:p>
          </table:table-cell>
          <table:table-cell office:value-type="string" calcext:value-type="string">
            <text:p>0837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6" calcext:value-type="float">
            <text:p>401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Орлова Елена Витальевна</text:p>
          </table:table-cell>
          <table:table-cell office:value-type="string" calcext:value-type="string">
            <text:p>0838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7" calcext:value-type="float">
            <text:p>401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Ибрагимова Алсу Рамзилевна</text:p>
          </table:table-cell>
          <table:table-cell office:value-type="string" calcext:value-type="string">
            <text:p>badretdinova.alsu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19" calcext:value-type="float">
            <text:p>401019</text:p>
          </table:table-cell>
          <table:table-cell office:value-type="string" calcext:value-type="string">
            <text:p>$2y$10$vhFix3JadpSU7IeCEqobc.V9gqzLxs1pDhMm2E/xknauX55b7yYGO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Каримова Гульнара Равшанбековна</text:p>
          </table:table-cell>
          <table:table-cell office:value-type="string" calcext:value-type="string">
            <text:p>k4rimova70@yandex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0" calcext:value-type="float">
            <text:p>401020</text:p>
          </table:table-cell>
          <table:table-cell office:value-type="string" calcext:value-type="string">
            <text:p>$2y$10$.inic7odx8OPJuZ0flGsIuSY6B3ccD1R4yts293n/fUrAccP9Up32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Мухамедьярова Гузель Хамитовна</text:p>
          </table:table-cell>
          <table:table-cell office:value-type="string" calcext:value-type="string">
            <text:p>0841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1" calcext:value-type="float">
            <text:p>401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Пономарёва Юлия Валерьевна</text:p>
          </table:table-cell>
          <table:table-cell office:value-type="string" calcext:value-type="string">
            <text:p>ylija585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2" calcext:value-type="float">
            <text:p>401022</text:p>
          </table:table-cell>
          <table:table-cell office:value-type="string" calcext:value-type="string">
            <text:p>$2y$10$4Xxkfig11HBetQ/giRiVWebtWnEw3PxblOR3k2kp620AdTeLsCCo6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Товалович Артём Сергеевич</text:p>
          </table:table-cell>
          <table:table-cell office:value-type="string" calcext:value-type="string">
            <text:p>0843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4" calcext:value-type="float">
            <text:p>401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Мишина Вера Борисовна</text:p>
          </table:table-cell>
          <table:table-cell office:value-type="string" calcext:value-type="string">
            <text:p>0844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5" calcext:value-type="float">
            <text:p>401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Башарова Гузель Бариевна</text:p>
          </table:table-cell>
          <table:table-cell office:value-type="string" calcext:value-type="string">
            <text:p>Guzel27_06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6" calcext:value-type="float">
            <text:p>401026</text:p>
          </table:table-cell>
          <table:table-cell office:value-type="string" calcext:value-type="string">
            <text:p>$2y$10$r.we2jpE9QHKXBZynXA3m.A1nwKFICsmtEEb/KTFk59WKOzoFQwCe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Абакарова Альфия Рашитовна</text:p>
          </table:table-cell>
          <table:table-cell office:value-type="string" calcext:value-type="string">
            <text:p>abakarova-alfiya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7" calcext:value-type="float">
            <text:p>401027</text:p>
          </table:table-cell>
          <table:table-cell office:value-type="string" calcext:value-type="string">
            <text:p>$2y$10$Ay1ZMa.Is3uF2fJGY4LOiucfWNuHy5G0QOn4XKVWtzUwdneP/WwXe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Минуллина Гульназ Радиковна</text:p>
          </table:table-cell>
          <table:table-cell office:value-type="string" calcext:value-type="string">
            <text:p>0847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8" calcext:value-type="float">
            <text:p>401028</text:p>
          </table:table-cell>
          <table:table-cell office:value-type="string" calcext:value-type="string">
            <text:p>$2y$10$IONM..HY.ailoAdq3eFs/eWoa4M8c5waQsetHqTaY6yWzWuRr5kT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Хадиева Айгуль Фатыховна</text:p>
          </table:table-cell>
          <table:table-cell office:value-type="string" calcext:value-type="string">
            <text:p>0848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29" calcext:value-type="float">
            <text:p>401029</text:p>
          </table:table-cell>
          <table:table-cell office:value-type="string" calcext:value-type="string">
            <text:p>$2y$10$JxY1bEHHU/QMzjFamxK/6ep4/4AxZUo10p15Yz1fDuLT7TwMm4gkW</text:p>
          </table:table-cell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Хадиева Сирена Асхатовна</text:p>
          </table:table-cell>
          <table:table-cell office:value-type="string" calcext:value-type="string">
            <text:p>hadieva77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1" calcext:value-type="float">
            <text:p>401031</text:p>
          </table:table-cell>
          <table:table-cell office:value-type="string" calcext:value-type="string">
            <text:p>$2y$10$De3P82W13B38eoQMVpyeuOp9K3NJI8Yw7fm/1A52w9Fa14nhrED3i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Давлетшина Вероника Васильевна</text:p>
          </table:table-cell>
          <table:table-cell office:value-type="string" calcext:value-type="string">
            <text:p>0850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2" calcext:value-type="float">
            <text:p>401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Колесникова Елена Владимировна</text:p>
          </table:table-cell>
          <table:table-cell office:value-type="string" calcext:value-type="string">
            <text:p>0851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3" calcext:value-type="float">
            <text:p>401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Козлова Светлана Владимировна</text:p>
          </table:table-cell>
          <table:table-cell office:value-type="string" calcext:value-type="string">
            <text:p>svetlana.kozlova.2000@list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4" calcext:value-type="float">
            <text:p>401034</text:p>
          </table:table-cell>
          <table:table-cell office:value-type="string" calcext:value-type="string">
            <text:p>$2y$10$MiYdc/PWnbcDKJdXq3bGxeTo0.CQ/J7cpJT9XbryX7TRENoGGfhA2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Садыкова Гульнар Шарифзяновна </text:p>
          </table:table-cell>
          <table:table-cell office:value-type="string" calcext:value-type="string">
            <text:p>0853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5" calcext:value-type="float">
            <text:p>401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Курбангалина Татьяна Владимировна</text:p>
          </table:table-cell>
          <table:table-cell office:value-type="string" calcext:value-type="string">
            <text:p>tatyana281168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6" calcext:value-type="float">
            <text:p>401036</text:p>
          </table:table-cell>
          <table:table-cell office:value-type="string" calcext:value-type="string">
            <text:p>$2y$10$oGci8sZzemSg1Ia9/fmu4ed0/YabKU4YldKZRnPgR6VPd4OaYJbky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Гришина Наталья Газинуровна</text:p>
          </table:table-cell>
          <table:table-cell office:value-type="string" calcext:value-type="string">
            <text:p>0855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7" calcext:value-type="float">
            <text:p>40103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Базилевских Наталья Александровна</text:p>
          </table:table-cell>
          <table:table-cell office:value-type="string" calcext:value-type="string">
            <text:p>0856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8" calcext:value-type="float">
            <text:p>40103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Высоцкая Марина Валентиновна</text:p>
          </table:table-cell>
          <table:table-cell office:value-type="string" calcext:value-type="string">
            <text:p>vmv.09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39" calcext:value-type="float">
            <text:p>401039</text:p>
          </table:table-cell>
          <table:table-cell office:value-type="string" calcext:value-type="string">
            <text:p>$2y$10$oQ7p6VJrC60Rp9Uo2xMyfOjDniGBmNvMfeh7QnHuWo9BKWxb1Qdde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Кузнецова Венера Сайдашевна</text:p>
          </table:table-cell>
          <table:table-cell office:value-type="string" calcext:value-type="string">
            <text:p>0858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40" calcext:value-type="float">
            <text:p>40104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Садриева Гульназ Ильгизовна</text:p>
          </table:table-cell>
          <table:table-cell office:value-type="string" calcext:value-type="string">
            <text:p>0859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1043" calcext:value-type="float">
            <text:p>40104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Новикова Ирина Сергеевна</text:p>
          </table:table-cell>
          <table:table-cell office:value-type="string" calcext:value-type="string">
            <text:p>0860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04" calcext:value-type="float">
            <text:p>40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Гараева Екатерина Михайловна</text:p>
          </table:table-cell>
          <table:table-cell office:value-type="string" calcext:value-type="string">
            <text:p>0861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41" calcext:value-type="float">
            <text:p>40204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Асылгараева Майся Ахметгараевна</text:p>
          </table:table-cell>
          <table:table-cell office:value-type="string" calcext:value-type="string">
            <text:p>0862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42" calcext:value-type="float">
            <text:p>40204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Гайсина Альбина Мазгаровна</text:p>
          </table:table-cell>
          <table:table-cell office:value-type="string" calcext:value-type="string">
            <text:p>gaisinaalbincka@yandex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43" calcext:value-type="float">
            <text:p>402043</text:p>
          </table:table-cell>
          <table:table-cell office:value-type="string" calcext:value-type="string">
            <text:p>$2y$10$aWsp/55.Fwp20xhtb4kvs.i5DP9.7Wf9V74V0N8a7HZKYo0PR4gxq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Мусина Энже Ситдиковна</text:p>
          </table:table-cell>
          <table:table-cell office:value-type="string" calcext:value-type="string">
            <text:p>0864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45" calcext:value-type="float">
            <text:p>40204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Ермилова Елена Алексеевна</text:p>
          </table:table-cell>
          <table:table-cell office:value-type="string" calcext:value-type="string">
            <text:p>0865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47" calcext:value-type="float">
            <text:p>40204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Федосеева Айгуль Дамировна</text:p>
          </table:table-cell>
          <table:table-cell office:value-type="string" calcext:value-type="string">
            <text:p>fedoseeva_aygul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48" calcext:value-type="float">
            <text:p>402048</text:p>
          </table:table-cell>
          <table:table-cell office:value-type="string" calcext:value-type="string">
            <text:p>$2y$10$hKbOeQVkqlWMik8q5mSK.et4I00JLTwlI4WivXHIjaNIYxQbRYCbm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Хазиева Олеся Николаевна</text:p>
          </table:table-cell>
          <table:table-cell office:value-type="string" calcext:value-type="string">
            <text:p>olesianikolaevna36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50" calcext:value-type="float">
            <text:p>402050</text:p>
          </table:table-cell>
          <table:table-cell office:value-type="string" calcext:value-type="string">
            <text:p>$2y$10$boS4Qc0nnBmWy9/3QLE7p.yXh8uA/GmxF3HKK6q64PdwKawzfmXkS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Баранова Наталья Ивановна</text:p>
          </table:table-cell>
          <table:table-cell office:value-type="string" calcext:value-type="string">
            <text:p>0868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51" calcext:value-type="float">
            <text:p>40205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Никишина Татьяна Дмитриевна</text:p>
          </table:table-cell>
          <table:table-cell office:value-type="string" calcext:value-type="string">
            <text:p>0869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52" calcext:value-type="float">
            <text:p>40205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Биряльцева Наталья Владимировна</text:p>
          </table:table-cell>
          <table:table-cell office:value-type="string" calcext:value-type="string">
            <text:p>0870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2054" calcext:value-type="float">
            <text:p>40205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Ибрагимов Мансур Динарович</text:p>
          </table:table-cell>
          <table:table-cell office:value-type="string" calcext:value-type="string">
            <text:p>mansuribrahim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3036" calcext:value-type="float">
            <text:p>403036</text:p>
          </table:table-cell>
          <table:table-cell office:value-type="string" calcext:value-type="string">
            <text:p>$2y$10$KadgreFm/V2sPgm4hFGwC.BF4SB6itRGqqMCgUrm2lUI8cOxdDlOK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Габдуллахатова Лейсян Азгамовна</text:p>
          </table:table-cell>
          <table:table-cell office:value-type="string" calcext:value-type="string">
            <text:p>0872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3037" calcext:value-type="float">
            <text:p>40303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Садыкова Галия Мударисовна</text:p>
          </table:table-cell>
          <table:table-cell office:value-type="string" calcext:value-type="string">
            <text:p>0873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4044" calcext:value-type="float">
            <text:p>40404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Сахабиева Ильсия Махмутовна</text:p>
          </table:table-cell>
          <table:table-cell office:value-type="string" calcext:value-type="string">
            <text:p>0874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4046" calcext:value-type="float">
            <text:p>40404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Туйчина Гулюся Хатиповна</text:p>
          </table:table-cell>
          <table:table-cell office:value-type="string" calcext:value-type="string">
            <text:p>0875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4049" calcext:value-type="float">
            <text:p>40404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Шафикова Милауша Марселовна</text:p>
          </table:table-cell>
          <table:table-cell office:value-type="string" calcext:value-type="string">
            <text:p>0876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4053" calcext:value-type="float">
            <text:p>40405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Филатова Оксана Николаевна</text:p>
          </table:table-cell>
          <table:table-cell office:value-type="string" calcext:value-type="string">
            <text:p>0877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5001" calcext:value-type="float">
            <text:p>40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Корсакова Вера Владимировна</text:p>
          </table:table-cell>
          <table:table-cell office:value-type="string" calcext:value-type="string">
            <text:p>0878@mail.m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5002" calcext:value-type="float">
            <text:p>40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Реброва Любовь Ивановна</text:p>
          </table:table-cell>
          <table:table-cell office:value-type="string" calcext:value-type="string">
            <text:p>0879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1" calcext:value-type="float">
            <text:p>41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Ермолаева Ирина Николаевна</text:p>
          </table:table-cell>
          <table:table-cell office:value-type="string" calcext:value-type="string">
            <text:p>0880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2" calcext:value-type="float">
            <text:p>412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Морозова Альфия Фанусовна</text:p>
          </table:table-cell>
          <table:table-cell office:value-type="string" calcext:value-type="string">
            <text:p>sch9412006@yandex.r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3" calcext:value-type="float">
            <text:p>412003</text:p>
          </table:table-cell>
          <table:table-cell office:value-type="string" calcext:value-type="string">
            <text:p>$2y$10$6kkgWviYCitn3whSK5vRTuN87q7MPZMscq3WPz28o3dcszpH9S6Sq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Никонорова Светлана Ивановна</text:p>
          </table:table-cell>
          <table:table-cell office:value-type="string" calcext:value-type="string">
            <text:p>sweta.nikonorowa@yandex.r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4" calcext:value-type="float">
            <text:p>412004</text:p>
          </table:table-cell>
          <table:table-cell office:value-type="string" calcext:value-type="string">
            <text:p>$2y$10$cJDAtU7tiodfuB1FGXTO4u4oFH4cd4/D0KrTq0kpVFo9AikJI0GrC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Зайцева Мария Николаевна</text:p>
          </table:table-cell>
          <table:table-cell office:value-type="string" calcext:value-type="string">
            <text:p>mn.zaytseva@mail.r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5" calcext:value-type="float">
            <text:p>412005</text:p>
          </table:table-cell>
          <table:table-cell office:value-type="string" calcext:value-type="string">
            <text:p>$2y$10$TRgQ0kBx9Cy1ZdiQ7iTwwert4lsx4qILI4UXCe.Ng83cTc0pADsNK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Полякова Маргарита Михайловна</text:p>
          </table:table-cell>
          <table:table-cell office:value-type="string" calcext:value-type="string">
            <text:p>0885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7" calcext:value-type="float">
            <text:p>41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Аглеева Гульнур Хакимовна</text:p>
          </table:table-cell>
          <table:table-cell office:value-type="string" calcext:value-type="string">
            <text:p>0886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8" calcext:value-type="float">
            <text:p>41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Чернышова Надежда Борисовна</text:p>
          </table:table-cell>
          <table:table-cell office:value-type="string" calcext:value-type="string">
            <text:p>0887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09" calcext:value-type="float">
            <text:p>41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Масловская Галина Анатольевна</text:p>
          </table:table-cell>
          <table:table-cell office:value-type="string" calcext:value-type="string">
            <text:p>0888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10" calcext:value-type="float">
            <text:p>41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Глушкова Екатерина Александровна </text:p>
          </table:table-cell>
          <table:table-cell office:value-type="string" calcext:value-type="string">
            <text:p>0889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11" calcext:value-type="float">
            <text:p>41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Фахрутдинова Рафиса Галимзяновна</text:p>
          </table:table-cell>
          <table:table-cell office:value-type="string" calcext:value-type="string">
            <text:p>0890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2012" calcext:value-type="float">
            <text:p>41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Гарифуллина Раиля Минненакиповна</text:p>
          </table:table-cell>
          <table:table-cell office:value-type="string" calcext:value-type="string">
            <text:p>0891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1" calcext:value-type="float">
            <text:p>414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Гибадуллина Гульгена Шамиловна</text:p>
          </table:table-cell>
          <table:table-cell office:value-type="string" calcext:value-type="string">
            <text:p>0892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2" calcext:value-type="float">
            <text:p>414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Габутдинова Гульшат Габдулловна</text:p>
          </table:table-cell>
          <table:table-cell office:value-type="string" calcext:value-type="string">
            <text:p>0893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4" calcext:value-type="float">
            <text:p>41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Билалова Алсу Минневакилевна</text:p>
          </table:table-cell>
          <table:table-cell office:value-type="string" calcext:value-type="string">
            <text:p>0894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5" calcext:value-type="float">
            <text:p>41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Вафина Айгуль Ахатовна</text:p>
          </table:table-cell>
          <table:table-cell office:value-type="string" calcext:value-type="string">
            <text:p>0895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6" calcext:value-type="float">
            <text:p>41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Зарипов Рашат Рашитович</text:p>
          </table:table-cell>
          <table:table-cell office:value-type="string" calcext:value-type="string">
            <text:p>0896@mail.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7" calcext:value-type="float">
            <text:p>414007</text:p>
          </table:table-cell>
          <table:table-cell office:value-type="string" calcext:value-type="string">
            <text:p>$2y$10$GzB96LKjBkOMnXvbNeFvmumRl.3HeeyHQDQoD22BaRr9.g7LLny5.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Булыгина Наталия Алексеевна</text:p>
          </table:table-cell>
          <table:table-cell office:value-type="string" calcext:value-type="string">
            <text:p>punk301271@yandex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28" calcext:value-type="float">
            <text:p>421028</text:p>
          </table:table-cell>
          <table:table-cell office:value-type="string" calcext:value-type="string">
            <text:p>$2y$10$/Cp/BH77ZkQkGd0GPTNXM.dy9tGbihpVaFFAayGFM4Lcz94HntNfu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Емукова Альбина Анатольевна</text:p>
          </table:table-cell>
          <table:table-cell office:value-type="string" calcext:value-type="string">
            <text:p>albinaemukova@gmail.co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29" calcext:value-type="float">
            <text:p>421029</text:p>
          </table:table-cell>
          <table:table-cell office:value-type="string" calcext:value-type="string">
            <text:p>$2y$10$w2fTdfu8jMT24.E3p7w5S.Pd2kJM0.eKYCKjYcXLwZdQUKuganTca</text:p>
          </table:table-cell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Мензелеева Наталья Николаевна</text:p>
          </table:table-cell>
          <table:table-cell office:value-type="string" calcext:value-type="string">
            <text:p>0899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$2y$10$iiQQBRYZjSez/H.8mKVjoOr8OIQzBdA9HCmEN2JQ.fJWsEApxI.9u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Гибадуллина Гульназ Шакирзяновна</text:p>
          </table:table-cell>
          <table:table-cell office:value-type="string" calcext:value-type="string">
            <text:p>0900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31" calcext:value-type="float">
            <text:p>421031</text:p>
          </table:table-cell>
          <table:table-cell office:value-type="string" calcext:value-type="string">
            <text:p>$2y$10$K33yfvLRl9kJBKu4NwSV7ODSUxelTVYy/chyglphBo0YEOadAyFyu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Мазитова Лилия Камилевна</text:p>
          </table:table-cell>
          <table:table-cell office:value-type="string" calcext:value-type="string">
            <text:p>0901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34" calcext:value-type="float">
            <text:p>421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Атаманова Екатерина Владимировна</text:p>
          </table:table-cell>
          <table:table-cell office:value-type="string" calcext:value-type="string">
            <text:p>atamanova0525@mail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35" calcext:value-type="float">
            <text:p>421035</text:p>
          </table:table-cell>
          <table:table-cell office:value-type="string" calcext:value-type="string">
            <text:p>$2y$10$v59LflzP2a0DdgricqCJXezr8ydIFQjCYUbNNh19XdBPqdshmg5ka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Гайнуллина Эльмира Хамзиевна</text:p>
          </table:table-cell>
          <table:table-cell office:value-type="string" calcext:value-type="string">
            <text:p>0903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1036" calcext:value-type="float">
            <text:p>421036</text:p>
          </table:table-cell>
          <table:table-cell office:value-type="string" calcext:value-type="string">
            <text:p>$2y$10$Aq/VcArobWw5B5sooS9Q8uYc15dwRH8CsVxGOkj5aBOd1RwPYAJBi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Наталья Петровна Красникова</text:p>
          </table:table-cell>
          <table:table-cell office:value-type="string" calcext:value-type="string">
            <text:p>0319@mail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01" calcext:value-type="float">
            <text:p>422001</text:p>
          </table:table-cell>
          <table:table-cell office:value-type="string" calcext:value-type="string">
            <text:p>$2y$10$AIe.JAzpQYqnKFwBVFAcYuh0msYbuYNvl2v60pwDVws.2g0IhrR4W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Потапова Екатерина Викторовна</text:p>
          </table:table-cell>
          <table:table-cell office:value-type="string" calcext:value-type="string">
            <text:p>0905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02" calcext:value-type="float">
            <text:p>422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Токарева Елена Геннадиевна</text:p>
          </table:table-cell>
          <table:table-cell office:value-type="string" calcext:value-type="string">
            <text:p>0906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03" calcext:value-type="float">
            <text:p>422003</text:p>
          </table:table-cell>
          <table:table-cell office:value-type="string" calcext:value-type="string">
            <text:p>$2y$10$elCkbC6RfQi/h3Ay2bXML.rzGO3kSGu13Lo7mOrY1PaqOv1vb6/4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Дементьева Светлана Юрьевна</text:p>
          </table:table-cell>
          <table:table-cell office:value-type="string" calcext:value-type="string">
            <text:p>0907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06" calcext:value-type="float">
            <text:p>422006</text:p>
          </table:table-cell>
          <table:table-cell office:value-type="string" calcext:value-type="string">
            <text:p>$2y$10$S63MCa2rLTiV5ckNNu8EWu9m.HolzyFA5/X/I7N3uhRvdYTaDwbGy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Тумакова Ирина Николаевна</text:p>
          </table:table-cell>
          <table:table-cell office:value-type="string" calcext:value-type="string">
            <text:p>0908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07" calcext:value-type="float">
            <text:p>42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Арбузова Елена Петровна</text:p>
          </table:table-cell>
          <table:table-cell office:value-type="string" calcext:value-type="string">
            <text:p>0909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09" calcext:value-type="float">
            <text:p>422009</text:p>
          </table:table-cell>
          <table:table-cell office:value-type="string" calcext:value-type="string">
            <text:p>$2y$10$5rabe49n5OiwLyRZ37DgrepMZaG0HPNOi4lgPdHWQmh7Wn97n5hES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Ямзукова Людмила Владимировна</text:p>
          </table:table-cell>
          <table:table-cell office:value-type="string" calcext:value-type="string">
            <text:p>tosharu1@mail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15" calcext:value-type="float">
            <text:p>422015</text:p>
          </table:table-cell>
          <table:table-cell office:value-type="string" calcext:value-type="string">
            <text:p>$2y$10$6B9OtbiyoHtzuQFVQTTIYOaFHU2kcsibn.z33R1G5K5cMdJ2MYfJy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Шарафеева Рамзия Илгизаровна</text:p>
          </table:table-cell>
          <table:table-cell office:value-type="string" calcext:value-type="string">
            <text:p>1966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17" calcext:value-type="float">
            <text:p>422017</text:p>
          </table:table-cell>
          <table:table-cell office:value-type="string" calcext:value-type="string">
            <text:p>$2y$10$n8nMFeCwCvIGxKw9IhZhN.std2FUhGPiVOQu90KK0rxnDF1A0hcIG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Илеверова Лариса Петровна</text:p>
          </table:table-cell>
          <table:table-cell office:value-type="string" calcext:value-type="string">
            <text:p>larisaileverova@mail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19" calcext:value-type="float">
            <text:p>422019</text:p>
          </table:table-cell>
          <table:table-cell office:value-type="string" calcext:value-type="string">
            <text:p>$2y$10$LvJfJylYqImt5lKRBjsAwO6Zwr1TiWZsxIueIxP/V1bBCewYbDTaG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Корнеева Надежда Александровна</text:p>
          </table:table-cell>
          <table:table-cell office:value-type="string" calcext:value-type="string">
            <text:p>Korneeva.n1971@mail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20" calcext:value-type="float">
            <text:p>422020</text:p>
          </table:table-cell>
          <table:table-cell office:value-type="string" calcext:value-type="string">
            <text:p>$2y$10$MZWQOq6dOG620yxhSsnA/uORsZSasgAjfdgE1Yct.N/m2H4gWA4Ta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Галиуллин Ильнур Булатович</text:p>
          </table:table-cell>
          <table:table-cell office:value-type="string" calcext:value-type="string">
            <text:p>st-chelny@bk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22" calcext:value-type="float">
            <text:p>422022</text:p>
          </table:table-cell>
          <table:table-cell office:value-type="string" calcext:value-type="string">
            <text:p>$2y$10$4rYqFv3FBhVKEtiVXmo4BOnh8mR.YG3WbzF0fzXV4SywpxeHKR4ha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Кашкарова Людмила Алексеевна</text:p>
          </table:table-cell>
          <table:table-cell office:value-type="string" calcext:value-type="string">
            <text:p>0915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23" calcext:value-type="float">
            <text:p>42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Тришина Елена Михайловна</text:p>
          </table:table-cell>
          <table:table-cell office:value-type="string" calcext:value-type="string">
            <text:p>0916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24" calcext:value-type="float">
            <text:p>422024</text:p>
          </table:table-cell>
          <table:table-cell office:value-type="string" calcext:value-type="string">
            <text:p>$2y$10$JxeZY2T1VFPGU/WeNbIgKOPICnTbJDUuUEsEBtnx.TJ6y/bk2UypG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Шайхутдинова Фирдаус Салихзяновна</text:p>
          </table:table-cell>
          <table:table-cell office:value-type="string" calcext:value-type="string">
            <text:p>0917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26" calcext:value-type="float">
            <text:p>422026</text:p>
          </table:table-cell>
          <table:table-cell office:value-type="string" calcext:value-type="string">
            <text:p>$2y$10$J5uhw9I3T4/NJHAQ2HEW6.O2JZzzv2gzJwpCB9rMUOjDoG9DCG/fy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Магусева Лариса Аркадьевна</text:p>
          </table:table-cell>
          <table:table-cell office:value-type="string" calcext:value-type="string">
            <text:p>maguseva.larisa@mail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2027" calcext:value-type="float">
            <text:p>422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Гафурова Исламия Нурисламовна</text:p>
          </table:table-cell>
          <table:table-cell office:value-type="string" calcext:value-type="string">
            <text:p>0919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3032" calcext:value-type="float">
            <text:p>423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Шумилина Гузель Ринатовна</text:p>
          </table:table-cell>
          <table:table-cell office:value-type="string" calcext:value-type="string">
            <text:p>0920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3033" calcext:value-type="float">
            <text:p>423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Ахметвалиева Индира Набиулловна</text:p>
          </table:table-cell>
          <table:table-cell office:value-type="string" calcext:value-type="string">
            <text:p>0921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4004" calcext:value-type="float">
            <text:p>424004</text:p>
          </table:table-cell>
          <table:table-cell office:value-type="string" calcext:value-type="string">
            <text:p>$2y$10$9v2wfIxm6JG5rkZcPFFpNeIJPsSSlUCjQCIf/S7xPMpKgvSbgJq0u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Муртазина Гульназ Ренатовна</text:p>
          </table:table-cell>
          <table:table-cell office:value-type="string" calcext:value-type="string">
            <text:p>0922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4012" calcext:value-type="float">
            <text:p>424012</text:p>
          </table:table-cell>
          <table:table-cell office:value-type="string" calcext:value-type="string">
            <text:p>$2y$10$sHG98lCBelX/5u3/WS9MGOZ2hluHp.CJ9smv0QmhNUwrNryWnLc6e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Хуснутдинова Розалия Гасымовна</text:p>
          </table:table-cell>
          <table:table-cell office:value-type="string" calcext:value-type="string">
            <text:p>0923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4013" calcext:value-type="float">
            <text:p>42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Бикинеев Рамис Набиуллович</text:p>
          </table:table-cell>
          <table:table-cell office:value-type="string" calcext:value-type="string">
            <text:p>bikinramis@gmail.co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4018" calcext:value-type="float">
            <text:p>424018</text:p>
          </table:table-cell>
          <table:table-cell office:value-type="string" calcext:value-type="string">
            <text:p>$2y$10$2Rp3uZEpFFytF8TjbZMmlOEOPOwHHltl8BOUAh4/c7YwEqriBa6Qa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Халиуллина Рамзия Самигулловна</text:p>
          </table:table-cell>
          <table:table-cell office:value-type="string" calcext:value-type="string">
            <text:p>0925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4021" calcext:value-type="float">
            <text:p>424021</text:p>
          </table:table-cell>
          <table:table-cell office:value-type="string" calcext:value-type="string">
            <text:p>$2y$10$x2F44yKR3WJToCh6W9kD/u5zILWdIiq5chfA9MZYeSu3JjEy1P0mG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Галлямова Гелюся Фоадовна</text:p>
          </table:table-cell>
          <table:table-cell office:value-type="string" calcext:value-type="string">
            <text:p>0926@mail.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24025" calcext:value-type="float">
            <text:p>424025</text:p>
          </table:table-cell>
          <table:table-cell office:value-type="string" calcext:value-type="string">
            <text:p>$2y$10$B.ctki.QNOt63HbZdAvRyeZyzMbNVJ6TAD9bgCu1Wx04EhLuQ58ki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Утяганова Нина Ивановна</text:p>
          </table:table-cell>
          <table:table-cell office:value-type="string" calcext:value-type="string">
            <text:p>0927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01" calcext:value-type="float">
            <text:p>432001</text:p>
          </table:table-cell>
          <table:table-cell office:value-type="string" calcext:value-type="string">
            <text:p>$2y$10$s5I8k32NmsAw0VIT8FQBJuHwZtB846cGT5BR/nAlzTcs3M7eabDMK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Сайфутдинов Хабир Загрутдинович</text:p>
          </table:table-cell>
          <table:table-cell office:value-type="string" calcext:value-type="string">
            <text:p>0928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02" calcext:value-type="float">
            <text:p>432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Атемова Маргарита Вадимовна</text:p>
          </table:table-cell>
          <table:table-cell office:value-type="string" calcext:value-type="string">
            <text:p>0929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06" calcext:value-type="float">
            <text:p>43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Курбанова Оксана Сергеевна</text:p>
          </table:table-cell>
          <table:table-cell office:value-type="string" calcext:value-type="string">
            <text:p>0930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07" calcext:value-type="float">
            <text:p>43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Козырева Марина Александровна</text:p>
          </table:table-cell>
          <table:table-cell office:value-type="string" calcext:value-type="string">
            <text:p>0931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08" calcext:value-type="float">
            <text:p>43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Сафина Алия Рафиковна</text:p>
          </table:table-cell>
          <table:table-cell office:value-type="string" calcext:value-type="string">
            <text:p>0932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10" calcext:value-type="float">
            <text:p>43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Данилина Татьяна Владимировна</text:p>
          </table:table-cell>
          <table:table-cell office:value-type="string" calcext:value-type="string">
            <text:p>0933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11" calcext:value-type="float">
            <text:p>43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Карнаух Юлия Михайловна</text:p>
          </table:table-cell>
          <table:table-cell office:value-type="string" calcext:value-type="string">
            <text:p>0934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13" calcext:value-type="float">
            <text:p>432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Зарипова Алсу Рифатовна</text:p>
          </table:table-cell>
          <table:table-cell office:value-type="string" calcext:value-type="string">
            <text:p>0935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15" calcext:value-type="float">
            <text:p>43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Пузырева Лилия Ильхамовна</text:p>
          </table:table-cell>
          <table:table-cell office:value-type="string" calcext:value-type="string">
            <text:p>sli.86@mail.ru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16" calcext:value-type="float">
            <text:p>43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Шакирова Танзиля Хашимовна</text:p>
          </table:table-cell>
          <table:table-cell office:value-type="string" calcext:value-type="string">
            <text:p>0937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20" calcext:value-type="float">
            <text:p>432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Гильфанова Раушания Абдулгазизовна</text:p>
          </table:table-cell>
          <table:table-cell office:value-type="string" calcext:value-type="string">
            <text:p>0938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2021" calcext:value-type="float">
            <text:p>43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Файзрахманова Ляля Флюровна</text:p>
          </table:table-cell>
          <table:table-cell office:value-type="string" calcext:value-type="string">
            <text:p>0939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4004" calcext:value-type="float">
            <text:p>43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Биктимерова Лилия Махмутовна</text:p>
          </table:table-cell>
          <table:table-cell office:value-type="string" calcext:value-type="string">
            <text:p>0940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4005" calcext:value-type="float">
            <text:p>43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Сабирова Гульнара Фаильевна</text:p>
          </table:table-cell>
          <table:table-cell office:value-type="string" calcext:value-type="string">
            <text:p>0941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4009" calcext:value-type="float">
            <text:p>43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Круглова Анна Петровна</text:p>
          </table:table-cell>
          <table:table-cell office:value-type="string" calcext:value-type="string">
            <text:p>0942@mail.m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4012" calcext:value-type="float">
            <text:p>43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Халилова Гулия Рашитовна</text:p>
          </table:table-cell>
          <table:table-cell office:value-type="string" calcext:value-type="string">
            <text:p>kon33@bk.ru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34014" calcext:value-type="float">
            <text:p>434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Талакова Наталья Игоревна</text:p>
          </table:table-cell>
          <table:table-cell office:value-type="string" calcext:value-type="string">
            <text:p>0944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1018" calcext:value-type="float">
            <text:p>441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Сулейманова Разиля Фаилевна</text:p>
          </table:table-cell>
          <table:table-cell office:value-type="string" calcext:value-type="string">
            <text:p>0945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1019" calcext:value-type="float">
            <text:p>441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Бадрутдинова Гузалия Нургалиевна</text:p>
          </table:table-cell>
          <table:table-cell office:value-type="string" calcext:value-type="string">
            <text:p>0946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2011" calcext:value-type="float">
            <text:p>44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Каримуллина Зульфира Хикматулловна</text:p>
          </table:table-cell>
          <table:table-cell office:value-type="string" calcext:value-type="string">
            <text:p>0947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2015" calcext:value-type="float">
            <text:p>44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Касимова Луиза Фаридовна</text:p>
          </table:table-cell>
          <table:table-cell office:value-type="string" calcext:value-type="string">
            <text:p>0948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2021" calcext:value-type="float">
            <text:p>44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Исмагилова Резеда Нурулловна</text:p>
          </table:table-cell>
          <table:table-cell office:value-type="string" calcext:value-type="string">
            <text:p>0949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2023" calcext:value-type="float">
            <text:p>44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Гадеева Ландыш Чулпановна</text:p>
          </table:table-cell>
          <table:table-cell office:value-type="string" calcext:value-type="string">
            <text:p>0950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2027" calcext:value-type="float">
            <text:p>442027</text:p>
          </table:table-cell>
          <table:table-cell office:value-type="string" calcext:value-type="string">
            <text:p>$2y$10$tLdd6pLvJT2ZyXOilxgYKOwXEH4DQLrx9/hfh0w/Swf8R2b0JIqpq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Хазиева Миляуша Равилевна</text:p>
          </table:table-cell>
          <table:table-cell office:value-type="string" calcext:value-type="string">
            <text:p>0951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01" calcext:value-type="float">
            <text:p>444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Хайриева Гульнара Габдулхановна</text:p>
          </table:table-cell>
          <table:table-cell office:value-type="string" calcext:value-type="string">
            <text:p>0952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03" calcext:value-type="float">
            <text:p>444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Валеева Эльвира Ризвановна</text:p>
          </table:table-cell>
          <table:table-cell office:value-type="string" calcext:value-type="string">
            <text:p>0953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04" calcext:value-type="float">
            <text:p>44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Дильмухаметова Лилия Рафаилевна</text:p>
          </table:table-cell>
          <table:table-cell office:value-type="string" calcext:value-type="string">
            <text:p>0954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06" calcext:value-type="float">
            <text:p>44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Шамсевалиев Фанзиль Хакимуллович</text:p>
          </table:table-cell>
          <table:table-cell office:value-type="string" calcext:value-type="string">
            <text:p>0955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09" calcext:value-type="float">
            <text:p>44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Агзямова Гульназ Фирдавсовна</text:p>
          </table:table-cell>
          <table:table-cell office:value-type="string" calcext:value-type="string">
            <text:p>0956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12" calcext:value-type="float">
            <text:p>44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Шакирова Алия Габдрафиковна</text:p>
          </table:table-cell>
          <table:table-cell office:value-type="string" calcext:value-type="string">
            <text:p>0958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14" calcext:value-type="float">
            <text:p>444014</text:p>
          </table:table-cell>
          <table:table-cell office:value-type="string" calcext:value-type="string">
            <text:p>$2y$10$TMRRspkoS7BdgQjfEvzkuuie.1c9dRRTWFTj93jaFI/WwQcwR7EqG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Имамиева Миляуша Мухаметканифовна</text:p>
          </table:table-cell>
          <table:table-cell office:value-type="string" calcext:value-type="string">
            <text:p>0960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17" calcext:value-type="float">
            <text:p>44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Шарипова Лейсан Гайфетдиновна</text:p>
          </table:table-cell>
          <table:table-cell office:value-type="string" calcext:value-type="string">
            <text:p>0961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22" calcext:value-type="float">
            <text:p>444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Каримуллин Фанис Гусманович</text:p>
          </table:table-cell>
          <table:table-cell office:value-type="string" calcext:value-type="string">
            <text:p>0962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24" calcext:value-type="float">
            <text:p>44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Багавиева Гульфия Бадамшиновна</text:p>
          </table:table-cell>
          <table:table-cell office:value-type="string" calcext:value-type="string">
            <text:p>0963@mail.m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4025" calcext:value-type="float">
            <text:p>44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Сунгатуллина Фарида Ханифовна, ЗДУР</text:p>
          </table:table-cell>
          <table:table-cell office:value-type="string" calcext:value-type="string">
            <text:p>0964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1001" calcext:value-type="float">
            <text:p>451001</text:p>
          </table:table-cell>
          <table:table-cell office:value-type="string" calcext:value-type="string">
            <text:p>$2y$10$CqLnnGjFOjpiPEwTiQMCL.Ww7NNiCNuTMhji4pP2ARjcQFJYFlxvG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Мифтахова Алсу Миннахматовна, ЗДУР</text:p>
          </table:table-cell>
          <table:table-cell office:value-type="string" calcext:value-type="string">
            <text:p>09650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1002" calcext:value-type="float">
            <text:p>451002</text:p>
          </table:table-cell>
          <table:table-cell office:value-type="string" calcext:value-type="string">
            <text:p>$2y$10$zjrGtV6ZQZ3noqWIyo1XbeQ10dCuVi0rYR03ZOiFIdkAZGsH5WgcG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Шакирова Гульнара Ринатовна, ЗДУР</text:p>
          </table:table-cell>
          <table:table-cell office:value-type="string" calcext:value-type="string">
            <text:p>1111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1024" calcext:value-type="float">
            <text:p>451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Валиева Лариса Петровна,ЗДУР</text:p>
          </table:table-cell>
          <table:table-cell office:value-type="string" calcext:value-type="string">
            <text:p>0967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2003" calcext:value-type="float">
            <text:p>452003</text:p>
          </table:table-cell>
          <table:table-cell office:value-type="string" calcext:value-type="string">
            <text:p>$2y$10$UqXSbenbeZwDkv5kwiPMheabAwsDIr/3bjkNQiXr1NKygchQwox0O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Мухарлямова Чулпан Хатиповна, ЗДУР</text:p>
          </table:table-cell>
          <table:table-cell office:value-type="string" calcext:value-type="string">
            <text:p>chulpan1509@yandex.ru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2012" calcext:value-type="float">
            <text:p>452012</text:p>
          </table:table-cell>
          <table:table-cell office:value-type="string" calcext:value-type="string">
            <text:p>$2y$10$vgY2wpongBcNkjy2LiASFuB7x1LTWQTt8ARY3l5DNdPod6ZCVsshS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Шакирова Земфира Ренатовна,ЗДУР</text:p>
          </table:table-cell>
          <table:table-cell office:value-type="string" calcext:value-type="string">
            <text:p>zemfira.shakirova.19@mail.ru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04" calcext:value-type="float">
            <text:p>454004</text:p>
          </table:table-cell>
          <table:table-cell office:value-type="string" calcext:value-type="string">
            <text:p>$2y$10$YKXrjnXSc.OcU3lgcOQnUOPPtgSkCjJuPXt7zhFUmpuUFeQ..9Jy2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Газизова Зульфия Наилевна, ЗДУР</text:p>
          </table:table-cell>
          <table:table-cell office:value-type="string" calcext:value-type="string">
            <text:p>znhadieva@gmail.co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06" calcext:value-type="float">
            <text:p>454006</text:p>
          </table:table-cell>
          <table:table-cell office:value-type="string" calcext:value-type="string">
            <text:p>$2y$10$ji8bJIlh8ThQdxmbAK7ds.lYV1xNKSdLg/d3eLiwgm.bVozRwBi8.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Махмутова Гульнара Закаровна,ЗДУР</text:p>
          </table:table-cell>
          <table:table-cell office:value-type="string" calcext:value-type="string">
            <text:p>0971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07" calcext:value-type="float">
            <text:p>454007</text:p>
          </table:table-cell>
          <table:table-cell office:value-type="string" calcext:value-type="string">
            <text:p>$2y$10$ByWLT8g1OsCndXICFuUVYeiVpzlHnrPEgY1I5SgzyTJp2Xewg2Gx6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Мингазова Халида Миннулловнв ,ЗДУР</text:p>
          </table:table-cell>
          <table:table-cell office:value-type="string" calcext:value-type="string">
            <text:p>0972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08" calcext:value-type="float">
            <text:p>454008</text:p>
          </table:table-cell>
          <table:table-cell office:value-type="string" calcext:value-type="string">
            <text:p>$2y$10$pVYPhvsVi3fWGrK1y6VEwOFB/rGtf0Y7KZA.jD.einvEaAxyJAJHK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Хасанова Мафруза Ракибовна, ЗДУР</text:p>
          </table:table-cell>
          <table:table-cell office:value-type="string" calcext:value-type="string">
            <text:p>0973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09" calcext:value-type="float">
            <text:p>454009</text:p>
          </table:table-cell>
          <table:table-cell office:value-type="string" calcext:value-type="string">
            <text:p>$2y$10$/LC40NNaDxJ82CcUmBty9e84Srx0TIuojerYmVMPCwKkLhKVHtJc2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Гарифуллина Кадрия Хаернасовна, ЗДУР</text:p>
          </table:table-cell>
          <table:table-cell office:value-type="string" calcext:value-type="string">
            <text:p>097425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0" calcext:value-type="float">
            <text:p>454010</text:p>
          </table:table-cell>
          <table:table-cell office:value-type="string" calcext:value-type="string">
            <text:p>$2y$10$gaXGMpTh6LSWkFKqjFDadelmK85rAc1QPNUPkoKGDkkhIcZAsK9zW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Мияссарова Гульчачак Халимовна,ЗДУР</text:p>
          </table:table-cell>
          <table:table-cell office:value-type="string" calcext:value-type="string">
            <text:p>shitsysaba@yandex.ru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1" calcext:value-type="float">
            <text:p>45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Валеева Алина Фанзилевна, ЗДУР</text:p>
          </table:table-cell>
          <table:table-cell office:value-type="string" calcext:value-type="string">
            <text:p>VAFALINKA@mail.ru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4" calcext:value-type="float">
            <text:p>454014</text:p>
          </table:table-cell>
          <table:table-cell office:value-type="string" calcext:value-type="string">
            <text:p>$2y$10$5hbkjAbRPMT.GF/3EZnvm.MPNFXoJD9yjoYkRQw.BviYRsoPqtBkK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Ямалеева Чулпан Яудатовна,ЗДУР</text:p>
          </table:table-cell>
          <table:table-cell office:value-type="string" calcext:value-type="string">
            <text:p>0977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5" calcext:value-type="float">
            <text:p>454015</text:p>
          </table:table-cell>
          <table:table-cell office:value-type="string" calcext:value-type="string">
            <text:p>$2y$10$Op8OXmrrG4TsdnH3S5bDvOKLWHFKkW8GxeoWgZIXuAuOXuS8KiiN6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Сагитдинова Расима Наиловна,ЗДУР</text:p>
          </table:table-cell>
          <table:table-cell office:value-type="string" calcext:value-type="string">
            <text:p>0978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6" calcext:value-type="float">
            <text:p>454016</text:p>
          </table:table-cell>
          <table:table-cell office:value-type="string" calcext:value-type="string">
            <text:p>$2y$10$jW7.E9eftfJy3S/OruHjROA/.9N8frmi4AtI4degbhJKx/arpramG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Асатова Рания Магизовна, ЗДУР</text:p>
          </table:table-cell>
          <table:table-cell office:value-type="string" calcext:value-type="string">
            <text:p>0979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7" calcext:value-type="float">
            <text:p>454017</text:p>
          </table:table-cell>
          <table:table-cell office:value-type="string" calcext:value-type="string">
            <text:p>$2y$10$gRcyUa4PfkAkt4abbCT3vu3W2jHxY/4AooiB.oH5q7ypwhHekk46.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Билалиева Гульчачак Фидаиловна, ЗДУР</text:p>
          </table:table-cell>
          <table:table-cell office:value-type="string" calcext:value-type="string">
            <text:p>0980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19" calcext:value-type="float">
            <text:p>454019</text:p>
          </table:table-cell>
          <table:table-cell office:value-type="string" calcext:value-type="string">
            <text:p>$2y$10$mkqwkJV6dqYTGr4BakkDWOMq056cahrQP4o9ec3PVqOoolY76TcxW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Маланина Гульназ Мансуровна, ЗДУР</text:p>
          </table:table-cell>
          <table:table-cell office:value-type="string" calcext:value-type="string">
            <text:p>098125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20" calcext:value-type="float">
            <text:p>454020</text:p>
          </table:table-cell>
          <table:table-cell office:value-type="string" calcext:value-type="string">
            <text:p>$2y$10$QDUzZFPDPOcVIfQoJqVBzubWD5EBTHgsIUAG5/ppVWsKoKi9QB5Fi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Хусаинова Замира Минигаяновна, ЗДУР</text:p>
          </table:table-cell>
          <table:table-cell office:value-type="string" calcext:value-type="string">
            <text:p>shinarsaba@yandex.ru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21" calcext:value-type="float">
            <text:p>454021</text:p>
          </table:table-cell>
          <table:table-cell office:value-type="string" calcext:value-type="string">
            <text:p>$2y$10$094ZM.2H131RmSIPSxPtX.S6icemVv9DwnbxsUHuDS7ldgqPGgUYi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Мухарлямова Гульшат Тавкилевна ,ЗДУР</text:p>
          </table:table-cell>
          <table:table-cell office:value-type="string" calcext:value-type="string">
            <text:p>0983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22" calcext:value-type="float">
            <text:p>454022</text:p>
          </table:table-cell>
          <table:table-cell office:value-type="string" calcext:value-type="string">
            <text:p>$2y$10$Texp5fGObrn1VlBQ8JvBVOohzBfFapMhtymfaoA9.uQQ/8wgKmwwS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Мухарлямова Зубаржат Маликовна,ЗДУР </text:p>
          </table:table-cell>
          <table:table-cell office:value-type="string" calcext:value-type="string">
            <text:p>0984@mail.m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4023" calcext:value-type="float">
            <text:p>454023</text:p>
          </table:table-cell>
          <table:table-cell office:value-type="string" calcext:value-type="string">
            <text:p>$2y$10$nYChDr/3R3dnZ.67Bj1DnOEjGO6bDZvSVW1DrM1FnE9.VAyESlMuq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Ботаева Лилия Азатовна </text:p>
          </table:table-cell>
          <table:table-cell office:value-type="string" calcext:value-type="string">
            <text:p>0985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1005" calcext:value-type="float">
            <text:p>46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Талипова Ляйсан Равилевна</text:p>
          </table:table-cell>
          <table:table-cell office:value-type="string" calcext:value-type="string">
            <text:p>liasan11@mail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1006" calcext:value-type="float">
            <text:p>461006</text:p>
          </table:table-cell>
          <table:table-cell office:value-type="string" calcext:value-type="string">
            <text:p>$2y$10$hJE.teZvKW2eaxoxx0IVlO5HNLPUEJ3nRjHT1jfoQO1IE0ZCdImfm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Миннахметова Римма Фаридовна</text:p>
          </table:table-cell>
          <table:table-cell office:value-type="string" calcext:value-type="string">
            <text:p>0987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1007" calcext:value-type="float">
            <text:p>46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Хафизова Айсылу Дамировна</text:p>
          </table:table-cell>
          <table:table-cell office:value-type="string" calcext:value-type="string">
            <text:p>hafizowa.aysilu@yandex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2002" calcext:value-type="float">
            <text:p>462002</text:p>
          </table:table-cell>
          <table:table-cell office:value-type="string" calcext:value-type="string">
            <text:p>$2y$10$tfUKPR3K7xCXN39BjAMIFeKr6zS1uPFxXtYXV4IsttChUOuRoYNnu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Калимуллин Ришат Ракипович</text:p>
          </table:table-cell>
          <table:table-cell office:value-type="string" calcext:value-type="string">
            <text:p>0989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2012" calcext:value-type="float">
            <text:p>46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Каримова Гюзель Масгутовна</text:p>
          </table:table-cell>
          <table:table-cell office:value-type="string" calcext:value-type="string">
            <text:p>0990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01" calcext:value-type="float">
            <text:p>464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Валиев Руслан Радифович</text:p>
          </table:table-cell>
          <table:table-cell office:value-type="string" calcext:value-type="string">
            <text:p>0991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03" calcext:value-type="float">
            <text:p>464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Хайруллина Лилия Насимовна</text:p>
          </table:table-cell>
          <table:table-cell office:value-type="string" calcext:value-type="string">
            <text:p>0992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04" calcext:value-type="float">
            <text:p>464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Обечова Римма Сергбаевна</text:p>
          </table:table-cell>
          <table:table-cell office:value-type="string" calcext:value-type="string">
            <text:p>0993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09" calcext:value-type="float">
            <text:p>46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Шарипова Гулуся Муллануровна</text:p>
          </table:table-cell>
          <table:table-cell office:value-type="string" calcext:value-type="string">
            <text:p>0994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0" calcext:value-type="float">
            <text:p>46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Шайдуллина Ландыш Камиловна</text:p>
          </table:table-cell>
          <table:table-cell office:value-type="string" calcext:value-type="string">
            <text:p>moon_flower14@inbox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1" calcext:value-type="float">
            <text:p>464011</text:p>
          </table:table-cell>
          <table:table-cell office:value-type="string" calcext:value-type="string">
            <text:p>$2y$10$iCS.MER/HMMvPJgKiQylTesM3BqRzpQhg.t7iFLAO2stZn5ZACdBu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Миннуллина Алсу Алиевна</text:p>
          </table:table-cell>
          <table:table-cell office:value-type="string" calcext:value-type="string">
            <text:p>0996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3" calcext:value-type="float">
            <text:p>46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Мусина Румиля Разиновна</text:p>
          </table:table-cell>
          <table:table-cell office:value-type="string" calcext:value-type="string">
            <text:p>Musina16.05.91@mail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4" calcext:value-type="float">
            <text:p>464014</text:p>
          </table:table-cell>
          <table:table-cell office:value-type="string" calcext:value-type="string">
            <text:p>$2y$10$msg2uWuunMLhTvs367aPDefp8IQi2XYP3gt337M5GcQsb61lbliH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Ильдаров Ильнар Ильдарович</text:p>
          </table:table-cell>
          <table:table-cell office:value-type="string" calcext:value-type="string">
            <text:p>0998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5" calcext:value-type="float">
            <text:p>46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Ильгамова Эльвира Азгаровна</text:p>
          </table:table-cell>
          <table:table-cell office:value-type="string" calcext:value-type="string">
            <text:p>0999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6" calcext:value-type="float">
            <text:p>46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Миннекаева Чулпан Фаизов</text:p>
          </table:table-cell>
          <table:table-cell office:value-type="string" calcext:value-type="string">
            <text:p>minnekaeva.chulpan@mail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7" calcext:value-type="float">
            <text:p>464017</text:p>
          </table:table-cell>
          <table:table-cell office:value-type="string" calcext:value-type="string">
            <text:p>$2y$10$xdl7XqJ6XLKfhAVxI8Qg/.XL6Ofy2TDnhJ/EqO9cNHGfvI0kExQ8O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Губайдулина Марьям Равильевна</text:p>
          </table:table-cell>
          <table:table-cell office:value-type="string" calcext:value-type="string">
            <text:p>maryam.gubaydulina@mail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19" calcext:value-type="float">
            <text:p>464019</text:p>
          </table:table-cell>
          <table:table-cell office:value-type="string" calcext:value-type="string">
            <text:p>$2y$10$Oe9zo.fZ9QWkiwCU4lOVq.Kh49KiN3Y9RjFfhcbU6Or68rx2R07C6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Ильина Дилуза Рафаковна</text:p>
          </table:table-cell>
          <table:table-cell office:value-type="string" calcext:value-type="string">
            <text:p>2003@mail.m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23" calcext:value-type="float">
            <text:p>464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Ибрагимова Амина Ленаровна</text:p>
          </table:table-cell>
          <table:table-cell office:value-type="string" calcext:value-type="string">
            <text:p>aminaibragimova1424@mail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4024" calcext:value-type="float">
            <text:p>464024</text:p>
          </table:table-cell>
          <table:table-cell office:value-type="string" calcext:value-type="string">
            <text:p>$2y$10$oXGPtUKAXRnkzjWdb/psGeLIDxJOg4FOdghrO/AB6Q1oN326CfZni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Халиуллин Руслан Рамильевич Приказ</text:p>
          </table:table-cell>
          <table:table-cell office:value-type="string" calcext:value-type="string">
            <text:p>2005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1001" calcext:value-type="float">
            <text:p>47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Черкасова Елена Анатольевна</text:p>
          </table:table-cell>
          <table:table-cell office:value-type="string" calcext:value-type="string">
            <text:p>2006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1002" calcext:value-type="float">
            <text:p>47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Иванушкин Дмитрий Александрович</text:p>
          </table:table-cell>
          <table:table-cell office:value-type="string" calcext:value-type="string">
            <text:p>2007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1003" calcext:value-type="float">
            <text:p>47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Кузьмина Мадина Ахатовна</text:p>
          </table:table-cell>
          <table:table-cell office:value-type="string" calcext:value-type="string">
            <text:p>2008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07" calcext:value-type="float">
            <text:p>47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Володина Ирина Николавевна</text:p>
          </table:table-cell>
          <table:table-cell office:value-type="string" calcext:value-type="string">
            <text:p>2009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08" calcext:value-type="float">
            <text:p>472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Сафина Айсылу Исмагиловна</text:p>
          </table:table-cell>
          <table:table-cell office:value-type="string" calcext:value-type="string">
            <text:p>2010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10" calcext:value-type="float">
            <text:p>47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Березинская Алина Юрьевна</text:p>
          </table:table-cell>
          <table:table-cell office:value-type="string" calcext:value-type="string">
            <text:p>2011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11" calcext:value-type="float">
            <text:p>47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Малышкина Людмила Викторовна </text:p>
          </table:table-cell>
          <table:table-cell office:value-type="string" calcext:value-type="string">
            <text:p>2012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12" calcext:value-type="float">
            <text:p>472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Будеркина Юлия Владимировна</text:p>
          </table:table-cell>
          <table:table-cell office:value-type="string" calcext:value-type="string">
            <text:p>2013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13" calcext:value-type="float">
            <text:p>472013</text:p>
          </table:table-cell>
          <table:table-cell office:value-type="string" calcext:value-type="string">
            <text:p>$2y$10$J1Fxr175W9PE8WpQDymga.yvGI4nP5Z0EKsHo0DcfCucaYGSwJi2m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Гришина Екатерина Анатольевна</text:p>
          </table:table-cell>
          <table:table-cell office:value-type="string" calcext:value-type="string">
            <text:p>2014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14" calcext:value-type="float">
            <text:p>47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Беляева Елена Юрьевна</text:p>
          </table:table-cell>
          <table:table-cell office:value-type="string" calcext:value-type="string">
            <text:p>2015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2017" calcext:value-type="float">
            <text:p>47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Минхатыпова Сария Ильдусовна </text:p>
          </table:table-cell>
          <table:table-cell office:value-type="string" calcext:value-type="string">
            <text:p>2016@mail.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4015" calcext:value-type="float">
            <text:p>47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Садриева Чулпан Гумеровна</text:p>
          </table:table-cell>
          <table:table-cell office:value-type="string" calcext:value-type="string">
            <text:p>2017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1001" calcext:value-type="float">
            <text:p>481001</text:p>
          </table:table-cell>
          <table:table-cell office:value-type="string" calcext:value-type="string">
            <text:p>$2y$10$XWObGiuQSqX3pq7JC/vz2OuOsFH/.KxWYM9zGjXCWqjs5d2B7x4..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Вахтурова Наталья Геннадьевна</text:p>
          </table:table-cell>
          <table:table-cell office:value-type="string" calcext:value-type="string">
            <text:p>2018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1002" calcext:value-type="float">
            <text:p>481002</text:p>
          </table:table-cell>
          <table:table-cell office:value-type="string" calcext:value-type="string">
            <text:p>$2y$10$4yQAeI6qWGTNvtOyBRv39.wcGbjTv4IM4iJPJb1.jN0pJaLS8Fn0G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Николаев Олег Сергеевич</text:p>
          </table:table-cell>
          <table:table-cell office:value-type="string" calcext:value-type="string">
            <text:p>Sk.Tet@tatar.ru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1003" calcext:value-type="float">
            <text:p>481003</text:p>
          </table:table-cell>
          <table:table-cell office:value-type="string" calcext:value-type="string">
            <text:p>$2y$10$m97Y10PLs8Apz50taFj3qOuzMPfQQLj.5fzS.r57BsSBp2OwQfsUy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Нигматуллина Люция Равиловна</text:p>
          </table:table-cell>
          <table:table-cell office:value-type="string" calcext:value-type="string">
            <text:p>2020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1" calcext:value-type="float">
            <text:p>48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Симакова Татьяна Михайловна</text:p>
          </table:table-cell>
          <table:table-cell office:value-type="string" calcext:value-type="string">
            <text:p>2021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2" calcext:value-type="float">
            <text:p>482002</text:p>
          </table:table-cell>
          <table:table-cell office:value-type="string" calcext:value-type="string">
            <text:p>$2y$10$df6QgZpUuUlnNq.Wky5VgOVIdU7bixeWhFHpE9v23n8..FebxE8/m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Торгашова Алена Николаевна</text:p>
          </table:table-cell>
          <table:table-cell office:value-type="string" calcext:value-type="string">
            <text:p>2022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4" calcext:value-type="float">
            <text:p>482004</text:p>
          </table:table-cell>
          <table:table-cell office:value-type="string" calcext:value-type="string">
            <text:p>$2y$10$rAweJtLdLgQFaScA7HQbReYKl.4kJEbwZGrpi/5sVlzSg9bnTrHte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Малькова Зумара Сагитовна</text:p>
          </table:table-cell>
          <table:table-cell office:value-type="string" calcext:value-type="string">
            <text:p>2023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5" calcext:value-type="float">
            <text:p>482005</text:p>
          </table:table-cell>
          <table:table-cell office:value-type="string" calcext:value-type="string">
            <text:p>$2y$10$G5WorRvZ4qSaJsqvQ8IdTehqoS5/lcOXp4raGm2AftQuP.DtWDcr.</text:p>
          </table:table-cell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Ермакова Галина Николаевна</text:p>
          </table:table-cell>
          <table:table-cell office:value-type="string" calcext:value-type="string">
            <text:p>2024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6" calcext:value-type="float">
            <text:p>48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Мешкова Людмила Александровна</text:p>
          </table:table-cell>
          <table:table-cell office:value-type="string" calcext:value-type="string">
            <text:p>Skild.Tet@tatar.ru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8" calcext:value-type="float">
            <text:p>482008</text:p>
          </table:table-cell>
          <table:table-cell office:value-type="string" calcext:value-type="string">
            <text:p>$2y$10$qKwEYYnGyL6n2sg8VML02.oLcGD3etpUQblmtjywskNcStB3jGZmu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Бозина Наталья Ивановна</text:p>
          </table:table-cell>
          <table:table-cell office:value-type="string" calcext:value-type="string">
            <text:p>2026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09" calcext:value-type="float">
            <text:p>482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Паргереева Лариса Николаевна</text:p>
          </table:table-cell>
          <table:table-cell office:value-type="string" calcext:value-type="string">
            <text:p>SKntimb.Tet@tatar.ru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10" calcext:value-type="float">
            <text:p>48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Кислова Наталья Петровна</text:p>
          </table:table-cell>
          <table:table-cell office:value-type="string" calcext:value-type="string">
            <text:p>2028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14" calcext:value-type="float">
            <text:p>482014</text:p>
          </table:table-cell>
          <table:table-cell office:value-type="string" calcext:value-type="string">
            <text:p>$2y$10$IbFxRxkhqrgt8C2Tuv8mCOct2pxSSaI1eCoDHYZk5aCnyakVMTcA.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Галимов Фагим Вильданович</text:p>
          </table:table-cell>
          <table:table-cell office:value-type="string" calcext:value-type="string">
            <text:p>2029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15" calcext:value-type="float">
            <text:p>48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Дружинина Татьяна Аркадьевна</text:p>
          </table:table-cell>
          <table:table-cell office:value-type="string" calcext:value-type="string">
            <text:p>2030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2016" calcext:value-type="float">
            <text:p>482016</text:p>
          </table:table-cell>
          <table:table-cell office:value-type="string" calcext:value-type="string">
            <text:p>$2y$10$TRrS6paYMo4TE3DjfHzASeKN99je1sriNeJw1HteMmbNssC3EwAtS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Шайдуллина Аниса Фазыловна</text:p>
          </table:table-cell>
          <table:table-cell office:value-type="string" calcext:value-type="string">
            <text:p>2031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3001" calcext:value-type="float">
            <text:p>483001</text:p>
          </table:table-cell>
          <table:table-cell office:value-type="string" calcext:value-type="string">
            <text:p>$2y$10$cFwUmZJSeLZdT6WVRa63lO7/y5LRFMCWYPI/ktA35ttno1fQj5H8S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Платонова Галина Сергеевна </text:p>
          </table:table-cell>
          <table:table-cell office:value-type="string" calcext:value-type="string">
            <text:p>2032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4001" calcext:value-type="float">
            <text:p>484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Саттыева Светлана Назифовна</text:p>
          </table:table-cell>
          <table:table-cell office:value-type="string" calcext:value-type="string">
            <text:p>2033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4005" calcext:value-type="float">
            <text:p>484005</text:p>
          </table:table-cell>
          <table:table-cell office:value-type="string" calcext:value-type="string">
            <text:p>$2y$10$njSUaPZ/Ab/74HDv8ebJiuQGX8ULOQLZeo5LsgZ6IV/ncPTDt4Oiy</text:p>
          </table:table-cell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Идиятуллина Алия Ришатовна</text:p>
          </table:table-cell>
          <table:table-cell office:value-type="string" calcext:value-type="string">
            <text:p>2034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1" calcext:value-type="float">
            <text:p>48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Гурьянова Наталья Евгеньевна</text:p>
          </table:table-cell>
          <table:table-cell office:value-type="string" calcext:value-type="string">
            <text:p>2035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2" calcext:value-type="float">
            <text:p>48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Шебалова Татьяна Владимировна</text:p>
          </table:table-cell>
          <table:table-cell office:value-type="string" calcext:value-type="string">
            <text:p>2036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3" calcext:value-type="float">
            <text:p>485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Кулумбегова Наталья Павловна</text:p>
          </table:table-cell>
          <table:table-cell office:value-type="string" calcext:value-type="string">
            <text:p>2037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4" calcext:value-type="float">
            <text:p>485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Миннуллина Фирдания Фаритовна</text:p>
          </table:table-cell>
          <table:table-cell office:value-type="string" calcext:value-type="string">
            <text:p>2038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5" calcext:value-type="float">
            <text:p>485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Курмышкина Ирина Николаевна</text:p>
          </table:table-cell>
          <table:table-cell office:value-type="string" calcext:value-type="string">
            <text:p>2039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6" calcext:value-type="float">
            <text:p>485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Хамидуллина Г.А</text:p>
          </table:table-cell>
          <table:table-cell office:value-type="string" calcext:value-type="string">
            <text:p>2040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7" calcext:value-type="float">
            <text:p>485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Гатауллина Гульнара Наиловна</text:p>
          </table:table-cell>
          <table:table-cell office:value-type="string" calcext:value-type="string">
            <text:p>2041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8" calcext:value-type="float">
            <text:p>485008</text:p>
          </table:table-cell>
          <table:table-cell office:value-type="string" calcext:value-type="string">
            <text:p>$2y$10$HWMAAedOAQFQXkz.Eb1KheEIKUDMAngnizPswbXOCuQO4OooL3zte</text:p>
          </table:table-cell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string" calcext:value-type="string">
            <text:p>Афанасьева Ольга Дмитриевна</text:p>
          </table:table-cell>
          <table:table-cell office:value-type="string" calcext:value-type="string">
            <text:p>2042@mail.m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5009" calcext:value-type="float">
            <text:p>485009</text:p>
          </table:table-cell>
          <table:table-cell office:value-type="string" calcext:value-type="string">
            <text:p>$2y$10$m21/nAjgTZhvzfijwfKvSO7rQczt.q2Lk3rvefQhe/iikStxWEjzu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Крук Наталья Анатольевна</text:p>
          </table:table-cell>
          <table:table-cell office:value-type="string" calcext:value-type="string">
            <text:p>2043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02" calcext:value-type="float">
            <text:p>492002</text:p>
          </table:table-cell>
          <table:table-cell office:value-type="string" calcext:value-type="string">
            <text:p>$2y$10$9aLWjW9usZUvHHOipjObVeIw327uevU7yMxG55IjPjqMUAy33pm7G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Шириева Альфия Аламовна</text:p>
          </table:table-cell>
          <table:table-cell office:value-type="string" calcext:value-type="string">
            <text:p>2044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07" calcext:value-type="float">
            <text:p>492007</text:p>
          </table:table-cell>
          <table:table-cell office:value-type="string" calcext:value-type="string">
            <text:p>$2y$10$VyLTckEaRy04VJPjIVkZTepB8CALWUnXDmEO86/5NjeCB6XjwuAEG</text:p>
          </table:table-cell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Хузина Гульназ Газинуровна</text:p>
          </table:table-cell>
          <table:table-cell office:value-type="string" calcext:value-type="string">
            <text:p>2045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08" calcext:value-type="float">
            <text:p>492008</text:p>
          </table:table-cell>
          <table:table-cell office:value-type="string" calcext:value-type="string">
            <text:p>$2y$10$qVM.2NPty/T5V6kPH/JpN.oUuNKgJvFwmjg0xBYk.nl.ZMg/iisH6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Крупнова Елена Ивановна</text:p>
          </table:table-cell>
          <table:table-cell office:value-type="string" calcext:value-type="string">
            <text:p>2046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12" calcext:value-type="float">
            <text:p>492012</text:p>
          </table:table-cell>
          <table:table-cell office:value-type="string" calcext:value-type="string">
            <text:p>$2y$10$8RnhwdCRQ3E25M7ILuzmiuXCUXCrV/rH574QwgJiUeeUDUXcjiPg2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Адиева Назлия Фанисовна</text:p>
          </table:table-cell>
          <table:table-cell office:value-type="string" calcext:value-type="string">
            <text:p>2047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14" calcext:value-type="float">
            <text:p>492014</text:p>
          </table:table-cell>
          <table:table-cell office:value-type="string" calcext:value-type="string">
            <text:p>$2y$10$WNixN9X9bhUlhuEumz95LeuVGVe7MwkGvS4qJNeUjDLgGVtXQOyoG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Адельшина Эльвира Назиповна</text:p>
          </table:table-cell>
          <table:table-cell office:value-type="string" calcext:value-type="string">
            <text:p>2048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21" calcext:value-type="float">
            <text:p>492021</text:p>
          </table:table-cell>
          <table:table-cell office:value-type="string" calcext:value-type="string">
            <text:p>$2y$10$4vbCgq7yDv/bRqoPmkKVfuylbFDaMcSWjeh6VWy1v82TuIzSLvWwq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Ерхова Любовь Михайловна</text:p>
          </table:table-cell>
          <table:table-cell office:value-type="string" calcext:value-type="string">
            <text:p>2049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22" calcext:value-type="float">
            <text:p>492022</text:p>
          </table:table-cell>
          <table:table-cell office:value-type="string" calcext:value-type="string">
            <text:p>$2y$10$rBylxkayz7W298Y6sUqDYeJ0vC88w8dPdfZLuRTJ4idD5DG.3zCle</text:p>
          </table:table-cell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Попова Маргарита Валерьевна</text:p>
          </table:table-cell>
          <table:table-cell office:value-type="string" calcext:value-type="string">
            <text:p>2050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2023" calcext:value-type="float">
            <text:p>492023</text:p>
          </table:table-cell>
          <table:table-cell office:value-type="string" calcext:value-type="string">
            <text:p>$2y$10$N/Y0GeTqvYG5sIWqhIO6lOPKotvHs.NyCM5UIkSHxVO1qD6qQfKd.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Сабирова Гузалия Асгатовна</text:p>
          </table:table-cell>
          <table:table-cell office:value-type="string" calcext:value-type="string">
            <text:p>2051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01" calcext:value-type="float">
            <text:p>494001</text:p>
          </table:table-cell>
          <table:table-cell office:value-type="string" calcext:value-type="string">
            <text:p>$2y$10$25bd8M24tt48WUVreLm3Mu74JMv1KgZ4n8.bNjgg/5R4FBo/Rh03S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Харисова Эльвира Камиловна</text:p>
          </table:table-cell>
          <table:table-cell office:value-type="string" calcext:value-type="string">
            <text:p>2052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03" calcext:value-type="float">
            <text:p>494003</text:p>
          </table:table-cell>
          <table:table-cell office:value-type="string" calcext:value-type="string">
            <text:p>$2y$10$k7aGLFK5NO2PqJH4T3rQJuKquAQfaoYFFLwBIQ7xWw7sfkVK/s.Mq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Шамсутдинова Инзиля Файзелхановна</text:p>
          </table:table-cell>
          <table:table-cell office:value-type="string" calcext:value-type="string">
            <text:p>2053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04" calcext:value-type="float">
            <text:p>494004</text:p>
          </table:table-cell>
          <table:table-cell office:value-type="string" calcext:value-type="string">
            <text:p>$2y$10$p7EJnGmSIbdylGoBykLOTeLesqhTQH5kghKENOBScKmJRaZNmjA6u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Шакурова Зулейха Габделнуровна</text:p>
          </table:table-cell>
          <table:table-cell office:value-type="string" calcext:value-type="string">
            <text:p>2054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06" calcext:value-type="float">
            <text:p>494006</text:p>
          </table:table-cell>
          <table:table-cell office:value-type="string" calcext:value-type="string">
            <text:p>$2y$10$nA/7EuXv9UStqjImPShKj.i4JxVFWNQLcNf.jHi4O3laATER9QXAe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Хабирова Инсия Индусовна</text:p>
          </table:table-cell>
          <table:table-cell office:value-type="string" calcext:value-type="string">
            <text:p>2055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09" calcext:value-type="float">
            <text:p>494009</text:p>
          </table:table-cell>
          <table:table-cell office:value-type="string" calcext:value-type="string">
            <text:p>$2y$10$5xTGHmAoH8h4ECg4adInQ.9Aqe7MUzBQr0g37jTI6wEyQjOLHKY.2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Хайруллина Айгуль Алмазовна</text:p>
          </table:table-cell>
          <table:table-cell office:value-type="string" calcext:value-type="string">
            <text:p>2056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0" calcext:value-type="float">
            <text:p>494010</text:p>
          </table:table-cell>
          <table:table-cell office:value-type="string" calcext:value-type="string">
            <text:p>$2y$10$0faA3H1mO.rRJro5kQuNnOJXFB8hnAUK5hz8mYSwrbcJIU6VJLsmq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Еремеева Венера Ильинична</text:p>
          </table:table-cell>
          <table:table-cell office:value-type="string" calcext:value-type="string">
            <text:p>2057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1" calcext:value-type="float">
            <text:p>494011</text:p>
          </table:table-cell>
          <table:table-cell office:value-type="string" calcext:value-type="string">
            <text:p>$2y$10$AhSxBr7Gow2EJAsL3CQC4.SkAnBVGTkZod3pYphOzQLHWObf7YN4q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Мингалимова Резеда Рашитовна</text:p>
          </table:table-cell>
          <table:table-cell office:value-type="string" calcext:value-type="string">
            <text:p>2058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3" calcext:value-type="float">
            <text:p>494013</text:p>
          </table:table-cell>
          <table:table-cell office:value-type="string" calcext:value-type="string">
            <text:p>$2y$10$acRKU1eYt26tHKHUrPtbHuHYICEAFn7S2R.Xh9J7ZR606Z7B/F/Le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Фархутдинова Гульназ Фаридовна</text:p>
          </table:table-cell>
          <table:table-cell office:value-type="string" calcext:value-type="string">
            <text:p>2059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5" calcext:value-type="float">
            <text:p>494015</text:p>
          </table:table-cell>
          <table:table-cell office:value-type="string" calcext:value-type="string">
            <text:p>$2y$10$dJvA0Ou4AhUtx/I/a2hzUufONFnzDyUvPz/tU4Ra/BRwnm0ilUZPi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Бурганова Гульнара Насимовна</text:p>
          </table:table-cell>
          <table:table-cell office:value-type="string" calcext:value-type="string">
            <text:p>2060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6" calcext:value-type="float">
            <text:p>494016</text:p>
          </table:table-cell>
          <table:table-cell office:value-type="string" calcext:value-type="string">
            <text:p>$2y$10$NsfxrnYfpziJVsYibYH3Bu7sgfvm9Y83KHoTvqFZzGr5xnBKvJfE2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Закирова Ильхамия Адиповна</text:p>
          </table:table-cell>
          <table:table-cell office:value-type="string" calcext:value-type="string">
            <text:p>2061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7" calcext:value-type="float">
            <text:p>494017</text:p>
          </table:table-cell>
          <table:table-cell office:value-type="string" calcext:value-type="string">
            <text:p>$2y$10$kYbE6fQpZaB4v7gREhqVROTLHRB21bPYc1KL4DH8Azklj9IK/tzda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Утяшова Валентина Николаевна</text:p>
          </table:table-cell>
          <table:table-cell office:value-type="string" calcext:value-type="string">
            <text:p>2062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8" calcext:value-type="float">
            <text:p>494018</text:p>
          </table:table-cell>
          <table:table-cell office:value-type="string" calcext:value-type="string">
            <text:p>$2y$10$cP4MtjFyHTDIb3FY9NPMauphiTf2hXEXuCx.3yinVx.GaHgbJ.jNG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Ахметова Айгуль Маратовна</text:p>
          </table:table-cell>
          <table:table-cell office:value-type="string" calcext:value-type="string">
            <text:p>2063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19" calcext:value-type="float">
            <text:p>494019</text:p>
          </table:table-cell>
          <table:table-cell office:value-type="string" calcext:value-type="string">
            <text:p>$2y$10$9m8QJwGPugmOGY6xSRBuCOdcgmk6dVkjF6jaVgpjJocRQe66h3mFu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Латыпова Лилия Робертовна</text:p>
          </table:table-cell>
          <table:table-cell office:value-type="string" calcext:value-type="string">
            <text:p>2064@mail.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4020" calcext:value-type="float">
            <text:p>494020</text:p>
          </table:table-cell>
          <table:table-cell office:value-type="string" calcext:value-type="string">
            <text:p>$2y$10$nIBZ6oENjWvaDgeh1OIbDeVzfTxv8G90dCRUDgznIS8IWjubvDIci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Сунгатуллина Гульшат Гилметдиновна</text:p>
          </table:table-cell>
          <table:table-cell office:value-type="string" calcext:value-type="string">
            <text:p>2065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2002" calcext:value-type="float">
            <text:p>502002</text:p>
          </table:table-cell>
          <table:table-cell office:value-type="string" calcext:value-type="string">
            <text:p>$2y$10$rlz5lhvTkNmiIOm./XB8veRuJmrb8ecmbzw2k2KE8UcWsN1PDtmB.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Алексеев Артур Олегович</text:p>
          </table:table-cell>
          <table:table-cell office:value-type="string" calcext:value-type="string">
            <text:p>halturik26@yandex.ru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2014" calcext:value-type="float">
            <text:p>502014</text:p>
          </table:table-cell>
          <table:table-cell office:value-type="string" calcext:value-type="string">
            <text:p>$2y$10$8kFx.ru9gAXuJhKIlk/ICu7ohHPC3mx4fTNMKCoUcksexrMmQU952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string" calcext:value-type="string">
            <text:p>Шайхутдинова Г.Х.</text:p>
          </table:table-cell>
          <table:table-cell office:value-type="string" calcext:value-type="string">
            <text:p>oduvanchik06@mail.ru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04" calcext:value-type="float">
            <text:p>504004</text:p>
          </table:table-cell>
          <table:table-cell office:value-type="string" calcext:value-type="string">
            <text:p>$2y$10$C0K8GYCyioOaLi7jG2rLY.QT.fkg/QCIEGA2CAdX/MzcRy1iERy/K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Щеглова Айгуль Рауфовна</text:p>
          </table:table-cell>
          <table:table-cell office:value-type="string" calcext:value-type="string">
            <text:p>2068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05" calcext:value-type="float">
            <text:p>504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Сахабиева Люция Загитовна</text:p>
          </table:table-cell>
          <table:table-cell office:value-type="string" calcext:value-type="string">
            <text:p>2069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06" calcext:value-type="float">
            <text:p>50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Биктагирова Айгуль Гильфановна</text:p>
          </table:table-cell>
          <table:table-cell office:value-type="string" calcext:value-type="string">
            <text:p>2070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07" calcext:value-type="float">
            <text:p>504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Мифтахова Салима Габдулловна</text:p>
          </table:table-cell>
          <table:table-cell office:value-type="string" calcext:value-type="string">
            <text:p>2071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08" calcext:value-type="float">
            <text:p>50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Сафиуллина Гульнара Тахаутдиновна</text:p>
          </table:table-cell>
          <table:table-cell office:value-type="string" calcext:value-type="string">
            <text:p>sgulnara001@mail.ru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11" calcext:value-type="float">
            <text:p>50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Музафаров Ильнар Гильфанович</text:p>
          </table:table-cell>
          <table:table-cell office:value-type="string" calcext:value-type="string">
            <text:p>2074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15" calcext:value-type="float">
            <text:p>504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Заббарова Гульнара Назиповна</text:p>
          </table:table-cell>
          <table:table-cell office:value-type="string" calcext:value-type="string">
            <text:p>2075@mail.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16" calcext:value-type="float">
            <text:p>50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Малешина Наталья Петровна</text:p>
          </table:table-cell>
          <table:table-cell office:value-type="string" calcext:value-type="string">
            <text:p>2076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1" calcext:value-type="float">
            <text:p>512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Серендеева Людмила Юрьевна</text:p>
          </table:table-cell>
          <table:table-cell office:value-type="string" calcext:value-type="string">
            <text:p>2077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2" calcext:value-type="float">
            <text:p>512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Галлямова Гулия Бареевна</text:p>
          </table:table-cell>
          <table:table-cell office:value-type="string" calcext:value-type="string">
            <text:p>ecat8@mail.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3" calcext:value-type="float">
            <text:p>512003</text:p>
          </table:table-cell>
          <table:table-cell office:value-type="string" calcext:value-type="string">
            <text:p>$2y$10$16afciwvsZ/gnSv7PnS7WOxLN9oT22mthkxciNLYUkxULCJGC3DGy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Семенова Светлана Юрьевна</text:p>
          </table:table-cell>
          <table:table-cell office:value-type="string" calcext:value-type="string">
            <text:p>2079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4" calcext:value-type="float">
            <text:p>512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Федулова Ирина Вячеславовна</text:p>
          </table:table-cell>
          <table:table-cell office:value-type="string" calcext:value-type="string">
            <text:p>2080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5" calcext:value-type="float">
            <text:p>512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Парамонова Ирина Семеновна</text:p>
          </table:table-cell>
          <table:table-cell office:value-type="string" calcext:value-type="string">
            <text:p>2081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6" calcext:value-type="float">
            <text:p>512006</text:p>
          </table:table-cell>
          <table:table-cell office:value-type="string" calcext:value-type="string">
            <text:p>$2y$10$t/agz/B9VSbxeemxjQz1FOzk.lliVzWEvZ1QAKeon.fNrA493y9z.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Чернова Анастасия Леогнидовна</text:p>
          </table:table-cell>
          <table:table-cell office:value-type="string" calcext:value-type="string">
            <text:p>2082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07" calcext:value-type="float">
            <text:p>51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Маланчева Олеся Николаевна</text:p>
          </table:table-cell>
          <table:table-cell office:value-type="string" calcext:value-type="string">
            <text:p>2083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10" calcext:value-type="float">
            <text:p>512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Андреева Надежда Викторовна</text:p>
          </table:table-cell>
          <table:table-cell office:value-type="string" calcext:value-type="string">
            <text:p>2084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11" calcext:value-type="float">
            <text:p>512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Ванюшина Алена Петровна</text:p>
          </table:table-cell>
          <table:table-cell office:value-type="string" calcext:value-type="string">
            <text:p>2085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14" calcext:value-type="float">
            <text:p>512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Учайкин Петр Леонидович</text:p>
          </table:table-cell>
          <table:table-cell office:value-type="string" calcext:value-type="string">
            <text:p>2086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15" calcext:value-type="float">
            <text:p>512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Мельникова Tатьяна Васильевна</text:p>
          </table:table-cell>
          <table:table-cell office:value-type="string" calcext:value-type="string">
            <text:p>2087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19" calcext:value-type="float">
            <text:p>512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Беглова Валентина Андреевна</text:p>
          </table:table-cell>
          <table:table-cell office:value-type="string" calcext:value-type="string">
            <text:p>beglova_v@mail.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20" calcext:value-type="float">
            <text:p>512020</text:p>
          </table:table-cell>
          <table:table-cell office:value-type="string" calcext:value-type="string">
            <text:p>$2y$10$kvzp3fWIFv1X5uFxUzd5Q.1HgXe8ddiEEWIpoQRiZLKEVLzehiO3a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Массарова Наиля Фаритовна</text:p>
          </table:table-cell>
          <table:table-cell office:value-type="string" calcext:value-type="string">
            <text:p>2089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21" calcext:value-type="float">
            <text:p>51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Фомина Надежда Петровна</text:p>
          </table:table-cell>
          <table:table-cell office:value-type="string" calcext:value-type="string">
            <text:p>2090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2023" calcext:value-type="float">
            <text:p>512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Габдуллина Эльмира Мидехатовна</text:p>
          </table:table-cell>
          <table:table-cell office:value-type="string" calcext:value-type="string">
            <text:p>2091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06" calcext:value-type="float">
            <text:p>514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Массарова Гульназ Джаудатовна</text:p>
          </table:table-cell>
          <table:table-cell office:value-type="string" calcext:value-type="string">
            <text:p>musin.akhtyam@mail.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07" calcext:value-type="float">
            <text:p>514007</text:p>
          </table:table-cell>
          <table:table-cell office:value-type="string" calcext:value-type="string">
            <text:p>$2y$10$.izFQVHfUcxH2eoAHZ25fO6mR955q0EylHJCmlUZMKWsIcaysa/E6</text:p>
          </table:table-cell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Шайхутдинова Алсу Миндаровна</text:p>
          </table:table-cell>
          <table:table-cell office:value-type="string" calcext:value-type="string">
            <text:p>2093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08" calcext:value-type="float">
            <text:p>51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Шарифуллина Гузель Альфатовна</text:p>
          </table:table-cell>
          <table:table-cell office:value-type="string" calcext:value-type="string">
            <text:p>guzelechka72@mail.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09" calcext:value-type="float">
            <text:p>51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Шамгунова Гулия Сагидулловна</text:p>
          </table:table-cell>
          <table:table-cell office:value-type="string" calcext:value-type="string">
            <text:p>2095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12" calcext:value-type="float">
            <text:p>51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Вильданова Фаридя Ильфаковна</text:p>
          </table:table-cell>
          <table:table-cell office:value-type="string" calcext:value-type="string">
            <text:p>2096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13" calcext:value-type="float">
            <text:p>51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Сейтмеметова Залия Равилевна</text:p>
          </table:table-cell>
          <table:table-cell office:value-type="string" calcext:value-type="string">
            <text:p>zalias86@yandex.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16" calcext:value-type="float">
            <text:p>514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Максумова Гулия Инсафовна</text:p>
          </table:table-cell>
          <table:table-cell office:value-type="string" calcext:value-type="string">
            <text:p>2098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17" calcext:value-type="float">
            <text:p>514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Лукманова Резидя Якуповна </text:p>
          </table:table-cell>
          <table:table-cell office:value-type="string" calcext:value-type="string">
            <text:p>2099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18" calcext:value-type="float">
            <text:p>51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Билялов Фаиз Тауфикович</text:p>
          </table:table-cell>
          <table:table-cell office:value-type="string" calcext:value-type="string">
            <text:p>2100@mail.m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4022" calcext:value-type="float">
            <text:p>514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Николавеа Зульфия Мингалимовна</text:p>
          </table:table-cell>
          <table:table-cell office:value-type="string" calcext:value-type="string">
            <text:p>mingalimovna@mail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0014" calcext:value-type="float">
            <text:p>520014</text:p>
          </table:table-cell>
          <table:table-cell office:value-type="string" calcext:value-type="string">
            <text:p>$2y$10$eyM02a.gOltK9BK2My1/qO2akLCS/wUF8kRQj/nXMkwjZuDrienFG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Гасишвили Марина Леонидовна</text:p>
          </table:table-cell>
          <table:table-cell office:value-type="string" calcext:value-type="string">
            <text:p>m-gasishvili@mail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1" calcext:value-type="float">
            <text:p>52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Лачугина Елена Евгеньевна</text:p>
          </table:table-cell>
          <table:table-cell office:value-type="string" calcext:value-type="string">
            <text:p>elena.lachugina@mail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2" calcext:value-type="float">
            <text:p>52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Муратова Наталья Александровна</text:p>
          </table:table-cell>
          <table:table-cell office:value-type="string" calcext:value-type="string">
            <text:p>2104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3" calcext:value-type="float">
            <text:p>52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Леванова Светлана Леонидлвна</text:p>
          </table:table-cell>
          <table:table-cell office:value-type="string" calcext:value-type="string">
            <text:p>c-levanova@mail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4" calcext:value-type="float">
            <text:p>52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Сабитова Ляйсан Минзакиевна</text:p>
          </table:table-cell>
          <table:table-cell office:value-type="string" calcext:value-type="string">
            <text:p>2106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5" calcext:value-type="float">
            <text:p>52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Просвиркина Татьяна Вячеславовна</text:p>
          </table:table-cell>
          <table:table-cell office:value-type="string" calcext:value-type="string">
            <text:p>2107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6" calcext:value-type="float">
            <text:p>521006</text:p>
          </table:table-cell>
          <table:table-cell office:value-type="string" calcext:value-type="string">
            <text:p>$2y$10$tkFTw2VJ4YSGWqGw3GzD9OaEoKJ9h/m0UONELykxTRpIbWqVIBNea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Мазгутова Лилия Нарименовна</text:p>
          </table:table-cell>
          <table:table-cell office:value-type="string" calcext:value-type="string">
            <text:p>mazlilia@mail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7" calcext:value-type="float">
            <text:p>521007</text:p>
          </table:table-cell>
          <table:table-cell office:value-type="string" calcext:value-type="string">
            <text:p>$2y$10$prbNsrPUvg26SsReBx9AoOxdaO5/NxaIsGd0Apqt6arEdBSjtoVMO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Корнишина Наталья Ивановна</text:p>
          </table:table-cell>
          <table:table-cell office:value-type="string" calcext:value-type="string">
            <text:p>2109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09" calcext:value-type="float">
            <text:p>521009</text:p>
          </table:table-cell>
          <table:table-cell office:value-type="string" calcext:value-type="string">
            <text:p>$2y$10$VK4KcQNJ117W5ZshXsE9Ae3rsnYKNS6Aqp1QrbWwip5XtVKVQJi1e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Исаичева Мария Александровна</text:p>
          </table:table-cell>
          <table:table-cell office:value-type="string" calcext:value-type="string">
            <text:p>2110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10" calcext:value-type="float">
            <text:p>52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Чебанова Людмила Александровна</text:p>
          </table:table-cell>
          <table:table-cell office:value-type="string" calcext:value-type="string">
            <text:p>2111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1032" calcext:value-type="float">
            <text:p>521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Аверьянова Анна Александровна</text:p>
          </table:table-cell>
          <table:table-cell office:value-type="string" calcext:value-type="string">
            <text:p>2112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16" calcext:value-type="float">
            <text:p>522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Валеева Лейсан Асхатовна</text:p>
          </table:table-cell>
          <table:table-cell office:value-type="string" calcext:value-type="string">
            <text:p>2113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17" calcext:value-type="float">
            <text:p>522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Гиниятова Ольга Владимировна</text:p>
          </table:table-cell>
          <table:table-cell office:value-type="string" calcext:value-type="string">
            <text:p>2114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19" calcext:value-type="float">
            <text:p>522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Плотникова Любовь Григорьевна</text:p>
          </table:table-cell>
          <table:table-cell office:value-type="string" calcext:value-type="string">
            <text:p>2115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21" calcext:value-type="float">
            <text:p>522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Липатова Марина Николаевна</text:p>
          </table:table-cell>
          <table:table-cell office:value-type="string" calcext:value-type="string">
            <text:p>2116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27" calcext:value-type="float">
            <text:p>522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Туртыгина Екатерина Константиновна</text:p>
          </table:table-cell>
          <table:table-cell office:value-type="string" calcext:value-type="string">
            <text:p>2117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28" calcext:value-type="float">
            <text:p>522028</text:p>
          </table:table-cell>
          <table:table-cell office:value-type="string" calcext:value-type="string">
            <text:p>$2y$10$v0DQlqco14E/xv5MzycAh..TgATJtgUhg0TH/abmztZtcD01H4Bfq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Осипова Лариса Петровна</text:p>
          </table:table-cell>
          <table:table-cell office:value-type="string" calcext:value-type="string">
            <text:p>lara_osipova_2026@mail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30" calcext:value-type="float">
            <text:p>522030</text:p>
          </table:table-cell>
          <table:table-cell office:value-type="string" calcext:value-type="string">
            <text:p>$2y$10$FIorX7eb6Eymm5IhFkan1ebD29KMG/JHCU51fHavJPaHJA7T0RqcK</text:p>
          </table:table-cell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Паишева Елизавета Ивановна</text:p>
          </table:table-cell>
          <table:table-cell office:value-type="string" calcext:value-type="string">
            <text:p>2119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31" calcext:value-type="float">
            <text:p>5220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Романова Марина Юрьевна </text:p>
          </table:table-cell>
          <table:table-cell office:value-type="string" calcext:value-type="string">
            <text:p>2120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2033" calcext:value-type="float">
            <text:p>522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Шигапова Роза Габдулловна</text:p>
          </table:table-cell>
          <table:table-cell office:value-type="string" calcext:value-type="string">
            <text:p>2121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3002" calcext:value-type="float">
            <text:p>523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Хусаинова Алия Рафгатовна</text:p>
          </table:table-cell>
          <table:table-cell office:value-type="string" calcext:value-type="string">
            <text:p>2122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11" calcext:value-type="float">
            <text:p>52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Шакирова Раиса Асхатовна </text:p>
          </table:table-cell>
          <table:table-cell office:value-type="string" calcext:value-type="string">
            <text:p>2123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18" calcext:value-type="float">
            <text:p>524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Зайнуллина Гульчачак Рафаиловна</text:p>
          </table:table-cell>
          <table:table-cell office:value-type="string" calcext:value-type="string">
            <text:p>2125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20" calcext:value-type="float">
            <text:p>524020</text:p>
          </table:table-cell>
          <table:table-cell office:value-type="string" calcext:value-type="string">
            <text:p>$2y$10$Og43q9zruqpw0KwS32uQPeZkjPxA3gfw04nOkHuv.KmW0CCTbI1R6</text:p>
          </table:table-cell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Фахретдинова Ландыш Накиповна</text:p>
          </table:table-cell>
          <table:table-cell office:value-type="string" calcext:value-type="string">
            <text:p>Ssrom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22" calcext:value-type="float">
            <text:p>524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Тухфатуллина Фидания Ильясовна</text:p>
          </table:table-cell>
          <table:table-cell office:value-type="string" calcext:value-type="string">
            <text:p>2126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24" calcext:value-type="float">
            <text:p>524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Валиева Фарида Мансуровна</text:p>
          </table:table-cell>
          <table:table-cell office:value-type="string" calcext:value-type="string">
            <text:p>2127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25" calcext:value-type="float">
            <text:p>524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Галиева Гульгена Рамилевна</text:p>
          </table:table-cell>
          <table:table-cell office:value-type="string" calcext:value-type="string">
            <text:p>2025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4026" calcext:value-type="float">
            <text:p>524026</text:p>
          </table:table-cell>
          <table:table-cell office:value-type="string" calcext:value-type="string">
            <text:p>$2y$10$XHdduBi6yfdR8W7LX/sdD.d.3bAEnZyUAg3ZWywVvPTQeitBJBplS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Абдуллина Разия Рафиковна</text:p>
          </table:table-cell>
          <table:table-cell office:value-type="string" calcext:value-type="string">
            <text:p>2129@mail.m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5001" calcext:value-type="float">
            <text:p>52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string" calcext:value-type="string">
            <text:p>Янгулова Лейла Фанисовна</text:p>
          </table:table-cell>
          <table:table-cell office:value-type="string" calcext:value-type="string">
            <text:p>2130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1002" calcext:value-type="float">
            <text:p>531002</text:p>
          </table:table-cell>
          <table:table-cell office:value-type="string" calcext:value-type="string">
            <text:p>$2y$10$fMaNhryAUmik1TkvmJWBO.O4Hs2IHpPCIBgAxQ9XU33lC7RYP74wa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Тагирова Алина Зайтуновна</text:p>
          </table:table-cell>
          <table:table-cell office:value-type="string" calcext:value-type="string">
            <text:p>2131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1003" calcext:value-type="float">
            <text:p>53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Иламова Зульфия Нинелевна</text:p>
          </table:table-cell>
          <table:table-cell office:value-type="string" calcext:value-type="string">
            <text:p>2132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1004" calcext:value-type="float">
            <text:p>53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Шияпова Фарида Чулпановна</text:p>
          </table:table-cell>
          <table:table-cell office:value-type="string" calcext:value-type="string">
            <text:p>2133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2006" calcext:value-type="float">
            <text:p>532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Валиуллина Лилия Галимзяновна</text:p>
          </table:table-cell>
          <table:table-cell office:value-type="string" calcext:value-type="string">
            <text:p>2134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2007" calcext:value-type="float">
            <text:p>532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Галиева Айгуль Анасовна</text:p>
          </table:table-cell>
          <table:table-cell office:value-type="string" calcext:value-type="string">
            <text:p>2135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4008" calcext:value-type="float">
            <text:p>534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Юсупова Зульфия Варисовна</text:p>
          </table:table-cell>
          <table:table-cell office:value-type="string" calcext:value-type="string">
            <text:p>2136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4009" calcext:value-type="float">
            <text:p>534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Ахметова Эльмира Фалиховна</text:p>
          </table:table-cell>
          <table:table-cell office:value-type="string" calcext:value-type="string">
            <text:p>2137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4010" calcext:value-type="float">
            <text:p>534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Гарипова Альфина Масгутовна</text:p>
          </table:table-cell>
          <table:table-cell office:value-type="string" calcext:value-type="string">
            <text:p>2138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4011" calcext:value-type="float">
            <text:p>534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Евтюхина Галина Викторовна</text:p>
          </table:table-cell>
          <table:table-cell office:value-type="string" calcext:value-type="string">
            <text:p>D-Tamak-schol@yandex.ru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4012" calcext:value-type="float">
            <text:p>534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Халикова Гузель Ильгизаровна</text:p>
          </table:table-cell>
          <table:table-cell office:value-type="string" calcext:value-type="string">
            <text:p>2140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4013" calcext:value-type="float">
            <text:p>534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Камалтдинова Миляуша Мунавировна</text:p>
          </table:table-cell>
          <table:table-cell office:value-type="string" calcext:value-type="string">
            <text:p>2141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5001" calcext:value-type="float">
            <text:p>53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Исхакова Зульфия Наиловна</text:p>
          </table:table-cell>
          <table:table-cell office:value-type="string" calcext:value-type="string">
            <text:p>2142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5002" calcext:value-type="float">
            <text:p>53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string" calcext:value-type="string">
            <text:p>Гибадуллина Гузель Насимовна</text:p>
          </table:table-cell>
          <table:table-cell office:value-type="string" calcext:value-type="string">
            <text:p>2143@mail.m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35003" calcext:value-type="float">
            <text:p>535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Хуснутдинова Альбина Махмутовна</text:p>
          </table:table-cell>
          <table:table-cell office:value-type="string" calcext:value-type="string">
            <text:p>3000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0014" calcext:value-type="float">
            <text:p>540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Мадиярова Золфия Галямутдиновна</text:p>
          </table:table-cell>
          <table:table-cell office:value-type="string" calcext:value-type="string">
            <text:p>3001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05" calcext:value-type="float">
            <text:p>54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Атлашкина Эльза Альбертовна</text:p>
          </table:table-cell>
          <table:table-cell office:value-type="string" calcext:value-type="string">
            <text:p>3002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10" calcext:value-type="float">
            <text:p>54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Тимергалеева Альбина Наиловна</text:p>
          </table:table-cell>
          <table:table-cell office:value-type="string" calcext:value-type="string">
            <text:p>3003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26" calcext:value-type="float">
            <text:p>541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Хамитова Эльмира Мансуровна</text:p>
          </table:table-cell>
          <table:table-cell office:value-type="string" calcext:value-type="string">
            <text:p>3004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33" calcext:value-type="float">
            <text:p>54103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Зайнуллина Айгуль Марсовна</text:p>
          </table:table-cell>
          <table:table-cell office:value-type="string" calcext:value-type="string">
            <text:p>3005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36" calcext:value-type="float">
            <text:p>54103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Аликова Юлия Николаевна</text:p>
          </table:table-cell>
          <table:table-cell office:value-type="string" calcext:value-type="string">
            <text:p>3006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37" calcext:value-type="float">
            <text:p>54103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Воронина Ирина Васильевна</text:p>
          </table:table-cell>
          <table:table-cell office:value-type="string" calcext:value-type="string">
            <text:p>3007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54" calcext:value-type="float">
            <text:p>54105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Горбачева Татьяна Семеновна</text:p>
          </table:table-cell>
          <table:table-cell office:value-type="string" calcext:value-type="string">
            <text:p>3008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60" calcext:value-type="float">
            <text:p>54106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Шарафутдинова Лейсан Ирековна</text:p>
          </table:table-cell>
          <table:table-cell office:value-type="string" calcext:value-type="string">
            <text:p>3009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62" calcext:value-type="float">
            <text:p>54106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Максимова Наталья Владимировна </text:p>
          </table:table-cell>
          <table:table-cell office:value-type="string" calcext:value-type="string">
            <text:p>3010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077" calcext:value-type="float">
            <text:p>54107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Скворцова Светлана Сергеевна</text:p>
          </table:table-cell>
          <table:table-cell office:value-type="string" calcext:value-type="string">
            <text:p>3011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12" calcext:value-type="float">
            <text:p>5411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Валиуллина Лейсан Гумаровна </text:p>
          </table:table-cell>
          <table:table-cell office:value-type="string" calcext:value-type="string">
            <text:p>3012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15" calcext:value-type="float">
            <text:p>5411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Минхаирова Лилия Фирдаусовна</text:p>
          </table:table-cell>
          <table:table-cell office:value-type="string" calcext:value-type="string">
            <text:p>3013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17" calcext:value-type="float">
            <text:p>5411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Родыгин Сергей Иванович</text:p>
          </table:table-cell>
          <table:table-cell office:value-type="string" calcext:value-type="string">
            <text:p>rsey@yandex.ru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19" calcext:value-type="float">
            <text:p>5411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Захарова Мария Павовна</text:p>
          </table:table-cell>
          <table:table-cell office:value-type="string" calcext:value-type="string">
            <text:p>3015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45" calcext:value-type="float">
            <text:p>54114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Камалова Эльмира Рашатовна </text:p>
          </table:table-cell>
          <table:table-cell office:value-type="string" calcext:value-type="string">
            <text:p>3016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47" calcext:value-type="float">
            <text:p>54114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Мухарлямова Гульназ Насировна</text:p>
          </table:table-cell>
          <table:table-cell office:value-type="string" calcext:value-type="string">
            <text:p>3017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1168" calcext:value-type="float">
            <text:p>54116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Исакова Лилия Раисовна</text:p>
          </table:table-cell>
          <table:table-cell office:value-type="string" calcext:value-type="string">
            <text:p>3018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3091" calcext:value-type="float">
            <text:p>54309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Сабитова Алина Раушановна</text:p>
          </table:table-cell>
          <table:table-cell office:value-type="string" calcext:value-type="string">
            <text:p>3019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01" calcext:value-type="float">
            <text:p>55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Садыкова Аида Анваровна</text:p>
          </table:table-cell>
          <table:table-cell office:value-type="string" calcext:value-type="string">
            <text:p>3020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03" calcext:value-type="float">
            <text:p>551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Ахметзянов Ильфар Зуфарович</text:p>
          </table:table-cell>
          <table:table-cell office:value-type="string" calcext:value-type="string">
            <text:p>3021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05" calcext:value-type="float">
            <text:p>55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Шамаев Дмтрий Геннадьевич</text:p>
          </table:table-cell>
          <table:table-cell office:value-type="string" calcext:value-type="string">
            <text:p>3022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06" calcext:value-type="float">
            <text:p>55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Лебедев Виталий Сергеевич</text:p>
          </table:table-cell>
          <table:table-cell office:value-type="string" calcext:value-type="string">
            <text:p>3023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07" calcext:value-type="float">
            <text:p>55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Александрович Юлия Игоревна</text:p>
          </table:table-cell>
          <table:table-cell office:value-type="string" calcext:value-type="string">
            <text:p>3024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12" calcext:value-type="float">
            <text:p>551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Шайдуллина Гульгена Хикматулловна</text:p>
          </table:table-cell>
          <table:table-cell office:value-type="string" calcext:value-type="string">
            <text:p>3025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13" calcext:value-type="float">
            <text:p>551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Гараева Алия Серенадовна</text:p>
          </table:table-cell>
          <table:table-cell office:value-type="string" calcext:value-type="string">
            <text:p>3026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14" calcext:value-type="float">
            <text:p>5510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Колчина Гульназ Рустамовна</text:p>
          </table:table-cell>
          <table:table-cell office:value-type="string" calcext:value-type="string">
            <text:p>3027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15" calcext:value-type="float">
            <text:p>551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Даминова Раиса Махмуриевна</text:p>
          </table:table-cell>
          <table:table-cell office:value-type="string" calcext:value-type="string">
            <text:p>3028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17" calcext:value-type="float">
            <text:p>551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Полякова Диана Равилевна</text:p>
          </table:table-cell>
          <table:table-cell office:value-type="string" calcext:value-type="string">
            <text:p>3029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18" calcext:value-type="float">
            <text:p>551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Погасий Евгения Юрьевна</text:p>
          </table:table-cell>
          <table:table-cell office:value-type="string" calcext:value-type="string">
            <text:p>3030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26" calcext:value-type="float">
            <text:p>55102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Бугаев Андрей Васильевич</text:p>
          </table:table-cell>
          <table:table-cell office:value-type="string" calcext:value-type="string">
            <text:p>3031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27" calcext:value-type="float">
            <text:p>551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Ибрагимова Галина Николаевна</text:p>
          </table:table-cell>
          <table:table-cell office:value-type="string" calcext:value-type="string">
            <text:p>3032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28" calcext:value-type="float">
            <text:p>551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Ильинкова Венера Гамировна</text:p>
          </table:table-cell>
          <table:table-cell office:value-type="string" calcext:value-type="string">
            <text:p>venera_ilinkova@mail.ru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30" calcext:value-type="float">
            <text:p>5510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Демина Татьяна Ивановна</text:p>
          </table:table-cell>
          <table:table-cell office:value-type="string" calcext:value-type="string">
            <text:p>3034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39" calcext:value-type="float">
            <text:p>55103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Газимзянова Рамзия Гаязовна</text:p>
          </table:table-cell>
          <table:table-cell office:value-type="string" calcext:value-type="string">
            <text:p>3035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41" calcext:value-type="float">
            <text:p>55104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Сухотская Людмила Александровна</text:p>
          </table:table-cell>
          <table:table-cell office:value-type="string" calcext:value-type="string">
            <text:p>3036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51" calcext:value-type="float">
            <text:p>55105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Самигуллина Лейсан Хафизулловна</text:p>
          </table:table-cell>
          <table:table-cell office:value-type="string" calcext:value-type="string">
            <text:p>3037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80" calcext:value-type="float">
            <text:p>55108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Клочкова Елена Александровна</text:p>
          </table:table-cell>
          <table:table-cell office:value-type="string" calcext:value-type="string">
            <text:p>3038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96" calcext:value-type="float">
            <text:p>55109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Хайретдинова Гулия Муниповна</text:p>
          </table:table-cell>
          <table:table-cell office:value-type="string" calcext:value-type="string">
            <text:p>3039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98" calcext:value-type="float">
            <text:p>55109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Лунева Эльмира Ильдусовна</text:p>
          </table:table-cell>
          <table:table-cell office:value-type="string" calcext:value-type="string">
            <text:p>3040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116" calcext:value-type="float">
            <text:p>5511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Загидуллина Эльвира Котдусовна</text:p>
          </table:table-cell>
          <table:table-cell office:value-type="string" calcext:value-type="string">
            <text:p>3041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131" calcext:value-type="float">
            <text:p>5511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Рамазанова Чулпан Разяповна</text:p>
          </table:table-cell>
          <table:table-cell office:value-type="string" calcext:value-type="string">
            <text:p>3042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3001" calcext:value-type="float">
            <text:p>553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Воропаева Ландыш Фаизовна</text:p>
          </table:table-cell>
          <table:table-cell office:value-type="string" calcext:value-type="string">
            <text:p>3043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3027" calcext:value-type="float">
            <text:p>5530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Шигапов Рамиль Радикович</text:p>
          </table:table-cell>
          <table:table-cell office:value-type="string" calcext:value-type="string">
            <text:p>3044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04" calcext:value-type="float">
            <text:p>561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Плющенко Инна Викторовна</text:p>
          </table:table-cell>
          <table:table-cell office:value-type="string" calcext:value-type="string">
            <text:p>3045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08" calcext:value-type="float">
            <text:p>56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Амирова Гелюся Хамзовна</text:p>
          </table:table-cell>
          <table:table-cell office:value-type="string" calcext:value-type="string">
            <text:p>3046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32" calcext:value-type="float">
            <text:p>5610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string" calcext:value-type="string">
            <text:p>Гизутдинова Эльмира Ринатовна</text:p>
          </table:table-cell>
          <table:table-cell office:value-type="string" calcext:value-type="string">
            <text:p>3047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50" calcext:value-type="float">
            <text:p>56105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Варфоломеева Зоя Владимировна</text:p>
          </table:table-cell>
          <table:table-cell office:value-type="string" calcext:value-type="string">
            <text:p>3048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57" calcext:value-type="float">
            <text:p>56105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Ахметзянова Илюза Ахтямовна</text:p>
          </table:table-cell>
          <table:table-cell office:value-type="string" calcext:value-type="string">
            <text:p>3049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67" calcext:value-type="float">
            <text:p>56106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Галимова Раушания Фоатовна</text:p>
          </table:table-cell>
          <table:table-cell office:value-type="string" calcext:value-type="string">
            <text:p>3050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70" calcext:value-type="float">
            <text:p>56107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string" calcext:value-type="string">
            <text:p>Хабибуллина Алсу Хамитовна</text:p>
          </table:table-cell>
          <table:table-cell office:value-type="string" calcext:value-type="string">
            <text:p>3051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081" calcext:value-type="float">
            <text:p>56108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string" calcext:value-type="string">
            <text:p>Мухаметшина Юлия Александровна</text:p>
          </table:table-cell>
          <table:table-cell office:value-type="string" calcext:value-type="string">
            <text:p>3052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35" calcext:value-type="float">
            <text:p>5611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string" calcext:value-type="string">
            <text:p>Слимани Татьяна Владимировна</text:p>
          </table:table-cell>
          <table:table-cell office:value-type="string" calcext:value-type="string">
            <text:p>3053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37" calcext:value-type="float">
            <text:p>56113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string" calcext:value-type="string">
            <text:p>Фахрутдинов Азат Альбертович</text:p>
          </table:table-cell>
          <table:table-cell office:value-type="string" calcext:value-type="string">
            <text:p>3054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51" calcext:value-type="float">
            <text:p>56115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string" calcext:value-type="string">
            <text:p>Бабкина Елена Эдуардовна</text:p>
          </table:table-cell>
          <table:table-cell office:value-type="string" calcext:value-type="string">
            <text:p>3055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52" calcext:value-type="float">
            <text:p>56115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string" calcext:value-type="string">
            <text:p>Мандрыка Лариса Анатольевна</text:p>
          </table:table-cell>
          <table:table-cell office:value-type="string" calcext:value-type="string">
            <text:p>3056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53" calcext:value-type="float">
            <text:p>56115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Букашева Лилия Хамитовна</text:p>
          </table:table-cell>
          <table:table-cell office:value-type="string" calcext:value-type="string">
            <text:p>3057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82" calcext:value-type="float">
            <text:p>56118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Зайнутдинова Земфира Амирзяновна </text:p>
          </table:table-cell>
          <table:table-cell office:value-type="string" calcext:value-type="string">
            <text:p>3058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88" calcext:value-type="float">
            <text:p>56118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Зайнуллина Лейсан Анфасовна</text:p>
          </table:table-cell>
          <table:table-cell office:value-type="string" calcext:value-type="string">
            <text:p>3059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1189" calcext:value-type="float">
            <text:p>56118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Сафина Алсу Шарифзяновна</text:p>
          </table:table-cell>
          <table:table-cell office:value-type="string" calcext:value-type="string">
            <text:p>3060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3003" calcext:value-type="float">
            <text:p>563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Мухаметшина Гульнара Ильясовна</text:p>
          </table:table-cell>
          <table:table-cell office:value-type="string" calcext:value-type="string">
            <text:p>3061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3004" calcext:value-type="float">
            <text:p>563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Галеева Регина Дамировна</text:p>
          </table:table-cell>
          <table:table-cell office:value-type="string" calcext:value-type="string">
            <text:p>3062@mail.m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63015" calcext:value-type="float">
            <text:p>563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Горшевикова Александра Германовна</text:p>
          </table:table-cell>
          <table:table-cell office:value-type="string" calcext:value-type="string">
            <text:p>3063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09" calcext:value-type="float">
            <text:p>571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Журавлева Елена Николаевна</text:p>
          </table:table-cell>
          <table:table-cell office:value-type="string" calcext:value-type="string">
            <text:p>3064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20" calcext:value-type="float">
            <text:p>571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Галимова Ильмира Гайсовна</text:p>
          </table:table-cell>
          <table:table-cell office:value-type="string" calcext:value-type="string">
            <text:p>3065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34" calcext:value-type="float">
            <text:p>57103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Самарханова Нафиса Саматовна</text:p>
          </table:table-cell>
          <table:table-cell office:value-type="string" calcext:value-type="string">
            <text:p>3066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55" calcext:value-type="float">
            <text:p>57105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string" calcext:value-type="string">
            <text:p>Атаджанова Диляра Закировна</text:p>
          </table:table-cell>
          <table:table-cell office:value-type="string" calcext:value-type="string">
            <text:p>3067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64" calcext:value-type="float">
            <text:p>57106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Бачева Татьяна Сергеевна</text:p>
          </table:table-cell>
          <table:table-cell office:value-type="string" calcext:value-type="string">
            <text:p>3068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75" calcext:value-type="float">
            <text:p>57107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Штро Альбина Ансаровна</text:p>
          </table:table-cell>
          <table:table-cell office:value-type="string" calcext:value-type="string">
            <text:p>3069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87" calcext:value-type="float">
            <text:p>57108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string" calcext:value-type="string">
            <text:p>Ногманова Наталья Ливерьевна </text:p>
          </table:table-cell>
          <table:table-cell office:value-type="string" calcext:value-type="string">
            <text:p>3070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94" calcext:value-type="float">
            <text:p>57109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Хасбиуллина Татьяна Сергеевна</text:p>
          </table:table-cell>
          <table:table-cell office:value-type="string" calcext:value-type="string">
            <text:p>3071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099" calcext:value-type="float">
            <text:p>57109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string" calcext:value-type="string">
            <text:p>Хуснутдинова Тансылу Ильясовна</text:p>
          </table:table-cell>
          <table:table-cell office:value-type="string" calcext:value-type="string">
            <text:p>3072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102" calcext:value-type="float">
            <text:p>5711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string" calcext:value-type="string">
            <text:p>Михеев Максим Вячеславович</text:p>
          </table:table-cell>
          <table:table-cell office:value-type="string" calcext:value-type="string">
            <text:p>3073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120" calcext:value-type="float">
            <text:p>5711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Гагарина Светлана Владимировна</text:p>
          </table:table-cell>
          <table:table-cell office:value-type="string" calcext:value-type="string">
            <text:p>3074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122" calcext:value-type="float">
            <text:p>5711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string" calcext:value-type="string">
            <text:p>Лабутова Ольга Владимировна</text:p>
          </table:table-cell>
          <table:table-cell office:value-type="string" calcext:value-type="string">
            <text:p>3075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130" calcext:value-type="float">
            <text:p>57113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Гетто Ольга Григорьевна</text:p>
          </table:table-cell>
          <table:table-cell office:value-type="string" calcext:value-type="string">
            <text:p>3076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1163" calcext:value-type="float">
            <text:p>57116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Закиев Ильгиз Рамзильевич</text:p>
          </table:table-cell>
          <table:table-cell office:value-type="string" calcext:value-type="string">
            <text:p>3077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3001" calcext:value-type="float">
            <text:p>573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Шарипова Зиля Нургалиевна</text:p>
          </table:table-cell>
          <table:table-cell office:value-type="string" calcext:value-type="string">
            <text:p>3078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3002" calcext:value-type="float">
            <text:p>573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Гайфутдинова Рамзия Муллануровна</text:p>
          </table:table-cell>
          <table:table-cell office:value-type="string" calcext:value-type="string">
            <text:p>3079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3012" calcext:value-type="float">
            <text:p>57301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Абдуллина Рамиля Агзамовна</text:p>
          </table:table-cell>
          <table:table-cell office:value-type="string" calcext:value-type="string">
            <text:p>3080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3017" calcext:value-type="float">
            <text:p>57301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Старкова Виктория Викторовна</text:p>
          </table:table-cell>
          <table:table-cell office:value-type="string" calcext:value-type="string">
            <text:p>3081@mail.m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3065" calcext:value-type="float">
            <text:p>57306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Гарафутдинова Фирюза Айратовна</text:p>
          </table:table-cell>
          <table:table-cell office:value-type="string" calcext:value-type="string">
            <text:p>3082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01" calcext:value-type="float">
            <text:p>581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Никонов Олег Васильевич</text:p>
          </table:table-cell>
          <table:table-cell office:value-type="string" calcext:value-type="string">
            <text:p>3083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07" calcext:value-type="float">
            <text:p>581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Хайруллина Эсмеральда Васильевна </text:p>
          </table:table-cell>
          <table:table-cell office:value-type="string" calcext:value-type="string">
            <text:p>3084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09" calcext:value-type="float">
            <text:p>58100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Ахметшина Гузелия Мадехатовна </text:p>
          </table:table-cell>
          <table:table-cell office:value-type="string" calcext:value-type="string">
            <text:p>3085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23" calcext:value-type="float">
            <text:p>58102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Хафизова Роза Зуфаровна</text:p>
          </table:table-cell>
          <table:table-cell office:value-type="string" calcext:value-type="string">
            <text:p>3086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25" calcext:value-type="float">
            <text:p>5810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Гайнуллина Лейсан Магсумовна</text:p>
          </table:table-cell>
          <table:table-cell office:value-type="string" calcext:value-type="string">
            <text:p>3087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31" calcext:value-type="float">
            <text:p>58103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Гимадиева Гульназ Рауфовна</text:p>
          </table:table-cell>
          <table:table-cell office:value-type="string" calcext:value-type="string">
            <text:p>3088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38" calcext:value-type="float">
            <text:p>58103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Багавиева Лилия Данисовна</text:p>
          </table:table-cell>
          <table:table-cell office:value-type="string" calcext:value-type="string">
            <text:p>3089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43" calcext:value-type="float">
            <text:p>58104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Соловьева Ольга Александровна</text:p>
          </table:table-cell>
          <table:table-cell office:value-type="string" calcext:value-type="string">
            <text:p>3090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49" calcext:value-type="float">
            <text:p>58104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Кашапова Рамиля Равилевна</text:p>
          </table:table-cell>
          <table:table-cell office:value-type="string" calcext:value-type="string">
            <text:p>3091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71" calcext:value-type="float">
            <text:p>58107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Краснова Елена Александровна </text:p>
          </table:table-cell>
          <table:table-cell office:value-type="string" calcext:value-type="string">
            <text:p>3092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85" calcext:value-type="float">
            <text:p>58108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Белова Татьяна Алексеевна</text:p>
          </table:table-cell>
          <table:table-cell office:value-type="string" calcext:value-type="string">
            <text:p>3093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89" calcext:value-type="float">
            <text:p>58108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Панфилов Александр Александрович</text:p>
          </table:table-cell>
          <table:table-cell office:value-type="string" calcext:value-type="string">
            <text:p>3094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091" calcext:value-type="float">
            <text:p>58109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Зиатдинова Нефися Валиахметовна</text:p>
          </table:table-cell>
          <table:table-cell office:value-type="string" calcext:value-type="string">
            <text:p>3095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03" calcext:value-type="float">
            <text:p>5811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Кашапова Камилла Шамильевна</text:p>
          </table:table-cell>
          <table:table-cell office:value-type="string" calcext:value-type="string">
            <text:p>3096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07" calcext:value-type="float">
            <text:p>5811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Ситдикова Айгуль Рашитовна</text:p>
          </table:table-cell>
          <table:table-cell office:value-type="string" calcext:value-type="string">
            <text:p>3097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13" calcext:value-type="float">
            <text:p>5811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Айметова Лилия Хамитовна</text:p>
          </table:table-cell>
          <table:table-cell office:value-type="string" calcext:value-type="string">
            <text:p>3098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32" calcext:value-type="float">
            <text:p>58113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Шайхутдинова Диана Рустемовна</text:p>
          </table:table-cell>
          <table:table-cell office:value-type="string" calcext:value-type="string">
            <text:p>3099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43" calcext:value-type="float">
            <text:p>58114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Кузьмина Екатерина Николаевна</text:p>
          </table:table-cell>
          <table:table-cell office:value-type="string" calcext:value-type="string">
            <text:p>3100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46" calcext:value-type="float">
            <text:p>58114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Назмутдинова Лейсан Шафиковна</text:p>
          </table:table-cell>
          <table:table-cell office:value-type="string" calcext:value-type="string">
            <text:p>3101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65" calcext:value-type="float">
            <text:p>58116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Халитова Лилия Азатовна</text:p>
          </table:table-cell>
          <table:table-cell office:value-type="string" calcext:value-type="string">
            <text:p>3102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70" calcext:value-type="float">
            <text:p>58117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Сергеева Светлана Владимировна</text:p>
          </table:table-cell>
          <table:table-cell office:value-type="string" calcext:value-type="string">
            <text:p>3103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77" calcext:value-type="float">
            <text:p>58117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Сиразиева Елена Владимировна</text:p>
          </table:table-cell>
          <table:table-cell office:value-type="string" calcext:value-type="string">
            <text:p>3104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1179" calcext:value-type="float">
            <text:p>58117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Эстис Валентина Александровна</text:p>
          </table:table-cell>
          <table:table-cell office:value-type="string" calcext:value-type="string">
            <text:p>3105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2165" calcext:value-type="float">
            <text:p>58216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Губуров Руслан Альбертович</text:p>
          </table:table-cell>
          <table:table-cell office:value-type="string" calcext:value-type="string">
            <text:p>3106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3007" calcext:value-type="float">
            <text:p>58300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Гильманов Дамир Шарифзянович</text:p>
          </table:table-cell>
          <table:table-cell office:value-type="string" calcext:value-type="string">
            <text:p>3107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3013" calcext:value-type="float">
            <text:p>58301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Шайдуллин Эмиль Ирекович</text:p>
          </table:table-cell>
          <table:table-cell office:value-type="string" calcext:value-type="string">
            <text:p>kzn155@inbox.ru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3155" calcext:value-type="float">
            <text:p>583155</text:p>
          </table:table-cell>
          <table:table-cell office:value-type="string" calcext:value-type="string">
            <text:p>$2y$10$kEklUnWWHcK4tkf2BnK/2OMgdeRVOY.Hd8HNCZhcv8YKQ54tO67Km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Мардеева Румия Салиховна</text:p>
          </table:table-cell>
          <table:table-cell office:value-type="string" calcext:value-type="string">
            <text:p>3109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5001" calcext:value-type="float">
            <text:p>58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Локотунина Наталья Васильевна</text:p>
          </table:table-cell>
          <table:table-cell office:value-type="string" calcext:value-type="string">
            <text:p>3110@mail.m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5002" calcext:value-type="float">
            <text:p>58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Мистякова Назлыгуль Фанисовна</text:p>
          </table:table-cell>
          <table:table-cell office:value-type="string" calcext:value-type="string">
            <text:p>3111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3028" calcext:value-type="float">
            <text:p>55302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Аристова Анастасия Радифовна</text:p>
          </table:table-cell>
          <table:table-cell office:value-type="string" calcext:value-type="string">
            <text:p>3112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02" calcext:value-type="float">
            <text:p>591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Мохначева Александра Сергеевна</text:p>
          </table:table-cell>
          <table:table-cell office:value-type="string" calcext:value-type="string">
            <text:p>3113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05" calcext:value-type="float">
            <text:p>59100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Ахметзянова Алия Маратовна</text:p>
          </table:table-cell>
          <table:table-cell office:value-type="string" calcext:value-type="string">
            <text:p>3114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06" calcext:value-type="float">
            <text:p>59100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Габдуллина Лилия Нуховна</text:p>
          </table:table-cell>
          <table:table-cell office:value-type="string" calcext:value-type="string">
            <text:p>kazsch17@yandex.ru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17" calcext:value-type="float">
            <text:p>591017</text:p>
          </table:table-cell>
          <table:table-cell office:value-type="string" calcext:value-type="string">
            <text:p>$2y$10$4UkBEfRwTjmj7Cotb/IGYeBsIaoo8GHINSdikav0NveWBMXv2eJ1K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Бикмуллин Инсаф Кабирович</text:p>
          </table:table-cell>
          <table:table-cell office:value-type="string" calcext:value-type="string">
            <text:p>3116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19" calcext:value-type="float">
            <text:p>59101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Давлетшин Рустем Радикович</text:p>
          </table:table-cell>
          <table:table-cell office:value-type="string" calcext:value-type="string">
            <text:p>3117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21" calcext:value-type="float">
            <text:p>5910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Халиуллина Голсирин Ахметовна</text:p>
          </table:table-cell>
          <table:table-cell office:value-type="string" calcext:value-type="string">
            <text:p>3118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24" calcext:value-type="float">
            <text:p>5910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Кадыйрова Анастасия Ивановна</text:p>
          </table:table-cell>
          <table:table-cell office:value-type="string" calcext:value-type="string">
            <text:p>3119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35" calcext:value-type="float">
            <text:p>59103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Мусина Эльмира Рафисовна</text:p>
          </table:table-cell>
          <table:table-cell office:value-type="string" calcext:value-type="string">
            <text:p>3120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40" calcext:value-type="float">
            <text:p>59104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Бедлинская Елена Николаевна</text:p>
          </table:table-cell>
          <table:table-cell office:value-type="string" calcext:value-type="string">
            <text:p>3121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42" calcext:value-type="float">
            <text:p>59104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Ахметзянова Гульсу Магсумовна</text:p>
          </table:table-cell>
          <table:table-cell office:value-type="string" calcext:value-type="string">
            <text:p>3122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52" calcext:value-type="float">
            <text:p>59105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Мишина Анастасия Сергеевна</text:p>
          </table:table-cell>
          <table:table-cell office:value-type="string" calcext:value-type="string">
            <text:p>3123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54" calcext:value-type="float">
            <text:p>59105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Кузина Александра Михайловна</text:p>
          </table:table-cell>
          <table:table-cell office:value-type="string" calcext:value-type="string">
            <text:p>3124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69" calcext:value-type="float">
            <text:p>59106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Шарафиева Лилия Шагидулловна</text:p>
          </table:table-cell>
          <table:table-cell office:value-type="string" calcext:value-type="string">
            <text:p>3125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73" calcext:value-type="float">
            <text:p>59107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Харитонова Светлана Александровна</text:p>
          </table:table-cell>
          <table:table-cell office:value-type="string" calcext:value-type="string">
            <text:p>3126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78" calcext:value-type="float">
            <text:p>59107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Ахунова Алсу Фаритовна</text:p>
          </table:table-cell>
          <table:table-cell office:value-type="string" calcext:value-type="string">
            <text:p>3127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82" calcext:value-type="float">
            <text:p>59108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Переходько Анна Сергеевна</text:p>
          </table:table-cell>
          <table:table-cell office:value-type="string" calcext:value-type="string">
            <text:p>3128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83" calcext:value-type="float">
            <text:p>59108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Гарифжанова Айгуль Фаритовна</text:p>
          </table:table-cell>
          <table:table-cell office:value-type="string" calcext:value-type="string">
            <text:p>3129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88" calcext:value-type="float">
            <text:p>59108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Мубаракшина Азалия Ленаровна</text:p>
          </table:table-cell>
          <table:table-cell office:value-type="string" calcext:value-type="string">
            <text:p>3130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097" calcext:value-type="float">
            <text:p>59109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Косова Елена Владимировна</text:p>
          </table:table-cell>
          <table:table-cell office:value-type="string" calcext:value-type="string">
            <text:p>3131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00" calcext:value-type="float">
            <text:p>59110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Каримова Лилия Альфатовна </text:p>
          </table:table-cell>
          <table:table-cell office:value-type="string" calcext:value-type="string">
            <text:p>3132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14" calcext:value-type="float">
            <text:p>59111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Рахимбаева Гулуса Фаритовна</text:p>
          </table:table-cell>
          <table:table-cell office:value-type="string" calcext:value-type="string">
            <text:p>3133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27" calcext:value-type="float">
            <text:p>59112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Уразгильдина Гульнар Наилевна</text:p>
          </table:table-cell>
          <table:table-cell office:value-type="string" calcext:value-type="string">
            <text:p>3134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29" calcext:value-type="float">
            <text:p>59112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Фархутдинова Резеда Рустамовна</text:p>
          </table:table-cell>
          <table:table-cell office:value-type="string" calcext:value-type="string">
            <text:p>3135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36" calcext:value-type="float">
            <text:p>59113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Садреева Ольга Викторовна</text:p>
          </table:table-cell>
          <table:table-cell office:value-type="string" calcext:value-type="string">
            <text:p>3136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39" calcext:value-type="float">
            <text:p>59113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Рамазанова Лейсан Маратовна</text:p>
          </table:table-cell>
          <table:table-cell office:value-type="string" calcext:value-type="string">
            <text:p>3137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50" calcext:value-type="float">
            <text:p>59115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Валиева Майсара Насртдиновна</text:p>
          </table:table-cell>
          <table:table-cell office:value-type="string" calcext:value-type="string">
            <text:p>3138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73" calcext:value-type="float">
            <text:p>59117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Хамидуллина Алия Анасовна</text:p>
          </table:table-cell>
          <table:table-cell office:value-type="string" calcext:value-type="string">
            <text:p>3139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1186" calcext:value-type="float">
            <text:p>59118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Рахматуллина Лейсан Ринатовна</text:p>
          </table:table-cell>
          <table:table-cell office:value-type="string" calcext:value-type="string">
            <text:p>3140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3010" calcext:value-type="float">
            <text:p>593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Шакирова Алсу Рашитовна</text:p>
          </table:table-cell>
          <table:table-cell office:value-type="string" calcext:value-type="string">
            <text:p>3141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3016" calcext:value-type="float">
            <text:p>59301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Замалтдинова Эльвира Салютовна</text:p>
          </table:table-cell>
          <table:table-cell office:value-type="string" calcext:value-type="string">
            <text:p>3142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3018" calcext:value-type="float">
            <text:p>59301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Саркеева Елена Владимировна</text:p>
          </table:table-cell>
          <table:table-cell office:value-type="string" calcext:value-type="string">
            <text:p>3143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3048" calcext:value-type="float">
            <text:p>59304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Иксанова Альфия Миннеабзальтыновна</text:p>
          </table:table-cell>
          <table:table-cell office:value-type="string" calcext:value-type="string">
            <text:p>3144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3068" calcext:value-type="float">
            <text:p>59306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string" calcext:value-type="string">
            <text:p>Гирфанутдинова Наталья Михайловна</text:p>
          </table:table-cell>
          <table:table-cell office:value-type="string" calcext:value-type="string">
            <text:p>3146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08" calcext:value-type="float">
            <text:p>6010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Коробов Александр Васильевич</text:p>
          </table:table-cell>
          <table:table-cell office:value-type="string" calcext:value-type="string">
            <text:p>3147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Гаврильчева Татьяна Александровна</text:p>
          </table:table-cell>
          <table:table-cell office:value-type="string" calcext:value-type="string">
            <text:p>3148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11" calcext:value-type="float">
            <text:p>601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Нурисламова Зульфия Зуфаровна</text:p>
          </table:table-cell>
          <table:table-cell office:value-type="string" calcext:value-type="string">
            <text:p>3149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15" calcext:value-type="float">
            <text:p>60101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Мубаракова Алсу Раисовна</text:p>
          </table:table-cell>
          <table:table-cell office:value-type="string" calcext:value-type="string">
            <text:p>3150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22" calcext:value-type="float">
            <text:p>60102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Ахидова Елена Владимировна</text:p>
          </table:table-cell>
          <table:table-cell office:value-type="string" calcext:value-type="string">
            <text:p>3151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47" calcext:value-type="float">
            <text:p>60104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Колчина Светлана Евгеньевна</text:p>
          </table:table-cell>
          <table:table-cell office:value-type="string" calcext:value-type="string">
            <text:p>3152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72" calcext:value-type="float">
            <text:p>60107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Батманова Гульнар Ильдаровна</text:p>
          </table:table-cell>
          <table:table-cell office:value-type="string" calcext:value-type="string">
            <text:p>3153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84" calcext:value-type="float">
            <text:p>60108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Егорова Юлия Евгеньевна</text:p>
          </table:table-cell>
          <table:table-cell office:value-type="string" calcext:value-type="string">
            <text:p>3154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86" calcext:value-type="float">
            <text:p>60108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Миронская Лариса Геннадьевна</text:p>
          </table:table-cell>
          <table:table-cell office:value-type="string" calcext:value-type="string">
            <text:p>3155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90" calcext:value-type="float">
            <text:p>60109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Хадеева Гульнур Хайдаровна</text:p>
          </table:table-cell>
          <table:table-cell office:value-type="string" calcext:value-type="string">
            <text:p>3156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093" calcext:value-type="float">
            <text:p>60109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Апакова Алсу Насыбулловга</text:p>
          </table:table-cell>
          <table:table-cell office:value-type="string" calcext:value-type="string">
            <text:p>3157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01" calcext:value-type="float">
            <text:p>6011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Каримов Булат Ринатович</text:p>
          </table:table-cell>
          <table:table-cell office:value-type="string" calcext:value-type="string">
            <text:p>3158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08" calcext:value-type="float">
            <text:p>601108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Ибрагимова Гульнара Радиковна</text:p>
          </table:table-cell>
          <table:table-cell office:value-type="string" calcext:value-type="string">
            <text:p>gulnara83_08@mail.ru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10" calcext:value-type="float">
            <text:p>601110</text:p>
          </table:table-cell>
          <table:table-cell office:value-type="string" calcext:value-type="string">
            <text:p>$2y$10$lWAM5nY45gaDU9rghSOA..WJ0teHrnG5SNKiviLgHFu/Wf0dylzWC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Хайбулина Аделия Илдусовна</text:p>
          </table:table-cell>
          <table:table-cell office:value-type="string" calcext:value-type="string">
            <text:p>3160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11" calcext:value-type="float">
            <text:p>6011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Минуллина Елена Викторовна</text:p>
          </table:table-cell>
          <table:table-cell office:value-type="string" calcext:value-type="string">
            <text:p>3161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21" calcext:value-type="float">
            <text:p>60112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Ситдикова Айгуль Азатовна</text:p>
          </table:table-cell>
          <table:table-cell office:value-type="string" calcext:value-type="string">
            <text:p>3162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24" calcext:value-type="float">
            <text:p>60112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string" calcext:value-type="string">
            <text:p>Фаттерахманова Руфина Рафкатовна</text:p>
          </table:table-cell>
          <table:table-cell office:value-type="string" calcext:value-type="string">
            <text:p>3163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25" calcext:value-type="float">
            <text:p>60112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Надершина Лейсан Фаруховна</text:p>
          </table:table-cell>
          <table:table-cell office:value-type="string" calcext:value-type="string">
            <text:p>421384@mail.ru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26" calcext:value-type="float">
            <text:p>601126</text:p>
          </table:table-cell>
          <table:table-cell office:value-type="string" calcext:value-type="string">
            <text:p>$2y$10$Vg9wdphm8Hn/BiVfBHOH7Ox4CvF4rCn0D0znT1giiM1PVwa6SiQRK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Гилязова Гузель Аскаровна</text:p>
          </table:table-cell>
          <table:table-cell office:value-type="string" calcext:value-type="string">
            <text:p>3165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40" calcext:value-type="float">
            <text:p>60114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Пилюгина Наталья Семеновна</text:p>
          </table:table-cell>
          <table:table-cell office:value-type="string" calcext:value-type="string">
            <text:p>3166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41" calcext:value-type="float">
            <text:p>60114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Галиакбарова Фергана Тимерхановна</text:p>
          </table:table-cell>
          <table:table-cell office:value-type="string" calcext:value-type="string">
            <text:p>3167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44" calcext:value-type="float">
            <text:p>60114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Абдрахманова Чулпан Тагировна</text:p>
          </table:table-cell>
          <table:table-cell office:value-type="string" calcext:value-type="string">
            <text:p>3168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56" calcext:value-type="float">
            <text:p>601156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Галимуллина Лилия Фаргатовна</text:p>
          </table:table-cell>
          <table:table-cell office:value-type="string" calcext:value-type="string">
            <text:p>galimullina.liliya@mail.ru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59" calcext:value-type="float">
            <text:p>60115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Вафина Ляйля Шарифулловна</text:p>
          </table:table-cell>
          <table:table-cell office:value-type="string" calcext:value-type="string">
            <text:p>3170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61" calcext:value-type="float">
            <text:p>60116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Дмитриева Ольга Николаевна</text:p>
          </table:table-cell>
          <table:table-cell office:value-type="string" calcext:value-type="string">
            <text:p>3171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67" calcext:value-type="float">
            <text:p>60116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Хасанова Райхана Габдулхаевна</text:p>
          </table:table-cell>
          <table:table-cell office:value-type="string" calcext:value-type="string">
            <text:p>3172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69" calcext:value-type="float">
            <text:p>60116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Каримуллина Лилия Мансуровна</text:p>
          </table:table-cell>
          <table:table-cell office:value-type="string" calcext:value-type="string">
            <text:p>3173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71" calcext:value-type="float">
            <text:p>60117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Афлятунова Фения Габдельхакимовна</text:p>
          </table:table-cell>
          <table:table-cell office:value-type="string" calcext:value-type="string">
            <text:p>3174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74" calcext:value-type="float">
            <text:p>60117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Хафизова Эльвира Закирзяновна</text:p>
          </table:table-cell>
          <table:table-cell office:value-type="string" calcext:value-type="string">
            <text:p>3175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75" calcext:value-type="float">
            <text:p>60117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Исмагилов Руслан Раимович</text:p>
          </table:table-cell>
          <table:table-cell office:value-type="string" calcext:value-type="string">
            <text:p>3176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80" calcext:value-type="float">
            <text:p>60118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Хуснетдинова Дина Фандасовна</text:p>
          </table:table-cell>
          <table:table-cell office:value-type="string" calcext:value-type="string">
            <text:p>3177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81" calcext:value-type="float">
            <text:p>60118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Шамиева Эльвира Салимовна</text:p>
          </table:table-cell>
          <table:table-cell office:value-type="string" calcext:value-type="string">
            <text:p>3178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83" calcext:value-type="float">
            <text:p>60118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Галиева Марта Ягуфаровна</text:p>
          </table:table-cell>
          <table:table-cell office:value-type="string" calcext:value-type="string">
            <text:p>3179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84" calcext:value-type="float">
            <text:p>60118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Михайлов Кирилл Владимирович</text:p>
          </table:table-cell>
          <table:table-cell office:value-type="string" calcext:value-type="string">
            <text:p>3180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85" calcext:value-type="float">
            <text:p>601185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Дятлова Ирина Николаевна</text:p>
          </table:table-cell>
          <table:table-cell office:value-type="string" calcext:value-type="string">
            <text:p>3181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1187" calcext:value-type="float">
            <text:p>601187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Зуева Елена Фаязовна</text:p>
          </table:table-cell>
          <table:table-cell office:value-type="string" calcext:value-type="string">
            <text:p>3182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3011" calcext:value-type="float">
            <text:p>60301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Каримова Виктория Андреевна</text:p>
          </table:table-cell>
          <table:table-cell office:value-type="string" calcext:value-type="string">
            <text:p>3183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3020" calcext:value-type="float">
            <text:p>603020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Салихова Резеда Дамировна</text:p>
          </table:table-cell>
          <table:table-cell office:value-type="string" calcext:value-type="string">
            <text:p>3184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3149" calcext:value-type="float">
            <text:p>603149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Михайлова Гульнара Мигегалиевна</text:p>
          </table:table-cell>
          <table:table-cell office:value-type="string" calcext:value-type="string">
            <text:p>3185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1" calcext:value-type="float">
            <text:p>605001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Галиахметов Артур Каримович</text:p>
          </table:table-cell>
          <table:table-cell office:value-type="string" calcext:value-type="string">
            <text:p>3186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2" calcext:value-type="float">
            <text:p>605002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Марасинская Анастасия Андреевна</text:p>
          </table:table-cell>
          <table:table-cell office:value-type="string" calcext:value-type="string">
            <text:p>3187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3" calcext:value-type="float">
            <text:p>605003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string" calcext:value-type="string">
            <text:p>Абульханова Зиля Равилевна</text:p>
          </table:table-cell>
          <table:table-cell office:value-type="string" calcext:value-type="string">
            <text:p>3188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4" calcext:value-type="float">
            <text:p>605004</text:p>
          </table:table-cell>
          <table:table-cell office:value-type="string" calcext:value-type="string">
            <text:p>$2y$10$fon9svJ8HNoYB6Jxs5mXeuHcVthfAKHtdOo8CtterJcf3YMaWX3ie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@test.t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1001" calcext:value-type="float">
            <text:p>611001</text:p>
          </table:table-cell>
          <table:table-cell office:value-type="string" calcext:value-type="string">
            <text:p>$2y$10$i4Q7iw6FG/4fSS3ZdsSJnuTevnrFQYLU3PLMpSt.d6JlsISycqtrG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Калимуллина Лейсан Рамилевна</text:p>
          </table:table-cell>
          <table:table-cell office:value-type="string" calcext:value-type="string">
            <text:p>leisan.kalimullina.78@mail.r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pEtPi091WTOtenH/fEgkbuzS8WAxpCabxyBfqIiQl6rOpy.3RmZfS</text:p>
          </table:table-cell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Зарипова Гулия Гусмановна</text:p>
          </table:table-cell>
          <table:table-cell office:value-type="string" calcext:value-type="string">
            <text:p>gule4ka-75@mail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H/8kpBfX2SnBk7kXtpx60ecnPkgjRPnLIKNTnq3/6ravv/q5OcY8m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Борисова Татьяна Валентиновна</text:p>
          </table:table-cell>
          <table:table-cell office:value-type="string" calcext:value-type="string">
            <text:p>btv.1981@yandex.ru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LEJHa5R6.txFVC2WolpO5.VBQVpQgAIvnulpa3IasPy3uPTkbJzEC</text:p>
          </table:table-cell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string" calcext:value-type="string">
            <text:p>Галимова Алина Маратовна</text:p>
          </table:table-cell>
          <table:table-cell office:value-type="string" calcext:value-type="string">
            <text:p>alina.nabiullina.1992@mail.r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NIPBpqejsCadygc2vPKYzOmLPOqaIsd6sOEzCGQrJuBaQToeiAiR2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Муртазина Наталья Юрьевна</text:p>
          </table:table-cell>
          <table:table-cell office:value-type="string" calcext:value-type="string">
            <text:p>natalya.murtazina87@yandex.ru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j8JPf.IYCJ5InGxwck25buKjZn0Jq2MlSkhnTuxuVAG119xnpgZbe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Яруллина Раиса Габдельбаровна</text:p>
          </table:table-cell>
          <table:table-cell office:value-type="string" calcext:value-type="string">
            <text:p>raisa_yarullinanov@mail.ru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y9jb5O.8P9lSnXfnuzdRpuAsr/Os8xFOVpQlXHodME/zaI6L8z19y</text:p>
          </table:table-cell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Матвеева Лилия Гаязовна</text:p>
          </table:table-cell>
          <table:table-cell office:value-type="string" calcext:value-type="string">
            <text:p>liya-matveeva@internet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mvI6Yf0aoCqbWIDy242rt.TOamVhcyDQR8Fj1ebn1s8g8TJ4LZa6m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Галиакберова Раиля Рамиловна</text:p>
          </table:table-cell>
          <table:table-cell office:value-type="string" calcext:value-type="string">
            <text:p>galiakberova.railya@mail.ru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TBuhZNmBtBOyRZR/rONZl.RixZ/FyqmkUo3A.rteUNHkHMaPrp0Yq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Калимуллина Зульфия Рифовна</text:p>
          </table:table-cell>
          <table:table-cell office:value-type="string" calcext:value-type="string">
            <text:p>arskolimp@mail.ru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1qfm0.PXSdoitETWCLZT7.F.6GkvjWCKD7pttMEWOcQBq6jsCxOQ.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Магсумова Эльмира Ринатовна</text:p>
          </table:table-cell>
          <table:table-cell office:value-type="string" calcext:value-type="string">
            <text:p>ilysa2000@mail.ru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KGT9vyjQBLZdFFGF3EsBtOekY2p2eSQS6j2x2Xa8G2BFJKf/P/fzm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bavly</text:p>
          </table:table-cell>
          <table:table-cell office:value-type="string" calcext:value-type="string">
            <text:p>user@bavly.r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EcNv7m8TRFF/LA38KKqUB.wAy3RTYav2FA01libuv6q/f.hQbiUiS</text:p>
          </table:table-cell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Петрова Гульназ Нурулловна</text:p>
          </table:table-cell>
          <table:table-cell office:value-type="string" calcext:value-type="string">
            <text:p>gulnazp13@yandex.ru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AEcCa8fjyW0KyuMC5CPkxeTkJ8SfjOpkzTQCveYMbJ6UGn0THhNe.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Балашова Наталья Мухамедовна</text:p>
          </table:table-cell>
          <table:table-cell office:value-type="string" calcext:value-type="string">
            <text:p>uobalashova2013@yandex.ru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Gmoi6eVhNZqSgcePVDaxueOYphvDLHina0T5C/e7zchUYL3s7O/La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Хусниева Ильгиза Илфрузовна</text:p>
          </table:table-cell>
          <table:table-cell office:value-type="string" calcext:value-type="string">
            <text:p>khusnieva.ilgiza@mail.r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fM17OU2axGg6YpAf2y/GP.pLuyg.Rbh877xR6nlVzBtMwKyvhn87y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Лысева Анастасия Юрьевна</text:p>
          </table:table-cell>
          <table:table-cell office:value-type="string" calcext:value-type="string">
            <text:p>anastasia_2007_m@mail.ru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WcRBCdRSymh2XVjha3Q4QuKj2YR4OTKR1b9pA1UuwxoHz.PVcstNe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Юнусова Салима Фандусовна</text:p>
          </table:table-cell>
          <table:table-cell office:value-type="string" calcext:value-type="string">
            <text:p>rzimkgora@mail.r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/DC/5tpuC2kKyAwD63bbR./r5n5rBQfKA/GpyR/WwMCBOVBNvsvNu</text:p>
          </table:table-cell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Хидиятов Ильнар Рузалевич</text:p>
          </table:table-cell>
          <table:table-cell office:value-type="string" calcext:value-type="string">
            <text:p>hidiatov@mail.r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jHtB6.GBL3HU/F9sjy42a.y7Qbf0kXJQRe77Actg.CN1AvJwRF9T2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kzn@odkzn.r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jJE1mw3bzlcnhpXVvEtqvO4T90Bxw5TS/erOuEG3pzl7Oq4.ZmTw2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Низамова Фания Джамилевна</text:p>
          </table:table-cell>
          <table:table-cell office:value-type="string" calcext:value-type="string">
            <text:p>nfanija74@yandex.ru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9QEVgZiEUfwGIvQQ71x6Z.45jTFKJ1hawI83t3.FbQJTvBmv/QjdK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Махмутова Гульшат Разиновна</text:p>
          </table:table-cell>
          <table:table-cell office:value-type="string" calcext:value-type="string">
            <text:p>mahmutova_gulshat@mail.r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K9HOb6Ycf3POGqICWyn4EeJAHW9A/UOhsLfHPwSZah4CSUIH5ao0a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Аюпова Венера Мухлисулловна</text:p>
          </table:table-cell>
          <table:table-cell office:value-type="string" calcext:value-type="string">
            <text:p>venera.ayupova2020@mail.ru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vt6nikj7qPuZPjwRwmCP2e.KYfgAIdALfgda4kTS41fwHtw4KCLbC</text:p>
          </table:table-cell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Гайсина Ольга Борисовна</text:p>
          </table:table-cell>
          <table:table-cell office:value-type="string" calcext:value-type="string">
            <text:p>olga.gaisina@mail.r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Sw6MCfSl4nPLS02aJkH4c.d5HUPQZHS2aFSsu7OJU0WDTsFKij7L6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Русова Марина Михайловна</text:p>
          </table:table-cell>
          <table:table-cell office:value-type="string" calcext:value-type="string">
            <text:p>rusova_1980@mail.ru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z7kHPTQji6TlFWKRvdw2Oupae5P8mEgKfBs3NQSeB1BBMelx7wkU.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Боброва Елена Сергеевна</text:p>
          </table:table-cell>
          <table:table-cell office:value-type="string" calcext:value-type="string">
            <text:p>Kamust116@yandex.ru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JJQAM078w4zIUyRdQz/fEubknlroS1z0R/9hCp2S7/Ho2/O..2ggi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Идиятуллина Ландыш Ханафиевна</text:p>
          </table:table-cell>
          <table:table-cell office:value-type="string" calcext:value-type="string">
            <text:p>detsad_chulpan@mail.ru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Wke3Sfsb4j9cxn/9VwmTBeauiDry/2CGS6.KwYiRG.L70.r6VdJM6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Нуруллина Юлия Владимировна</text:p>
          </table:table-cell>
          <table:table-cell office:value-type="string" calcext:value-type="string">
            <text:p>nyr.uliya@yandex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1MXumho5MJIpOhfT1Li/ue3qY5GOsMt.iQc8JN8EN5yXyz1YNubF6</text:p>
          </table:table-cell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Минвалеева Ирина Николаевна</text:p>
          </table:table-cell>
          <table:table-cell office:value-type="string" calcext:value-type="string">
            <text:p>minvaleeva-imc@mail.ru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K1J80mloc3ZCLjo7FXE4nemVUYOswBAL65GAeWBpWIQuA9q6ZVak.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Губьянова Оксана Михайловна</text:p>
          </table:table-cell>
          <table:table-cell office:value-type="string" calcext:value-type="string">
            <text:p>zaika24ooo@yandex.ru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WPHoinbyq.XacMrNQXJ5O.ONO.BpwCHq2gkDJL4kVPY3Yc9qGD0dW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Мартынова Лариса Аркадьевна</text:p>
          </table:table-cell>
          <table:table-cell office:value-type="string" calcext:value-type="string">
            <text:p>lora.vlad80@mail.ru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rKq6ebCs46B1oGrzwO3fguGukLZXQmpnWyayF1tC5dZuBWK/4nflS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Ахмедова Наргиз Чингиз кызы</text:p>
          </table:table-cell>
          <table:table-cell office:value-type="string" calcext:value-type="string">
            <text:p>nargiz1993ahmedova@yandex.ru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sUB8RPNybNnvvoexFr5JieXTnknng4ze4FkrzYqXdHMigKqNn65Li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Баева Лилия Ахияровна</text:p>
          </table:table-cell>
          <table:table-cell office:value-type="string" calcext:value-type="string">
            <text:p>liliya.baeva@tatar.ru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jhUOhjLXuU780UC/bEu6quigHLn1hJYOmM7pYTlf4.z5wNnsHvi6.</text:p>
          </table:table-cell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Абишева Алена Петровна</text:p>
          </table:table-cell>
          <table:table-cell office:value-type="string" calcext:value-type="string">
            <text:p>naberezhnye_chelny_rt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0FkJu/EqDj80HUt72dfLkechSMh.rzaH/71BucidYIVzlWQd1LrCa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Тарманова Лилия Фазулзяновна</text:p>
          </table:table-cell>
          <table:table-cell office:value-type="string" calcext:value-type="string">
            <text:p>Iiya.tarmanova@mail.r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8RKcrvgeeCdUzAuPuRFRwuf5hYdSAe7Dku4WpEgk4/etHB3bxHbGW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Сираева Гульфия Лябибовна</text:p>
          </table:table-cell>
          <table:table-cell office:value-type="string" calcext:value-type="string">
            <text:p>89178644206@yandex.r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5dkBJEYgWo5TVI91.KqF3.lZX6swDEk7F830E6swxkB7hPW5Ii1Ry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Таймуллина Татьяна Николаевна</text:p>
          </table:table-cell>
          <table:table-cell office:value-type="string" calcext:value-type="string">
            <text:p>taymullina.t@yandex.ru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/Paz9QLGSiHC71hHwlhB1OtI3N8ZVGOkS0owc9zQgKTH71Fnu7VFq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Назарова Оксана Евгеньевна</text:p>
          </table:table-cell>
          <table:table-cell office:value-type="string" calcext:value-type="string">
            <text:p>oksana.nazarova.2013@list.ru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VGQjdxazyDUz62ap2oSb8e6q01GF77UgZ2C3Ua6zZfOBlurCIX8Z.</text:p>
          </table:table-cell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Хисамова Лейсан Фирдавсовна</text:p>
          </table:table-cell>
          <table:table-cell office:value-type="string" calcext:value-type="string">
            <text:p>xisamova75@mail.ru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H/9cgZoCmsfeZnBJsssJsu0AJLmeQD5cn3CVGJ4kKlIQjAfZ/spU6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Капитонова Гульназ Тагировна</text:p>
          </table:table-cell>
          <table:table-cell office:value-type="string" calcext:value-type="string">
            <text:p>gulnaz-kap@mail.ru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Fkr8xe6V1B7EKTBi9x8mOeyiwq5g7CeZVPKg/cff4TjRC6RRR4vX6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Ахмадуллина Айгуль Флеровна</text:p>
          </table:table-cell>
          <table:table-cell office:value-type="string" calcext:value-type="string">
            <text:p>A.aigul2010@yandex.ru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cjmK4WXvxV8buhUuZ9dhUOEcI.MC.gIXLBJXCIXmYvih9EiPrnDgG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Наумова Мария Александровна</text:p>
          </table:table-cell>
          <table:table-cell office:value-type="string" calcext:value-type="string">
            <text:p>naumova-mariya73@mail.ru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h4I63HsLvvP/gCqhdjCpyevbfjpSjt5lQjMyA0VsMegQLopsQz/x6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Ромашкина Дарья Михайловна</text:p>
          </table:table-cell>
          <table:table-cell office:value-type="string" calcext:value-type="string">
            <text:p>d.romashkina@list.ru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U0CVR28eQzNl0uCn2q9ao.CwvK5fWIuL3H/sWn7sJZQTI2JnPBREi</text:p>
          </table:table-cell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Хабутдинова Гузалия Фаязовна</text:p>
          </table:table-cell>
          <table:table-cell office:value-type="string" calcext:value-type="string">
            <text:p>guzelfajazovna@yandex.ru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dGXeshF4arTOYIqCXcLKhOXaBQ5ebTJWlU4v.Y.qK00OwyOtoZ0HK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Якупова Линара Канифовна</text:p>
          </table:table-cell>
          <table:table-cell office:value-type="string" calcext:value-type="string">
            <text:p>linara76@mail.ru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hvURnDzdkEuC6cruxiNOg.sEoNc18BvyuvhJNjlC5Jr/1Voc1H3.q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Киричук Наталья Михайловна</text:p>
          </table:table-cell>
          <table:table-cell office:value-type="string" calcext:value-type="string">
            <text:p>natalya.kirichuk@mail.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NLYUPpkccUYVscjOWjvV7uvhjXpmbJsW6VNT3BF6eVQAmVwdp2LwW</text:p>
          </table:table-cell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string" calcext:value-type="string">
            <text:p>Балякина Ольга Ивановна</text:p>
          </table:table-cell>
          <table:table-cell office:value-type="string" calcext:value-type="string">
            <text:p>Olgaivanovna86@yandex.ru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o4dJHciN3Mkzv10zXYayTeYzzXZCFqfzph4ruI28l/WvrVRPghiom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Гареева Айгуль Рузалиновна</text:p>
          </table:table-cell>
          <table:table-cell office:value-type="string" calcext:value-type="string">
            <text:p>gar_aigul@mail.ru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WHQaCSqDf2bahkBiVIk3P.T0yhDjEAN6oLsnVqtfczYAYkk6bXCGy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Рощектаев Андрей Владимирович</text:p>
          </table:table-cell>
          <table:table-cell office:value-type="string" calcext:value-type="string">
            <text:p>3193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1004" calcext:value-type="float">
            <text:p>551004</text:p>
          </table:table-cell>
          <table:table-cell office:value-type="string" calcext:value-type="string">
            <text:p>$2y$10$Tao6DrZLCwb8T0e3ns3QaubMLn5hEWaPgeYpTKwQF/F/QUZ3h8fSi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Юсупова Наилия Ибрагимовна</text:p>
          </table:table-cell>
          <table:table-cell office:value-type="string" calcext:value-type="string">
            <text:p>3195@mail.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59001" calcext:value-type="float">
            <text:p>559001</text:p>
          </table:table-cell>
          <table:table-cell office:value-type="string" calcext:value-type="string">
            <text:p>$2y$10$5kV6Pqq6u16zvI2ND.B/Ke73TPiBLnp3L10ypXfbSRkAzKEpii/oa</text:p>
          </table:table-cell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string" calcext:value-type="string">
            <text:p>Test UO</text:p>
          </table:table-cell>
          <table:table-cell office:value-type="string" calcext:value-type="string">
            <text:p>uo@test.t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86fdMuM0VbLwhKlt4EU5lOqlpdz86rVN1JqigVb3fv0McCuTSE7ce</text:p>
          </table:table-cell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Uo2</text:p>
          </table:table-cell>
          <table:table-cell office:value-type="string" calcext:value-type="string">
            <text:p>uo2@test.t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SnDAnAmdrNoh9/DFpvGQQOcCmeGaMRQeURX3OLncG1fKwsZOg1pcW</text:p>
          </table:table-cell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string" calcext:value-type="string">
            <text:p>uo3</text:p>
          </table:table-cell>
          <table:table-cell office:value-type="string" calcext:value-type="string">
            <text:p>uo3@test.t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qX5jojLmVy7OzM34RLIC4eOWsuog0JOSleoFszUDqw8Tln4EdQxPW</text:p>
          </table:table-cell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sovet@odkzn.ru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c6tk4kNvEHSJp3mVmVb9OORRSdO4sFVc89o2wvR6aP8icp9tBkbha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Тиникова Альфия Ханбялевна</text:p>
          </table:table-cell>
          <table:table-cell office:value-type="string" calcext:value-type="string">
            <text:p>alfiyatinikova1958@gmail.com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4021" calcext:value-type="float">
            <text:p>284021</text:p>
          </table:table-cell>
          <table:table-cell office:value-type="string" calcext:value-type="string">
            <text:p>$2y$10$.eO4LSjJFgCpySj2cSvr/.8gpgCVG3esdMvfSotjVi7Y4E65aZIAm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Хуснуллина Алия Азатовна</text:p>
          </table:table-cell>
          <table:table-cell office:value-type="string" calcext:value-type="string">
            <text:p>khusnullina.aliya@yandex.ru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9002" calcext:value-type="float">
            <text:p>559002</text:p>
          </table:table-cell>
          <table:table-cell office:value-type="string" calcext:value-type="string">
            <text:p>$2y$10$OBXyDo9d3M8cy.SYJu9Qyub696RO7nL70zZJoLeFZvGAkYJnkJMAe</text:p>
          </table:table-cell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m@test.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A0QLc6Fej9IbCX9v.S1izu4UazbHHD1Ydsp2I92UuQBd0c0tZWu2O</text:p>
          </table:table-cell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string" calcext:value-type="string">
            <text:p>Кировский-Московский</text:p>
          </table:table-cell>
          <table:table-cell office:value-type="string" calcext:value-type="string">
            <text:p>kirmos@odkzn.ru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aJsf2yQZBXSvUA2KUmvtF.eHoIH.CPa8c2g9JjwdaIZ9htaIMuEOi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Вахитовский-Приволжский</text:p>
          </table:table-cell>
          <table:table-cell office:value-type="string" calcext:value-type="string">
            <text:p>vahpril@odkzn.ru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C27Fki1bfMHzI37RSxj4ou.L0pKLTQ16L81cmhfjo0Pi9TxMBOCzi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Авиастроительный-Ново-Савиновский</text:p>
          </table:table-cell>
          <table:table-cell office:value-type="string" calcext:value-type="string">
            <text:p>avianov@odkzn.ru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y$10$h12ODzm600MTs.2.ErvKWu1m41mdfykqCaq7QQrp.cXPF4NK596rq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Алиева Рафиля Мунировна</text:p>
          </table:table-cell>
          <table:table-cell office:value-type="string" calcext:value-type="string">
            <text:p>krindi@list.r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22" calcext:value-type="float">
            <text:p>104022</text:p>
          </table:table-cell>
          <table:table-cell office:value-type="string" calcext:value-type="string">
            <text:p>$2y$10$QAHpYM.YwU6IGCRamUKPwOrqw/207i..6sKsXYfPnPAlY./7mwgC6</text:p>
          </table:table-cell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Ахметшина Айсылу Ахметгараевна</text:p>
          </table:table-cell>
          <table:table-cell office:value-type="string" calcext:value-type="string">
            <text:p>gmurzanaeva@mail.r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021" calcext:value-type="float">
            <text:p>104021</text:p>
          </table:table-cell>
          <table:table-cell office:value-type="string" calcext:value-type="string">
            <text:p>$2y$10$WLooqS6rqT7vofuLdDz.hepE.YK.tQlsL9EDKjmEWHwMBPxYTp7mK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Асадулина Лилия Галиевна</text:p>
          </table:table-cell>
          <table:table-cell office:value-type="string" calcext:value-type="string">
            <text:p>Lili-16@bk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5003" calcext:value-type="float">
            <text:p>265003</text:p>
          </table:table-cell>
          <table:table-cell office:value-type="string" calcext:value-type="string">
            <text:p>$2y$10$E0WbA4zof64.w0.fXxFIt.PakXNp7bOXnSQauBenzJ0d0n3wjw58e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Давыдова Яна Михайловна</text:p>
          </table:table-cell>
          <table:table-cell office:value-type="string" calcext:value-type="string">
            <text:p>Soshvesta_chelny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5004" calcext:value-type="float">
            <text:p>265004</text:p>
          </table:table-cell>
          <table:table-cell office:value-type="string" calcext:value-type="string">
            <text:p>$2y$10$wWWcEwvATKPNaRn4rOv7U.FJBj4yPRPTeatkfVi/6ensrz94VnPgC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Салахова Ландыш Ихтирамовна</text:p>
          </table:table-cell>
          <table:table-cell office:value-type="string" calcext:value-type="string">
            <text:p>3191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9004" calcext:value-type="float">
            <text:p>559004</text:p>
          </table:table-cell>
          <table:table-cell office:value-type="string" calcext:value-type="string">
            <text:p>$2y$10$2/sAtO.gSBd/7l8EH9ZLO.fJ4u3vkUjbjBW5hzuCsHfCpdMHbvLOK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Ахметзянов Ильназ Зуфарович</text:p>
          </table:table-cell>
          <table:table-cell office:value-type="string" calcext:value-type="string">
            <text:p>3189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9003" calcext:value-type="float">
            <text:p>559003</text:p>
          </table:table-cell>
          <table:table-cell office:value-type="string" calcext:value-type="string">
            <text:p>$2y$10$WSV4IW838XrEsd8z56avr.Jw6GgNoU.jMxsKh.aydGPWCR4rGj3fO</text:p>
          </table:table-cell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Миннуллина Айгуль Ильдусовна</text:p>
          </table:table-cell>
          <table:table-cell office:value-type="string" calcext:value-type="string">
            <text:p>3190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5" calcext:value-type="float">
            <text:p>605005</text:p>
          </table:table-cell>
          <table:table-cell office:value-type="string" calcext:value-type="string">
            <text:p>$2y$10$hHM7UuQVSdrhjPC8RIsJEudu4tWSxIBKGxa877X5kaEVCWn5srgea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Садыкова Альбина Георгиевна</text:p>
          </table:table-cell>
          <table:table-cell office:value-type="string" calcext:value-type="string">
            <text:p>3192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6" calcext:value-type="float">
            <text:p>605006</text:p>
          </table:table-cell>
          <table:table-cell office:value-type="string" calcext:value-type="string">
            <text:p>$2y$10$nk.0hkeXj/DDMtCG.q1PFOYIE7LMWVCeEVcaL.jRkaMICf6m4Ik0i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Sam S T</text:p>
          </table:table-cell>
          <table:table-cell office:value-type="string" calcext:value-type="string">
            <text:p>sam@test.t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1002" calcext:value-type="float">
            <text:p>611002</text:p>
          </table:table-cell>
          <table:table-cell office:value-type="string" calcext:value-type="string">
            <text:p>$2y$10$vw49vePr8x46wy1u/snQV.zf4vWNUd1/BbQLAPkaSQEeYPWjHK42y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ivan@test.m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1003" calcext:value-type="float">
            <text:p>611003</text:p>
          </table:table-cell>
          <table:table-cell office:value-type="string" calcext:value-type="string">
            <text:p>$2y$10$ej52lAnonCC62hxfmCk1J.WEPIvCSZka9PZpl2UmCKSTePWjn5Ajq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Ахметова Роза Ильдусовна</text:p>
          </table:table-cell>
          <table:table-cell office:value-type="string" calcext:value-type="string">
            <text:p>Ahmetova.roza2011@yandex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25" calcext:value-type="float">
            <text:p>344025</text:p>
          </table:table-cell>
          <table:table-cell office:value-type="string" calcext:value-type="string">
            <text:p>$2y$10$PRE/1gZOigVhsS..Kadm1uqLDNSyOKGf1pIHn9ERak1r3PgHtZrnm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Курбангалиева Альфия Ринатовна</text:p>
          </table:table-cell>
          <table:table-cell office:value-type="string" calcext:value-type="string">
            <text:p>garmonija2024@mail.ru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44026" calcext:value-type="float">
            <text:p>344026</text:p>
          </table:table-cell>
          <table:table-cell office:value-type="string" calcext:value-type="string">
            <text:p>$2y$10$CHmUFVWFFYW1Em1vEwrnuOBRDGmkwHVsTQPJrtManrlsqvVJ8z9ry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Нуриева Венера Мунировна</text:p>
          </table:table-cell>
          <table:table-cell office:value-type="string" calcext:value-type="string">
            <text:p>javenera@mail.r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036" calcext:value-type="float">
            <text:p>114036</text:p>
          </table:table-cell>
          <table:table-cell office:value-type="string" calcext:value-type="string">
            <text:p>$2y$10$48s9uRsAM72Q01JWe6JjpOXw6AZZr3PONXvtF3L4qK3.Qm5enVXZe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Вотяков Семен Анатольевич</text:p>
          </table:table-cell>
          <table:table-cell office:value-type="string" calcext:value-type="string">
            <text:p>school@um-pokolenie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5005" calcext:value-type="float">
            <text:p>265005</text:p>
          </table:table-cell>
          <table:table-cell office:value-type="string" calcext:value-type="string">
            <text:p>$2y$10$cCEdOVu88hLTBD1Y9sDjheTMsIzW2aNDrSUNIrpX1SsF/IKHUqFji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Гарифуллин Римат Мударисович</text:p>
          </table:table-cell>
          <table:table-cell office:value-type="string" calcext:value-type="string">
            <text:p>rimatgarry@mail.ru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4012" calcext:value-type="float">
            <text:p>504012</text:p>
          </table:table-cell>
          <table:table-cell office:value-type="string" calcext:value-type="string">
            <text:p>$2y$10$2Z82VAwQdDenQgklWKkAE.E/7jifTU4/f13WtUlJm9KNbxj80Gp4q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Железкова Наталья Ивановна</text:p>
          </table:table-cell>
          <table:table-cell office:value-type="string" calcext:value-type="string">
            <text:p>3194@mail.m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3092" calcext:value-type="float">
            <text:p>543092</text:p>
          </table:table-cell>
          <table:table-cell office:value-type="string" calcext:value-type="string">
            <text:p>$2y$10$qjS8KWYh9sPy7Ck7k6LC7ObtqhRq7lYqn256/Cx9jiikDF4./Yo.S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Гисматова Эльвира Фаритовна</text:p>
          </table:table-cell>
          <table:table-cell office:value-type="string" calcext:value-type="string">
            <text:p>bulixchi1@mail.ru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25" calcext:value-type="float">
            <text:p>174025</text:p>
          </table:table-cell>
          <table:table-cell office:value-type="string" calcext:value-type="string">
            <text:p>$2y$10$rIlMjjgIruXSd2MpsqNQ0eS6cSaGa3jnwO0Pj6q9Ha66wz04NVWRu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Казакова Елена Михайловна</text:p>
          </table:table-cell>
          <table:table-cell office:value-type="string" calcext:value-type="string">
            <text:p>vsosh6.gabashi@mail.r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6026" calcext:value-type="float">
            <text:p>256026</text:p>
          </table:table-cell>
          <table:table-cell office:value-type="string" calcext:value-type="string">
            <text:p>$2y$10$/0zvEpP/b79hAQZmQv2nG.o5zQxCyHIJmQHQfx3ElaPTCXbfKrZWW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Кузюкова Ольга Валерьевна</text:p>
          </table:table-cell>
          <table:table-cell office:value-type="string" calcext:value-type="string">
            <text:p>schboratinskiy@yandex.r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6027" calcext:value-type="float">
            <text:p>256027</text:p>
          </table:table-cell>
          <table:table-cell office:value-type="string" calcext:value-type="string">
            <text:p>$2y$10$2eNbXyxaZ9PTAslbbh8J0OaaSefaKF1JyDngJDG9cGk.K.gxGQZAu</text:p>
          </table:table-cell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string" calcext:value-type="string">
            <text:p>Байрамова Элина Ильдаровна</text:p>
          </table:table-cell>
          <table:table-cell office:value-type="string" calcext:value-type="string">
            <text:p>3196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7" calcext:value-type="float">
            <text:p>605007</text:p>
          </table:table-cell>
          <table:table-cell office:value-type="string" calcext:value-type="string">
            <text:p>$2y$10$YadyB6C3ThwotYS9j8LYX.oPhvJGHh9h/WmhfpVtVlccLRSIQsk.G</text:p>
          </table:table-cell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office:value-type="string" calcext:value-type="string">
            <text:p>Ксения Викторовна Никифоркина</text:p>
          </table:table-cell>
          <table:table-cell office:value-type="string" calcext:value-type="string">
            <text:p>knikiforkina@mail.ru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5005" calcext:value-type="float">
            <text:p>165005</text:p>
          </table:table-cell>
          <table:table-cell office:value-type="string" calcext:value-type="string">
            <text:p>$2y$10$utAelPD/XcR983pCbnZNteRGYkytzX7FjNwk0TJ1VQifPHrxMHVym</text:p>
          </table:table-cell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Степанищева Ольга Викторовна</text:p>
          </table:table-cell>
          <table:table-cell office:value-type="string" calcext:value-type="string">
            <text:p>3197@mail.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5008" calcext:value-type="float">
            <text:p>605008</text:p>
          </table:table-cell>
          <table:table-cell office:value-type="string" calcext:value-type="string">
            <text:p>$2y$10$/hVEuoBsX43hO2LtAQ5NSOXoeqxcYmRwkLpjCXBZH/HLR3dxnFKie</text:p>
          </table:table-cell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string" calcext:value-type="string">
            <text:p>Гимадиева Лидия Вячеславовна</text:p>
          </table:table-cell>
          <table:table-cell office:value-type="string" calcext:value-type="string">
            <text:p>gimadieva@mail.ru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5006" calcext:value-type="float">
            <text:p>265006</text:p>
          </table:table-cell>
          <table:table-cell office:value-type="string" calcext:value-type="string">
            <text:p>$2y$10$TPv/v6lpFgbWJ//uyFlufeLUwEac.SLWLD3Xk6va5AaEDNcYvD8Qy</text:p>
          </table:table-cell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string" calcext:value-type="string">
            <text:p>Мубаракшина Энже Муллануровна</text:p>
          </table:table-cell>
          <table:table-cell office:value-type="string" calcext:value-type="string">
            <text:p>lilya.khayrullina.74@mail.ru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4026" calcext:value-type="float">
            <text:p>174026</text:p>
          </table:table-cell>
          <table:table-cell office:value-type="string" calcext:value-type="string">
            <text:p>$2y$10$TkPe56E8VIETomAq/u9D0uFO4JUyQbj05QrpRB.gzcU3Rs9koyPLK</text:p>
          </table:table-cell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string" calcext:value-type="string">
            <text:p>Шакирова Илюса Назиповна</text:p>
          </table:table-cell>
          <table:table-cell office:value-type="string" calcext:value-type="string">
            <text:p>ilusa.ilusa@yandex.r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8" calcext:value-type="float">
            <text:p>414008</text:p>
          </table:table-cell>
          <table:table-cell office:value-type="string" calcext:value-type="string">
            <text:p>$2y$10$ED9EVRYToFf/I55cwDcoT.SxlWAFMddllAuZ4QD/bfn8zesQqUcPO</text:p>
          </table:table-cell>
        </table:table-row>
        <table:table-row table:style-name="ro1" table:visibility="filter">
          <table:table-cell office:value-type="float" office:value="1426" calcext:value-type="float">
            <text:p>1426</text:p>
          </table:table-cell>
          <table:table-cell office:value-type="string" calcext:value-type="string">
            <text:p>Семенова Мария Петровна</text:p>
          </table:table-cell>
          <table:table-cell office:value-type="string" calcext:value-type="string">
            <text:p>sch9392015@mail.r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4009" calcext:value-type="float">
            <text:p>414009</text:p>
          </table:table-cell>
          <table:table-cell office:value-type="string" calcext:value-type="string">
            <text:p>$2y$10$Wv8DWyD2PwomvFyY74jfzu90MQYLskHm69sb4IpIRXtOh07qwQqWK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Катаева Марина Александровна</text:p>
          </table:table-cell>
          <table:table-cell office:value-type="string" calcext:value-type="string">
            <text:p>3145@mail.m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59005" calcext:value-type="float">
            <text:p>559005</text:p>
          </table:table-cell>
          <table:table-cell office:value-type="string" calcext:value-type="string">
            <text:p>$2y$10$tF631erHVibvpEV5LUrdVuphIdnlJ.fhbbUIGqResoTEhqMKwTl1e</text:p>
          </table:table-cell>
        </table:table-row>
      </table:table>
      <table:named-expressions/>
      <table:database-ranges>
        <table:database-range table:name="__Anonymous_Sheet_DB__0" table:target-range-address="odb_users.A1:odb_users.G1410" table:display-filter-buttons="true">
          <table:filter>
            <table:filter-and>
              <table:filter-condition table:value="54" table:operator="=" table:field-number="3">
                <table:filter-set-item table:value="54"/>
                <table:filter-set-item table:value="55"/>
                <table:filter-set-item table:value="58"/>
                <table:filter-set-item table:value="5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.00.0000</text:date>, <text:time style:data-style-name="N2" text:time-value="13:47:37.934919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3346a99e6b841765b75a9b29714a5b95c6761ce3</meta:generator>
    <meta:initial-creator>phpMyAdmin 5.2.2</meta:initial-creator>
    <meta:creation-date>2026-06-30T11:11:30+03:00</meta:creation-date>
    <dc:date>2026-06-30T13:51:33.772681161</dc:date>
    <meta:editing-duration>PT8M26S</meta:editing-duration>
    <meta:editing-cycles>3</meta:editing-cycles>
    <meta:document-statistic meta:table-count="1" meta:cell-count="9870" meta:object-count="0"/>
  </office:meta>
</office:document-meta>
</file>